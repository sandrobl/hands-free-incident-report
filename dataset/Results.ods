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7.68cm"/>
    </style:style>
    <style:style style:name="co3" style:family="table-column">
      <style:table-column-properties fo:break-before="auto" style:column-width="4.598cm"/>
    </style:style>
    <style:style style:name="co4" style:family="table-column">
      <style:table-column-properties fo:break-before="auto" style:column-width="9.29cm"/>
    </style:style>
    <style:style style:name="co5" style:family="table-column">
      <style:table-column-properties fo:break-before="auto" style:column-width="5.447cm"/>
    </style:style>
    <style:style style:name="co6" style:family="table-column">
      <style:table-column-properties fo:break-before="auto" style:column-width="5.856cm"/>
    </style:style>
    <style:style style:name="co7" style:family="table-column">
      <style:table-column-properties fo:break-before="auto" style:column-width="4.166cm"/>
    </style:style>
    <style:style style:name="co8" style:family="table-column">
      <style:table-column-properties fo:break-before="auto" style:column-width="6.061cm"/>
    </style:style>
    <style:style style:name="co9" style:family="table-column">
      <style:table-column-properties fo:break-before="auto" style:column-width="5.48cm"/>
    </style:style>
    <style:style style:name="co10" style:family="table-column">
      <style:table-column-properties fo:break-before="auto" style:column-width="3.468cm"/>
    </style:style>
    <style:style style:name="co11" style:family="table-column">
      <style:table-column-properties fo:break-before="auto" style:column-width="2.813cm"/>
    </style:style>
    <style:style style:name="co12" style:family="table-column">
      <style:table-column-properties fo:break-before="auto" style:column-width="2.889cm"/>
    </style:style>
    <style:style style:name="co13" style:family="table-column">
      <style:table-column-properties fo:break-before="auto" style:column-width="3.928cm"/>
    </style:style>
    <style:style style:name="ro1" style:family="table-row">
      <style:table-row-properties style:row-height="0.452cm" fo:break-before="auto" style:use-optimal-row-height="true"/>
    </style:style>
    <style:style style:name="ro2" style:family="table-row">
      <style:table-row-properties style:row-height="6.877cm" fo:break-before="auto" style:use-optimal-row-height="false"/>
    </style:style>
    <style:style style:name="ro3" style:family="table-row">
      <style:table-row-properties style:row-height="1.632cm" fo:break-before="auto" style:use-optimal-row-height="true"/>
    </style:style>
    <style:style style:name="ro4" style:family="table-row">
      <style:table-row-properties style:row-height="4.54cm" fo:break-before="auto" style:use-optimal-row-height="false"/>
    </style:style>
    <style:style style:name="ro5" style:family="table-row">
      <style:table-row-properties style:row-height="3.21cm" fo:break-before="auto" style:use-optimal-row-height="true"/>
    </style:style>
    <style:style style:name="ro6" style:family="table-row">
      <style:table-row-properties style:row-height="0.841cm" fo:break-before="auto" style:use-optimal-row-height="true"/>
    </style:style>
    <style:style style:name="ro7" style:family="table-row">
      <style:table-row-properties style:row-height="3.605cm" fo:break-before="auto" style:use-optimal-row-height="true"/>
    </style:style>
    <style:style style:name="ro8" style:family="table-row">
      <style:table-row-properties style:row-height="5.976cm" fo:break-before="auto" style:use-optimal-row-height="true"/>
    </style:style>
    <style:style style:name="ro9" style:family="table-row">
      <style:table-row-properties style:row-height="1.236cm" fo:break-before="auto" style:use-optimal-row-height="true"/>
    </style:style>
    <style:style style:name="ro10" style:family="table-row">
      <style:table-row-properties style:row-height="2.027cm" fo:break-before="auto" style:use-optimal-row-height="true"/>
    </style:style>
    <style:style style:name="ro11" style:family="table-row">
      <style:table-row-properties style:row-height="7.95cm" fo:break-before="auto" style:use-optimal-row-height="true"/>
    </style:style>
    <style:style style:name="ro12" style:family="table-row">
      <style:table-row-properties style:row-height="4.001cm" fo:break-before="auto" style:use-optimal-row-height="true"/>
    </style:style>
    <style:style style:name="ro13" style:family="table-row">
      <style:table-row-properties style:row-height="6.369cm" fo:break-before="auto" style:use-optimal-row-height="true"/>
    </style:style>
    <style:style style:name="ro14" style:family="table-row">
      <style:table-row-properties style:row-height="2.817cm" fo:break-before="auto" style:use-optimal-row-height="true"/>
    </style:style>
    <style:style style:name="ro15" style:family="table-row">
      <style:table-row-properties style:row-height="5.581cm" fo:break-before="auto" style:use-optimal-row-height="true"/>
    </style:style>
    <style:style style:name="ro16" style:family="table-row">
      <style:table-row-properties style:row-height="10.714cm" fo:break-before="auto" style:use-optimal-row-height="true"/>
    </style:style>
    <style:style style:name="ro17" style:family="table-row">
      <style:table-row-properties style:row-height="5.186cm" fo:break-before="auto" style:use-optimal-row-height="true"/>
    </style:style>
    <style:style style:name="ro18" style:family="table-row">
      <style:table-row-properties style:row-height="4.791cm" fo:break-before="auto" style:use-optimal-row-height="true"/>
    </style:style>
    <style:style style:name="ro19" style:family="table-row">
      <style:table-row-properties style:row-height="2.422cm" fo:break-before="auto" style:use-optimal-row-height="true"/>
    </style:style>
    <style:style style:name="ro20" style:family="table-row">
      <style:table-row-properties style:row-height="1.614cm" fo:break-before="auto" style:use-optimal-row-height="true"/>
    </style:style>
    <style:style style:name="ro21" style:family="table-row">
      <style:table-row-properties style:row-height="7.16cm" fo:break-before="auto" style:use-optimal-row-height="true"/>
    </style:style>
    <style:style style:name="ro22" style:family="table-row">
      <style:table-row-properties style:row-height="3.685cm" fo:break-before="auto" style:use-optimal-row-height="false"/>
    </style:style>
    <style:style style:name="ro23" style:family="table-row">
      <style:table-row-properties style:row-height="3.29cm" fo:break-before="auto" style:use-optimal-row-height="false"/>
    </style:style>
    <style:style style:name="ro24" style:family="table-row">
      <style:table-row-properties style:row-height="6.087cm" fo:break-before="auto" style:use-optimal-row-height="false"/>
    </style:style>
    <style:style style:name="ro25" style:family="table-row">
      <style:table-row-properties style:row-height="0.46cm" fo:break-before="auto" style:use-optimal-row-height="true"/>
    </style:style>
    <style:style style:name="ro26" style:family="table-row">
      <style:table-row-properties style:row-height="1.619cm" fo:break-before="auto" style:use-optimal-row-height="true"/>
    </style:style>
    <style:style style:name="ro27" style:family="table-row">
      <style:table-row-properties style:row-height="6.765cm" fo:break-before="auto" style:use-optimal-row-height="true"/>
    </style:style>
    <style:style style:name="ro28" style:family="table-row">
      <style:table-row-properties style:row-height="4.396cm" fo:break-before="auto" style:use-optimal-row-height="true"/>
    </style:style>
    <style:style style:name="ro29" style:family="table-row">
      <style:table-row-properties style:row-height="1.214cm" fo:break-before="auto" style:use-optimal-row-height="true"/>
    </style:style>
    <style:style style:name="ro30" style:family="table-row">
      <style:table-row-properties style:row-height="2.025cm" fo:break-before="auto" style:use-optimal-row-height="true"/>
    </style:style>
    <style:style style:name="ro31" style:family="table-row">
      <style:table-row-properties style:row-height="9.529cm" fo:break-before="auto" style:use-optimal-row-height="true"/>
    </style:style>
    <style:style style:name="ro32" style:family="table-row">
      <style:table-row-properties style:row-height="9.135cm" fo:break-before="auto" style:use-optimal-row-height="true"/>
    </style:style>
    <style:style style:name="ro33" style:family="table-row">
      <style:table-row-properties style:row-height="3.323cm" fo:break-before="auto" style:use-optimal-row-height="false"/>
    </style:style>
    <style:style style:name="ro34" style:family="table-row">
      <style:table-row-properties style:row-height="2.598cm" fo:break-before="auto" style:use-optimal-row-height="false"/>
    </style:style>
    <style:style style:name="ro35" style:family="table-row">
      <style:table-row-properties style:row-height="2.928cm" fo:break-before="auto" style:use-optimal-row-height="false"/>
    </style:style>
    <style:style style:name="ro36" style:family="table-row">
      <style:table-row-properties style:row-height="4.837cm" fo:break-before="auto" style:use-optimal-row-height="fals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style:style style:name="ce71" style:family="table-cell" style:parent-style-name="Default">
      <style:table-cell-properties fo:background-color="transparent"/>
    </style:style>
    <style:style style:name="ce72" style:family="table-cell" style:parent-style-name="Default">
      <style:table-cell-properties fo:background-color="#dee6ef"/>
    </style:style>
    <style:style style:name="ce73" style:family="table-cell" style:parent-style-name="Default">
      <style:table-cell-properties fo:background-color="#ffd8ce"/>
    </style:style>
    <style:style style:name="ce74" style:family="table-cell" style:parent-style-name="Default">
      <style:table-cell-properties fo:background-color="#ffffd7"/>
    </style:style>
    <style:style style:name="ce75" style:family="table-cell" style:parent-style-name="Default">
      <style:table-cell-properties fo:background-color="#ffd7d7"/>
    </style:style>
    <style:style style:name="ce76" style:family="table-cell" style:parent-style-name="Default">
      <style:table-cell-properties fo:background-color="#ff8000"/>
    </style:style>
    <style:style style:name="ce77" style:family="table-cell" style:parent-style-name="Default">
      <style:table-cell-properties fo:wrap-option="wrap"/>
      <style:text-properties style:use-window-font-color="true" style:text-outline="false" style:text-line-through-style="none" style:text-line-through-type="none" style:font-name="Liberation Serif" fo:font-size="10pt" fo:language="de" fo:country="CH"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8" style:family="table-cell" style:parent-style-name="Default">
      <style:table-cell-properties fo:background-color="transparent" fo:wrap-option="wrap"/>
      <style:text-properties style:use-window-font-color="true" style:text-outline="false" style:text-line-through-style="none" style:text-line-through-type="none" style:font-name="Liberation Serif" fo:font-size="10pt" fo:language="de" fo:country="CH"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9" style:family="table-cell" style:parent-style-name="Default">
      <style:table-cell-properties fo:wrap-option="wrap"/>
    </style:style>
    <style:style style:name="ce80" style:family="table-cell" style:parent-style-name="Default">
      <style:table-cell-properties fo:background-color="transparent" fo:wrap-option="wrap"/>
    </style:style>
    <style:style style:name="ce81" style:family="table-cell" style:parent-style-name="Default">
      <style:table-cell-properties fo:background-color="#dee6ef" fo:wrap-option="wrap"/>
    </style:style>
    <style:style style:name="ce82" style:family="table-cell" style:parent-style-name="Default">
      <style:table-cell-properties fo:background-color="#ffd8ce" fo:wrap-option="wrap"/>
    </style:style>
    <style:style style:name="ce83" style:family="table-cell" style:parent-style-name="Default">
      <style:table-cell-properties fo:background-color="#ffffd7" fo:wrap-option="wrap"/>
    </style:style>
    <style:style style:name="ce84" style:family="table-cell" style:parent-style-name="Default">
      <style:table-cell-properties fo:background-color="#ffd7d7" fo:wrap-option="wrap"/>
    </style:style>
    <style:style style:name="ce85" style:family="table-cell" style:parent-style-name="Default">
      <style:table-cell-properties fo:background-color="#ff8000" fo:wrap-option="wrap"/>
    </style:style>
    <style:style style:name="ce86" style:family="table-cell" style:parent-style-name="Default">
      <style:table-cell-properties fo:wrap-option="wrap" style:vertical-align="automatic"/>
    </style:style>
    <style:style style:name="ce87" style:family="table-cell" style:parent-style-name="Default">
      <style:table-cell-properties style:text-align-source="fix" style:repeat-content="false" style:vertical-align="top"/>
      <style:paragraph-properties fo:text-align="start" fo:margin-left="0cm"/>
    </style:style>
    <style:style style:name="ce88" style:family="table-cell" style:parent-style-name="Default">
      <style:table-cell-properties style:text-align-source="fix" style:repeat-content="false" fo:wrap-option="wrap" style:vertical-align="top"/>
      <style:paragraph-properties fo:text-align="start" fo:margin-left="0cm"/>
    </style:style>
    <style:style style:name="ce89" style:family="table-cell" style:parent-style-name="Default">
      <style:table-cell-properties style:text-align-source="fix" style:repeat-content="false" fo:background-color="transparent" fo:wrap-option="wrap" style:vertical-align="top"/>
      <style:paragraph-properties fo:text-align="start" fo:margin-left="0cm"/>
    </style:style>
    <style:style style:name="ce90" style:family="table-cell" style:parent-style-name="Default">
      <style:table-cell-properties fo:background-color="#dee6ef" style:text-align-source="fix" style:repeat-content="false" fo:wrap-option="wrap" style:vertical-align="top"/>
      <style:paragraph-properties fo:text-align="start" fo:margin-left="0cm"/>
    </style:style>
    <style:style style:name="ce91" style:family="table-cell" style:parent-style-name="Default">
      <style:table-cell-properties fo:background-color="#ffd8ce" style:text-align-source="fix" style:repeat-content="false" fo:wrap-option="wrap" style:vertical-align="top"/>
      <style:paragraph-properties fo:text-align="start" fo:margin-left="0cm"/>
    </style:style>
    <style:style style:name="ce92" style:family="table-cell" style:parent-style-name="Default">
      <style:table-cell-properties fo:background-color="#ffffd7" style:text-align-source="fix" style:repeat-content="false" fo:wrap-option="wrap" style:vertical-align="top"/>
      <style:paragraph-properties fo:text-align="start" fo:margin-left="0cm"/>
    </style:style>
    <style:style style:name="ce93" style:family="table-cell" style:parent-style-name="Default">
      <style:table-cell-properties fo:background-color="#ffd7d7" style:text-align-source="fix" style:repeat-content="false" fo:wrap-option="wrap" style:vertical-align="top"/>
      <style:paragraph-properties fo:text-align="start" fo:margin-left="0cm"/>
    </style:style>
    <style:style style:name="ce94" style:family="table-cell" style:parent-style-name="Default">
      <style:table-cell-properties fo:background-color="#ff8000" style:text-align-source="fix" style:repeat-content="false" fo:wrap-option="wrap" style:vertical-align="top"/>
      <style:paragraph-properties fo:text-align="start" fo:margin-left="0cm"/>
    </style:style>
    <style:style style:name="ce95" style:family="table-cell" style:parent-style-name="Default" style:data-style-name="N1">
      <style:table-cell-properties fo:background-color="#ffd7d7"/>
    </style:style>
    <style:style style:name="ce96" style:family="table-cell" style:parent-style-name="Default" style:data-style-name="N1"/>
    <style:style style:name="ce97" style:family="table-cell" style:parent-style-name="Default" style:data-style-name="N1">
      <style:table-cell-properties fo:background-color="transparent"/>
    </style:style>
    <style:style style:name="ce98" style:family="table-cell" style:parent-style-name="Default" style:data-style-name="N1">
      <style:table-cell-properties fo:background-color="#ff8000"/>
    </style:style>
    <style:style style:name="ce99" style:family="table-cell" style:parent-style-name="Default" style:data-style-name="N122"/>
    <style:style style:name="ce30" style:family="table-cell" style:parent-style-name="Default" style:data-style-name="N122">
      <style:table-cell-properties fo:background-color="transparent"/>
    </style:style>
    <style:style style:name="ce32" style:family="table-cell" style:parent-style-name="Default" style:data-style-name="N122">
      <style:table-cell-properties fo:background-color="#dee6ef"/>
    </style:style>
    <style:style style:name="ce34" style:family="table-cell" style:parent-style-name="Default" style:data-style-name="N122">
      <style:table-cell-properties fo:background-color="#ffd8ce"/>
    </style:style>
    <style:style style:name="ce36" style:family="table-cell" style:parent-style-name="Default" style:data-style-name="N122">
      <style:table-cell-properties fo:background-color="#ffffd7"/>
    </style:style>
    <style:style style:name="ce104" style:family="table-cell" style:parent-style-name="Default" style:data-style-name="N122">
      <style:table-cell-properties fo:background-color="#ffd7d7"/>
    </style:style>
    <style:style style:name="ce105" style:family="table-cell" style:parent-style-name="Default" style:data-style-name="N122">
      <style:table-cell-properties fo:background-color="#ff8000"/>
    </style:style>
  </office:automatic-styles>
  <office:body>
    <office:spreadsheet>
      <table:calculation-settings table:automatic-find-labels="false" table:use-regular-expressions="false" table:use-wildcards="true" table:null-year="1950"/>
      <table:table table:name="Tabelle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79"/>
        <table:table-column table:style-name="co6" table:visibility="collapse" table:default-cell-style-name="Default"/>
        <table:table-column table:style-name="co7" table:visibility="collapse" table:default-cell-style-name="Default"/>
        <table:table-column table:style-name="co8" table:default-cell-style-name="Default"/>
        <table:table-column table:style-name="co9" table:default-cell-style-name="ce87"/>
        <table:table-column table:style-name="co10" table:default-cell-style-name="Default"/>
        <table:table-column table:style-name="co1" table:default-cell-style-name="Default"/>
        <table:table-column table:style-name="co11" table:default-cell-style-name="Default"/>
        <table:table-column table:style-name="co12" table:number-columns-repeated="3" table:default-cell-style-name="Default"/>
        <table:table-column table:style-name="co13" table:default-cell-style-name="ce71"/>
        <table:table-column table:style-name="co10" table:default-cell-style-name="Default"/>
        <table:table-column table:style-name="co1" table:default-cell-style-name="Default"/>
        <table:table-column table:style-name="co1" table:number-columns-repeated="16366"/>
        <table:table-row table:style-name="ro1">
          <table:table-cell office:value-type="string" calcext:value-type="string">
            <text:p>dataset(id)</text:p>
          </table:table-cell>
          <table:table-cell office:value-type="string" calcext:value-type="string">
            <text:p>id_db</text:p>
          </table:table-cell>
          <table:table-cell office:value-type="string" calcext:value-type="string">
            <text:p>description_short</text:p>
          </table:table-cell>
          <table:table-cell office:value-type="string" calcext:value-type="string">
            <text:p>keyword(synonyms)</text:p>
          </table:table-cell>
          <table:table-cell office:value-type="string" calcext:value-type="string">
            <text:p>description_full</text:p>
          </table:table-cell>
          <table:table-cell table:number-columns-repeated="2" office:value-type="string" calcext:value-type="string">
            <text:p>dataset(description)</text:p>
          </table:table-cell>
          <table:table-cell office:value-type="string" calcext:value-type="string">
            <text:p>segmented_word</text:p>
          </table:table-cell>
          <table:table-cell office:value-type="string" calcext:value-type="string">
            <text:p>dataset(title,description)</text:p>
          </table:table-cell>
          <table:table-cell office:value-type="string" calcext:value-type="string">
            <text:p>success_a</text:p>
          </table:table-cell>
          <table:table-cell office:value-type="string" calcext:value-type="string">
            <text:p>failure_b</text:p>
          </table:table-cell>
          <table:table-cell office:value-type="string" calcext:value-type="string">
            <text:p>failure_c</text:p>
          </table:table-cell>
          <table:table-cell office:value-type="string" calcext:value-type="string">
            <text:p>failure_d</text:p>
          </table:table-cell>
          <table:table-cell office:value-type="string" calcext:value-type="string">
            <text:p>failure_e</text:p>
          </table:table-cell>
          <table:table-cell office:value-type="string" calcext:value-type="string">
            <text:p>completion_time</text:p>
          </table:table-cell>
          <table:table-cell office:value-type="string" calcext:value-type="string">
            <text:p>category</text:p>
          </table:table-cell>
          <table:table-cell office:value-type="string" calcext:value-type="string">
            <text:p>WER_score</text:p>
          </table:table-cell>
          <table:table-cell/>
          <table:table-cell table:style-name="Default" table:number-columns-repeated="16366"/>
        </table:table-row>
        <table:table-row table:style-name="ro1">
          <table:table-cell office:value-type="float" office:value="1" calcext:value-type="float">
            <text:p>1</text:p>
          </table:table-cell>
          <table:table-cell office:value-type="string" calcext:value-type="string">
            <text:p>2fe19aa2-2456-42a0-9821-7fc07c00b1ff</text:p>
          </table:table-cell>
          <table:table-cell office:value-type="string" calcext:value-type="string">
            <text:p>torn garbage bags</text:p>
          </table:table-cell>
          <table:table-cell office:value-type="string" calcext:value-type="string">
            <text:p>torn garbage bags,garbage bags,bags,refuse</text:p>
          </table:table-cell>
          <table:table-cell office:value-type="string" calcext:value-type="string">
            <text:p><text:s/>Aufgerissene Abfallsäcke</text:p>
          </table:table-cell>
          <table:table-cell office:value-type="string" calcext:value-type="string">
            <text:p>Aufgerissene Abfallsäcke</text:p>
          </table:table-cell>
          <table:table-cell table:style-name="ce79"/>
          <table:table-cell table:style-name="ce79" office:value-type="string" calcext:value-type="string">
            <text:p>a torn garbage bags</text:p>
          </table:table-cell>
          <table:table-cell table:style-name="ce88" table:formula="of:=[.F2]&amp;&quot; &quot;&amp;[.G2]" office:value-type="string" office:string-value="Aufgerissene Abfallsäcke " calcext:value-type="string">
            <text:p>Aufgerissene Abfallsäcke </text:p>
          </table:table-cell>
          <table:table-cell office:value-type="string" calcext:value-type="string">
            <text:p>x</text:p>
          </table:table-cell>
          <table:table-cell table:number-columns-repeated="4"/>
          <table:table-cell office:value-type="float" office:value="120" calcext:value-type="float">
            <text:p>120</text:p>
          </table:table-cell>
          <table:table-cell office:value-type="string" calcext:value-type="string">
            <text:p>Abfall</text:p>
          </table:table-cell>
          <table:table-cell table:style-name="ce99" office:value-type="float" office:value="0" calcext:value-type="float">
            <text:p>0.000</text:p>
          </table:table-cell>
          <table:table-cell/>
          <table:table-cell table:style-name="Default" table:number-columns-repeated="16366"/>
        </table:table-row>
        <table:table-row table:style-name="ro2">
          <table:table-cell office:value-type="float" office:value="2" calcext:value-type="float">
            <text:p>2</text:p>
          </table:table-cell>
          <table:table-cell office:value-type="string" calcext:value-type="string">
            <text:p>5969b4ed-8c11-4988-9584-09c98a67dceb</text:p>
          </table:table-cell>
          <table:table-cell office:value-type="string" calcext:value-type="string">
            <text:p>clothes bags</text:p>
          </table:table-cell>
          <table:table-cell office:value-type="string" calcext:value-type="string">
            <text:p>clothes bags,clothing sacks,container,sidewalk,people</text:p>
          </table:table-cell>
          <table:table-cell office:value-type="string" calcext:value-type="string">
            <text:p><text:s/>Kleider mutwillig entsorgt. An der Kolumbanstraße 48 hat es bis circa vor vier Wochen einen Altkleidercontainer. Gestern Abend liefen zwei Personen mit drei Kleidersäcke zu diesem. Als sie bemerkten, dass dieser nicht mehr da war, hielten sie an und diskutierten zusammen. Anschliesslich entscheiden sie sich mutwillig und bewusst die Kleidungssäcke dort zu entsorgen auf den schulterpflichtbewussten St. Galler Steuerzahler. Ich bitte die Stadt um eine Entsorgung. Vielen Dank.</text:p>
          </table:table-cell>
          <table:table-cell office:value-type="string" calcext:value-type="string">
            <text:p>Kleider mutwillig <text:s/>entsorgt</text:p>
          </table:table-cell>
          <table:table-cell table:style-name="ce79" office:value-type="string" calcext:value-type="string">
            <text:p>An der Kolumbanstrasse 48 hatte es bis ca. vor 4 Wochen einen Altkleidercontainer. Gestern Abend liefen 2 Personen mit 3 Kleidersäcken zu diesem. Als sie bemerkten das diessr nicht mehr da war hielten sie an und diskutierten zusammen. Anschliessend entschieden sie sich mutwillig und bewusst diese Kleidersäcke dort zu entsorgen auf Schultern der pflichtbewussten St.Galler Steuerzahler. Ich bitte die Stadt um eine entsprechende Entsorgung. Vielen Dank</text:p>
          </table:table-cell>
          <table:table-cell table:style-name="ce79" office:value-type="string" calcext:value-type="string">
            <text:p>a container</text:p>
          </table:table-cell>
          <table:table-cell table:style-name="ce88" table:formula="of:=[.F3]&amp;&quot; &quot;&amp;[.G3]" office:value-type="string" office:string-value="Kleider mutwillig  entsorgt An der Kolumbanstrasse 48 hatte es bis ca. vor 4 Wochen einen Altkleidercontainer. Gestern Abend liefen 2 Personen mit 3 Kleidersäcken zu diesem. Als sie bemerkten das diessr nicht mehr da war hielten sie an und diskutierten zusammen. Anschliessend entschieden sie sich mutwillig und bewusst diese Kleidersäcke dort zu entsorgen auf Schultern der pflichtbewussten St.Galler Steuerzahler. Ich bitte die Stadt um eine entsprechende Entsorgung. Vielen Dank" calcext:value-type="string">
            <text:p>Kleider mutwillig <text:s/>entsorgt An der Kolumbanstrasse 48 hatte es bis ca. vor 4 Wochen einen Altkleidercontainer. Gestern Abend liefen 2 Personen mit 3 Kleidersäcken zu diesem. Als sie bemerkten das diessr nicht mehr da war hielten sie an und diskutierten zusammen. Anschliessend entschieden sie sich mutwillig und bewusst diese Kleidersäcke dort zu entsorgen auf Schultern der pflichtbewussten St.Galler Steuerzahler. Ich bitte die Stadt um eine entsprechende Entsorgung. Vielen Dank</text:p>
          </table:table-cell>
          <table:table-cell table:number-columns-repeated="2"/>
          <table:table-cell office:value-type="string" calcext:value-type="string">
            <text:p>x</text:p>
          </table:table-cell>
          <table:table-cell table:number-columns-repeated="2"/>
          <table:table-cell office:value-type="float" office:value="292" calcext:value-type="float">
            <text:p>292</text:p>
          </table:table-cell>
          <table:table-cell office:value-type="string" calcext:value-type="string">
            <text:p>Abfall</text:p>
          </table:table-cell>
          <table:table-cell table:style-name="ce99" office:value-type="float" office:value="0.318840579710145" calcext:value-type="float">
            <text:p>0.319</text:p>
          </table:table-cell>
          <table:table-cell/>
          <table:table-cell table:style-name="Default" table:number-columns-repeated="16366"/>
        </table:table-row>
        <table:table-row table:style-name="ro3">
          <table:table-cell office:value-type="float" office:value="3" calcext:value-type="float">
            <text:p>3</text:p>
          </table:table-cell>
          <table:table-cell office:value-type="string" calcext:value-type="string">
            <text:p>7ba95b70-100e-4ad7-8a1b-34b9d7111147</text:p>
          </table:table-cell>
          <table:table-cell office:value-type="string" calcext:value-type="string">
            <text:p>shards</text:p>
          </table:table-cell>
          <table:table-cell office:value-type="string" calcext:value-type="string">
            <text:p>shards,glass shards,surface,path,sidewalk</text:p>
          </table:table-cell>
          <table:table-cell office:value-type="string" calcext:value-type="string">
            <text:p><text:s/>Scherben bei Einfahrt 3 Lindengässlein. Es liegt am oberen Teil des Weges eine grosse Scherbenfläche.</text:p>
          </table:table-cell>
          <table:table-cell office:value-type="string" calcext:value-type="string">
            <text:p>Scherben bei Einfahrt Dreilindengässlein</text:p>
          </table:table-cell>
          <table:table-cell table:style-name="ce79" office:value-type="string" calcext:value-type="string">
            <text:p>Es liegt am oberen Teil des Weges eine grosse Scherbenfläche.</text:p>
          </table:table-cell>
          <table:table-cell table:style-name="ce79" office:value-type="string" calcext:value-type="string">
            <text:p>a surface</text:p>
          </table:table-cell>
          <table:table-cell table:style-name="ce88" table:formula="of:=[.F4]&amp;&quot; &quot;&amp;[.G4]" office:value-type="string" office:string-value="Scherben bei Einfahrt Dreilindengässlein Es liegt am oberen Teil des Weges eine grosse Scherbenfläche." calcext:value-type="string">
            <text:p>Scherben bei Einfahrt Dreilindengässlein Es liegt am oberen Teil des Weges eine grosse Scherbenfläche.</text:p>
          </table:table-cell>
          <table:table-cell table:number-columns-repeated="4"/>
          <table:table-cell office:value-type="string" calcext:value-type="string">
            <text:p>x</text:p>
          </table:table-cell>
          <table:table-cell office:value-type="float" office:value="190" calcext:value-type="float">
            <text:p>190</text:p>
          </table:table-cell>
          <table:table-cell office:value-type="string" calcext:value-type="string">
            <text:p>Abfall</text:p>
          </table:table-cell>
          <table:table-cell table:style-name="ce99" office:value-type="float" office:value="0.142857142857143" calcext:value-type="float">
            <text:p>0.143</text:p>
          </table:table-cell>
          <table:table-cell/>
          <table:table-cell table:style-name="Default" table:number-columns-repeated="16366"/>
        </table:table-row>
        <table:table-row table:style-name="ro1">
          <table:table-cell office:value-type="float" office:value="4" calcext:value-type="float">
            <text:p>4</text:p>
          </table:table-cell>
          <table:table-cell office:value-type="string" calcext:value-type="string">
            <text:p>de9621c1-ae2d-414d-a983-f7283b7df2d9</text:p>
          </table:table-cell>
          <table:table-cell office:value-type="string" calcext:value-type="string">
            <text:p>garbage pile</text:p>
          </table:table-cell>
          <table:table-cell office:value-type="string" calcext:value-type="string">
            <text:p>garbage pile,waste,refuse,pile</text:p>
          </table:table-cell>
          <table:table-cell office:value-type="string" calcext:value-type="string">
            <text:p><text:s/>Abfallberg bis Freitag</text:p>
          </table:table-cell>
          <table:table-cell office:value-type="string" calcext:value-type="string">
            <text:p>Abfallberg bis Freitag</text:p>
          </table:table-cell>
          <table:table-cell table:style-name="ce79"/>
          <table:table-cell table:style-name="ce79" office:value-type="string" calcext:value-type="string">
            <text:p>a garbage pile</text:p>
          </table:table-cell>
          <table:table-cell table:style-name="ce88" table:formula="of:=[.F5]&amp;&quot; &quot;&amp;[.G5]" office:value-type="string" office:string-value="Abfallberg bis Freitag " calcext:value-type="string">
            <text:p>Abfallberg bis Freitag </text:p>
          </table:table-cell>
          <table:table-cell office:value-type="string" calcext:value-type="string">
            <text:p>x</text:p>
          </table:table-cell>
          <table:table-cell table:number-columns-repeated="4"/>
          <table:table-cell office:value-type="float" office:value="123" calcext:value-type="float">
            <text:p>123</text:p>
          </table:table-cell>
          <table:table-cell office:value-type="string" calcext:value-type="string">
            <text:p>Abfall</text:p>
          </table:table-cell>
          <table:table-cell table:style-name="ce99" office:value-type="float" office:value="0" calcext:value-type="float">
            <text:p>0.000</text:p>
          </table:table-cell>
          <table:table-cell/>
          <table:table-cell table:style-name="Default" table:number-columns-repeated="16366"/>
        </table:table-row>
        <table:table-row table:style-name="ro4">
          <table:table-cell office:value-type="float" office:value="5" calcext:value-type="float">
            <text:p>5</text:p>
          </table:table-cell>
          <table:table-cell office:value-type="string" calcext:value-type="string">
            <text:p>91addc15-7331-4f92-8d03-1ef32b32e8eb</text:p>
          </table:table-cell>
          <table:table-cell office:value-type="string" calcext:value-type="string">
            <text:p>garbage bag</text:p>
          </table:table-cell>
          <table:table-cell office:value-type="string" calcext:value-type="string">
            <text:p>garbage bag,bags,trash,residents,properties</text:p>
          </table:table-cell>
          <table:table-cell office:value-type="string" calcext:value-type="string">
            <text:p><text:s/>Abfallsack. Schon wieder liegt ein Abfallsack am Fuße der Falkenburgtreppe. Säcke und andere Müll finden sich da fast täglich. Es wäre schön, wenn Sie die Verursacher ermitteln könnten. Potenziell kommen die Bewohner von zwei Liegenschaften in Frage und diesen Missstand dann nachhaltig beheben.</text:p>
          </table:table-cell>
          <table:table-cell office:value-type="string" calcext:value-type="string">
            <text:p>Abfallsack</text:p>
          </table:table-cell>
          <table:table-cell table:style-name="ce79" office:value-type="string" calcext:value-type="string">
            <text:p>Schon wieder liegt ein Abgallsack am Fusse der Falkenburg Treppe. Säcke und anderer Müll finden sich da fast täglich es wäre schön, wenn Sie den Verursacher emitteln könnten (Potentiell Kommen die Bewohner von zwei Liegenschaften infrage) und diesen Missstand dann nachhaltig beheben.</text:p>
          </table:table-cell>
          <table:table-cell table:style-name="ce79" office:value-type="string" calcext:value-type="string">
            <text:p>a garbage bag</text:p>
          </table:table-cell>
          <table:table-cell table:style-name="ce88" table:formula="of:=[.F6]&amp;&quot; &quot;&amp;[.G6]" office:value-type="string" office:string-value="Abfallsack Schon wieder liegt ein Abgallsack am Fusse der Falkenburg Treppe. Säcke und anderer Müll finden sich da fast täglich es wäre schön, wenn Sie den Verursacher emitteln könnten (Potentiell Kommen die Bewohner von zwei Liegenschaften infrage) und diesen Missstand dann nachhaltig beheben." calcext:value-type="string">
            <text:p>Abfallsack Schon wieder liegt ein Abgallsack am Fusse der Falkenburg Treppe. Säcke und anderer Müll finden sich da fast täglich es wäre schön, wenn Sie den Verursacher emitteln könnten (Potentiell Kommen die Bewohner von zwei Liegenschaften infrage) und diesen Missstand dann nachhaltig beheben.</text:p>
          </table:table-cell>
          <table:table-cell office:value-type="string" calcext:value-type="string">
            <text:p>x</text:p>
          </table:table-cell>
          <table:table-cell table:number-columns-repeated="4"/>
          <table:table-cell office:value-type="float" office:value="221" calcext:value-type="float">
            <text:p>221</text:p>
          </table:table-cell>
          <table:table-cell office:value-type="string" calcext:value-type="string">
            <text:p>Abfall</text:p>
          </table:table-cell>
          <table:table-cell table:style-name="ce99" office:value-type="float" office:value="0.348837209302326" calcext:value-type="float">
            <text:p>0.349</text:p>
          </table:table-cell>
          <table:table-cell/>
          <table:table-cell table:style-name="Default" table:number-columns-repeated="16366"/>
        </table:table-row>
        <table:table-row table:style-name="ro3">
          <table:table-cell office:value-type="float" office:value="6" calcext:value-type="float">
            <text:p>6</text:p>
          </table:table-cell>
          <table:table-cell office:value-type="string" calcext:value-type="string">
            <text:p>c8f0a667-d571-4c2e-86c7-f63317a558ce</text:p>
          </table:table-cell>
          <table:table-cell office:value-type="string" calcext:value-type="string">
            <text:p>container</text:p>
          </table:table-cell>
          <table:table-cell office:value-type="string" calcext:value-type="string">
            <text:p>container,underfloor container,container</text:p>
          </table:table-cell>
          <table:table-cell office:value-type="string" calcext:value-type="string">
            <text:p><text:s/>Unterflur-Container komplett überfüllt. Guten Tag, der Unterflur-Container ist wieder einmal komplett überfüllt.</text:p>
          </table:table-cell>
          <table:table-cell office:value-type="string" calcext:value-type="string">
            <text:p>Unterflurcontainer komplett überfüllt</text:p>
          </table:table-cell>
          <table:table-cell table:style-name="ce79" office:value-type="string" calcext:value-type="string">
            <text:p>Guten Tag Der Unterflurcontainer ist wieder einmal komplett überfüllt.</text:p>
          </table:table-cell>
          <table:table-cell table:style-name="ce79" office:value-type="string" calcext:value-type="string">
            <text:p>a container</text:p>
          </table:table-cell>
          <table:table-cell table:style-name="ce88" table:formula="of:=[.F7]&amp;&quot; &quot;&amp;[.G7]" office:value-type="string" office:string-value="Unterflurcontainer komplett überfüllt Guten Tag Der Unterflurcontainer ist wieder einmal komplett überfüllt." calcext:value-type="string">
            <text:p>Unterflurcontainer komplett überfüllt Guten Tag Der Unterflurcontainer ist wieder einmal komplett überfüllt.</text:p>
          </table:table-cell>
          <table:table-cell office:value-type="string" calcext:value-type="string">
            <text:p>x</text:p>
          </table:table-cell>
          <table:table-cell table:number-columns-repeated="4"/>
          <table:table-cell office:value-type="float" office:value="200" calcext:value-type="float">
            <text:p>200</text:p>
          </table:table-cell>
          <table:table-cell office:value-type="string" calcext:value-type="string">
            <text:p>Abfall</text:p>
          </table:table-cell>
          <table:table-cell table:style-name="ce99" office:value-type="float" office:value="0.416666666666667" calcext:value-type="float">
            <text:p>0.417</text:p>
          </table:table-cell>
          <table:table-cell/>
          <table:table-cell table:style-name="Default" table:number-columns-repeated="16366"/>
        </table:table-row>
        <table:table-row table:style-name="ro5">
          <table:table-cell office:value-type="float" office:value="7" calcext:value-type="float">
            <text:p>7</text:p>
          </table:table-cell>
          <table:table-cell office:value-type="string" calcext:value-type="string">
            <text:p>a6e79aa7-252a-483a-b641-e2561fe1e7d2</text:p>
          </table:table-cell>
          <table:table-cell office:value-type="string" calcext:value-type="string">
            <text:p>trash</text:p>
          </table:table-cell>
          <table:table-cell office:value-type="string" calcext:value-type="string">
            <text:p>trash,garbage,people,cameras,signs</text:p>
          </table:table-cell>
          <table:table-cell office:value-type="string" calcext:value-type="string">
            <text:p><text:s/>Kein schöner Anblick über die Osterfeiertage. Es ist wirklich unschön, wie manche Menschen einfach ihren Müll entsorgen. Ich denke hier wird der Sünder wohl kaum gefunden. Kameras oder Schilder wären hilfreich.</text:p>
          </table:table-cell>
          <table:table-cell office:value-type="string" calcext:value-type="string">
            <text:p>Kein schöner Anblick über die Osterfeiertage !!</text:p>
          </table:table-cell>
          <table:table-cell table:style-name="ce79" office:value-type="string" calcext:value-type="string">
            <text:p>Es ist wirklich sehr unschön, wie manche Menschen einfach ihren Müll entsorgen. Ich denke, hier wird der Sünder wohl kaum gefunden. Kameras oder Schilder wären hilfreich..</text:p>
          </table:table-cell>
          <table:table-cell table:style-name="ce79" office:value-type="string" calcext:value-type="string">
            <text:p>a trash</text:p>
          </table:table-cell>
          <table:table-cell table:style-name="ce88" table:formula="of:=[.F8]&amp;&quot; &quot;&amp;[.G8]" office:value-type="string" office:string-value="Kein schöner Anblick über die Osterfeiertage !! Es ist wirklich sehr unschön, wie manche Menschen einfach ihren Müll entsorgen. Ich denke, hier wird der Sünder wohl kaum gefunden. Kameras oder Schilder wären hilfreich.." calcext:value-type="string">
            <text:p>Kein schöner Anblick über die Osterfeiertage !! Es ist wirklich sehr unschön, wie manche Menschen einfach ihren Müll entsorgen. Ich denke, hier wird der Sünder wohl kaum gefunden. Kameras oder Schilder wären hilfreich..</text:p>
          </table:table-cell>
          <table:table-cell office:value-type="string" calcext:value-type="string">
            <text:p>x</text:p>
          </table:table-cell>
          <table:table-cell table:number-columns-repeated="4"/>
          <table:table-cell office:value-type="float" office:value="138" calcext:value-type="float">
            <text:p>138</text:p>
          </table:table-cell>
          <table:table-cell office:value-type="string" calcext:value-type="string">
            <text:p>Abfall</text:p>
          </table:table-cell>
          <table:table-cell table:style-name="ce99" office:value-type="float" office:value="0.151515151515152" calcext:value-type="float">
            <text:p>0.152</text:p>
          </table:table-cell>
          <table:table-cell/>
          <table:table-cell table:style-name="Default" table:number-columns-repeated="16366"/>
        </table:table-row>
        <table:table-row table:style-name="ro6">
          <table:table-cell office:value-type="float" office:value="8" calcext:value-type="float">
            <text:p>8</text:p>
          </table:table-cell>
          <table:table-cell office:value-type="string" calcext:value-type="string">
            <text:p>63ca28f2-1798-4a4b-97a9-81897f86faa8</text:p>
          </table:table-cell>
          <table:table-cell office:value-type="string" calcext:value-type="string">
            <text:p>children's chairs</text:p>
          </table:table-cell>
          <table:table-cell office:value-type="string" calcext:value-type="string">
            <text:p>children's chairs,stools,furniture,chairs</text:p>
          </table:table-cell>
          <table:table-cell office:value-type="string" calcext:value-type="string">
            <text:p><text:s/>Abfallkinderstühle wurden demoliert, zurückgelassen.</text:p>
          </table:table-cell>
          <table:table-cell office:value-type="string" calcext:value-type="string">
            <text:p>Abfall Kinderstühle</text:p>
          </table:table-cell>
          <table:table-cell table:style-name="ce79" office:value-type="string" calcext:value-type="string">
            <text:p>Wurden demoliert zurückgelassen.</text:p>
          </table:table-cell>
          <table:table-cell table:style-name="ce79" office:value-type="string" calcext:value-type="string">
            <text:p>null</text:p>
          </table:table-cell>
          <table:table-cell table:style-name="ce88" table:formula="of:=[.F9]&amp;&quot; &quot;&amp;[.G9]" office:value-type="string" office:string-value="Abfall Kinderstühle Wurden demoliert zurückgelassen." calcext:value-type="string">
            <text:p>Abfall Kinderstühle Wurden demoliert zurückgelassen.</text:p>
          </table:table-cell>
          <table:table-cell table:number-columns-repeated="4"/>
          <table:table-cell office:value-type="string" calcext:value-type="string">
            <text:p>x</text:p>
          </table:table-cell>
          <table:table-cell office:value-type="float" office:value="93" calcext:value-type="float">
            <text:p>93</text:p>
          </table:table-cell>
          <table:table-cell office:value-type="string" calcext:value-type="string">
            <text:p>Abfall</text:p>
          </table:table-cell>
          <table:table-cell table:style-name="ce99" office:value-type="float" office:value="0.8" calcext:value-type="float">
            <text:p>0.800</text:p>
          </table:table-cell>
          <table:table-cell/>
          <table:table-cell table:style-name="Default" table:number-columns-repeated="16366"/>
        </table:table-row>
        <table:table-row table:style-name="ro7">
          <table:table-cell office:value-type="float" office:value="9" calcext:value-type="float">
            <text:p>9</text:p>
          </table:table-cell>
          <table:table-cell office:value-type="string" calcext:value-type="string">
            <text:p>938565a0-0a06-4d13-9559-aebf8f586bac</text:p>
          </table:table-cell>
          <table:table-cell office:value-type="string" calcext:value-type="string">
            <text:p>furniture</text:p>
          </table:table-cell>
          <table:table-cell office:value-type="string" calcext:value-type="string">
            <text:p>furniture,waste,containers,building,apartment building</text:p>
          </table:table-cell>
          <table:table-cell office:value-type="string" calcext:value-type="string">
            <text:p><text:s/>Wiederholt Möbel an der neuen Liegenschaft. Grüezi miteinander. Mir ist aufgefallen, dass an der neuen Liegenschaft Langgasse 74, die neu erstellt wurde, extrem viel Abfall und Möbel an den Niederflurcontainern entsorgt wird. Danke für die Kenntnisnahme.</text:p>
          </table:table-cell>
          <table:table-cell office:value-type="string" calcext:value-type="string">
            <text:p>Wiederholt Möbel an der neuen Liegenschaft</text:p>
          </table:table-cell>
          <table:table-cell table:style-name="ce79" office:value-type="string" calcext:value-type="string">
            <text:p>Grüezi mitenand, mir ist aufgefallen, dass an der Liegenschaft Langgasse 74 ,die neu erstellt wurde, extrem viel Abfall und Möbel an den Niederflurcontainer entsorgt wird. Danke für die Kenntnisnahme.</text:p>
          </table:table-cell>
          <table:table-cell office:value-type="string" calcext:value-type="string">
            <text:p>a waste</text:p>
          </table:table-cell>
          <table:table-cell table:style-name="ce88" table:formula="of:=[.F10]&amp;&quot; &quot;&amp;[.G10]" office:value-type="string" office:string-value="Wiederholt Möbel an der neuen Liegenschaft Grüezi mitenand, mir ist aufgefallen, dass an der Liegenschaft Langgasse 74 ,die neu erstellt wurde, extrem viel Abfall und Möbel an den Niederflurcontainer entsorgt wird. Danke für die Kenntnisnahme." calcext:value-type="string">
            <text:p>Wiederholt Möbel an der neuen Liegenschaft Grüezi mitenand, mir ist aufgefallen, dass an der Liegenschaft Langgasse 74 ,die neu erstellt wurde, extrem viel Abfall und Möbel an den Niederflurcontainer entsorgt wird. Danke für die Kenntnisnahme.</text:p>
          </table:table-cell>
          <table:table-cell office:value-type="string" calcext:value-type="string">
            <text:p>x</text:p>
          </table:table-cell>
          <table:table-cell table:number-columns-repeated="4"/>
          <table:table-cell office:value-type="float" office:value="100" calcext:value-type="float">
            <text:p>100</text:p>
          </table:table-cell>
          <table:table-cell office:value-type="string" calcext:value-type="string">
            <text:p>Abfall</text:p>
          </table:table-cell>
          <table:table-cell table:style-name="ce99" office:value-type="float" office:value="0.2" calcext:value-type="float">
            <text:p>0.200</text:p>
          </table:table-cell>
          <table:table-cell/>
          <table:table-cell table:style-name="Default" table:number-columns-repeated="16366"/>
        </table:table-row>
        <table:table-row table:style-name="ro8">
          <table:table-cell office:value-type="float" office:value="10" calcext:value-type="float">
            <text:p>10</text:p>
          </table:table-cell>
          <table:table-cell office:value-type="string" calcext:value-type="string">
            <text:p>44f4751a-bd63-4701-bfa1-a79607f9d8fb</text:p>
          </table:table-cell>
          <table:table-cell office:value-type="string" calcext:value-type="string">
            <text:p>sacks</text:p>
          </table:table-cell>
          <table:table-cell office:value-type="string" calcext:value-type="string">
            <text:p>sacks,waste bags,property,restaurant,disposal</text:p>
          </table:table-cell>
          <table:table-cell office:value-type="string" calcext:value-type="string">
            <text:p><text:s/>Illegale Entsorgung. Bei den Abbruchliegenschaften wird munter weiter illegal entsorgt. Auch bei den ehemaligen Restaurant Grütli, Rittobelstrasse, werden die Säcke trotz Hinweise der Verwaltung schon einen Tag nach der Abholung durch das Entsorgungsamt vor der Liegenschaft bereitgestellt. Frohe Festtage und danke an den Controller.</text:p>
          </table:table-cell>
          <table:table-cell office:value-type="string" calcext:value-type="string">
            <text:p>illegale Entsorgung</text:p>
          </table:table-cell>
          <table:table-cell table:style-name="ce79" office:value-type="string" calcext:value-type="string">
            <text:p>Bei den Abbruch Liegenschaften wird munter weiter illegal entsorgt. Auch beim ehemaligen Rest. Grütli ( Rehetobelstrasse) werden die Säcke trotz Hinweis der Verwaltung schon einen Tag nach der Abholung durch das Entsorgungsamt vor die Liegenschaft bereitgestellt. Frohe Festtage und Danke an den Controller.</text:p>
          </table:table-cell>
          <table:table-cell table:style-name="ce79" office:value-type="string" calcext:value-type="string">
            <text:p>a sacks</text:p>
          </table:table-cell>
          <table:table-cell table:style-name="ce88" table:formula="of:=[.F11]&amp;&quot; &quot;&amp;[.G11]" office:value-type="string" office:string-value="illegale Entsorgung Bei den Abbruch Liegenschaften wird munter weiter illegal entsorgt. Auch beim ehemaligen Rest. Grütli ( Rehetobelstrasse) werden die Säcke trotz Hinweis der Verwaltung schon einen Tag nach der Abholung durch das Entsorgungsamt vor die Liegenschaft bereitgestellt. Frohe Festtage und Danke an den Controller." calcext:value-type="string">
            <text:p>illegale Entsorgung Bei den Abbruch Liegenschaften wird munter weiter illegal entsorgt. Auch beim ehemaligen Rest. Grütli ( Rehetobelstrasse) werden die Säcke trotz Hinweis der Verwaltung schon einen Tag nach der Abholung durch das Entsorgungsamt vor die Liegenschaft bereitgestellt. Frohe Festtage und Danke an den Controller.</text:p>
          </table:table-cell>
          <table:table-cell office:value-type="string" calcext:value-type="string">
            <text:p>x</text:p>
          </table:table-cell>
          <table:table-cell table:number-columns-repeated="4"/>
          <table:table-cell office:value-type="float" office:value="246" calcext:value-type="float">
            <text:p>246</text:p>
          </table:table-cell>
          <table:table-cell office:value-type="string" calcext:value-type="string">
            <text:p>Abfall</text:p>
          </table:table-cell>
          <table:table-cell table:style-name="ce99" office:value-type="float" office:value="0.288888888888889" calcext:value-type="float">
            <text:p>0.289</text:p>
          </table:table-cell>
          <table:table-cell/>
          <table:table-cell table:style-name="Default" table:number-columns-repeated="16366"/>
        </table:table-row>
        <table:table-row table:style-name="ro6">
          <table:table-cell office:value-type="float" office:value="11" calcext:value-type="float">
            <text:p>11</text:p>
          </table:table-cell>
          <table:table-cell office:value-type="string" calcext:value-type="string">
            <text:p>9f33a6ec-0ad8-42e7-a85a-f1b2d764d34c</text:p>
          </table:table-cell>
          <table:table-cell office:value-type="string" calcext:value-type="string">
            <text:p>rug</text:p>
          </table:table-cell>
          <table:table-cell office:value-type="string" calcext:value-type="string">
            <text:p>rug,carpet,textile,floor covering</text:p>
          </table:table-cell>
          <table:table-cell office:value-type="string" calcext:value-type="string">
            <text:p><text:s/>Teppich wurde entsorgt. Teppich liegt seit 14 Tagen dort.</text:p>
          </table:table-cell>
          <table:table-cell office:value-type="string" calcext:value-type="string">
            <text:p>Teppich wurde entsorgt</text:p>
          </table:table-cell>
          <table:table-cell table:style-name="ce79" office:value-type="string" calcext:value-type="string">
            <text:p>Teppich liegt seit 14 Tagen dort</text:p>
          </table:table-cell>
          <table:table-cell table:style-name="ce79" office:value-type="string" calcext:value-type="string">
            <text:p>a carpet</text:p>
          </table:table-cell>
          <table:table-cell table:style-name="ce88" table:formula="of:=[.F12]&amp;&quot; &quot;&amp;[.G12]" office:value-type="string" office:string-value="Teppich wurde entsorgt Teppich liegt seit 14 Tagen dort" calcext:value-type="string">
            <text:p>Teppich wurde entsorgt Teppich liegt seit 14 Tagen dort</text:p>
          </table:table-cell>
          <table:table-cell office:value-type="string" calcext:value-type="string">
            <text:p>x</text:p>
          </table:table-cell>
          <table:table-cell table:number-columns-repeated="4"/>
          <table:table-cell office:value-type="float" office:value="141" calcext:value-type="float">
            <text:p>141</text:p>
          </table:table-cell>
          <table:table-cell office:value-type="string" calcext:value-type="string">
            <text:p>Abfall</text:p>
          </table:table-cell>
          <table:table-cell table:style-name="ce99" office:value-type="float" office:value="0.222222222222222" calcext:value-type="float">
            <text:p>0.222</text:p>
          </table:table-cell>
          <table:table-cell/>
          <table:table-cell table:style-name="Default" table:number-columns-repeated="16366"/>
        </table:table-row>
        <table:table-row table:style-name="ro9">
          <table:table-cell office:value-type="float" office:value="12" calcext:value-type="float">
            <text:p>12</text:p>
          </table:table-cell>
          <table:table-cell office:value-type="string" calcext:value-type="string">
            <text:p>21913c01-bf83-40f4-8bfe-3284c4b46232</text:p>
          </table:table-cell>
          <table:table-cell office:value-type="string" calcext:value-type="string">
            <text:p>shopping cart</text:p>
          </table:table-cell>
          <table:table-cell office:value-type="string" calcext:value-type="string">
            <text:p>shopping cart,cart,cart,vehicle</text:p>
          </table:table-cell>
          <table:table-cell office:value-type="string" calcext:value-type="string">
            <text:p><text:s/>mikro einkaufswagen in der rabatte des großen baum steht ein mikro einkaufswagen</text:p>
          </table:table-cell>
          <table:table-cell office:value-type="string" calcext:value-type="string">
            <text:p>Migros-Einkaufswagen</text:p>
          </table:table-cell>
          <table:table-cell table:style-name="ce79" office:value-type="string" calcext:value-type="string">
            <text:p>In der Rabatte des grossen Baums steht ein Migros-Einkaufswagen.</text:p>
          </table:table-cell>
          <table:table-cell table:style-name="ce79" office:value-type="string" calcext:value-type="string">
            <text:p>a vehicle</text:p>
          </table:table-cell>
          <table:table-cell table:style-name="ce88" table:formula="of:=[.F13]&amp;&quot; &quot;&amp;[.G13]" office:value-type="string" office:string-value="Migros-Einkaufswagen In der Rabatte des grossen Baums steht ein Migros-Einkaufswagen." calcext:value-type="string">
            <text:p>Migros-Einkaufswagen In der Rabatte des grossen Baums steht ein Migros-Einkaufswagen.</text:p>
          </table:table-cell>
          <table:table-cell office:value-type="string" calcext:value-type="string">
            <text:p>x</text:p>
          </table:table-cell>
          <table:table-cell table:number-columns-repeated="4"/>
          <table:table-cell office:value-type="float" office:value="94" calcext:value-type="float">
            <text:p>94</text:p>
          </table:table-cell>
          <table:table-cell office:value-type="string" calcext:value-type="string">
            <text:p>Abfall</text:p>
          </table:table-cell>
          <table:table-cell table:style-name="ce99" office:value-type="float" office:value="0.8" calcext:value-type="float">
            <text:p>0.800</text:p>
          </table:table-cell>
          <table:table-cell/>
          <table:table-cell table:style-name="Default" table:number-columns-repeated="16366"/>
        </table:table-row>
        <table:table-row table:style-name="ro6">
          <table:table-cell table:style-name="ce71" office:value-type="float" office:value="13" calcext:value-type="float">
            <text:p>13</text:p>
          </table:table-cell>
          <table:table-cell table:style-name="ce71" office:value-type="string" calcext:value-type="string">
            <text:p>6c6f7b55-d242-4e3b-8fe5-ace59ad83ab1</text:p>
          </table:table-cell>
          <table:table-cell table:style-name="ce71" office:value-type="string" calcext:value-type="string">
            <text:p>waste</text:p>
          </table:table-cell>
          <table:table-cell table:style-name="ce71" office:value-type="string" calcext:value-type="string">
            <text:p>waste,illegal waste,refuse,garbage</text:p>
          </table:table-cell>
          <table:table-cell table:style-name="ce80" office:value-type="string" calcext:value-type="string">
            <text:p><text:s/>Abfall, illegaler Abfall jeglicher Art.</text:p>
          </table:table-cell>
          <table:table-cell table:style-name="ce71" office:value-type="string" calcext:value-type="string">
            <text:p>Abfall</text:p>
          </table:table-cell>
          <table:table-cell table:style-name="ce80" office:value-type="string" calcext:value-type="string">
            <text:p>Illegaler Abfall jeglicher Art.</text:p>
          </table:table-cell>
          <table:table-cell table:style-name="ce80" office:value-type="string" calcext:value-type="string">
            <text:p>null</text:p>
          </table:table-cell>
          <table:table-cell table:style-name="ce89" table:formula="of:=[.F14]&amp;&quot; &quot;&amp;[.G14]" office:value-type="string" office:string-value="Abfall Illegaler Abfall jeglicher Art." calcext:value-type="string">
            <text:p>Abfall Illegaler Abfall jeglicher Art.</text:p>
          </table:table-cell>
          <table:table-cell table:style-name="ce71" table:number-columns-repeated="4"/>
          <table:table-cell table:style-name="ce71" office:value-type="string" calcext:value-type="string">
            <text:p>x</text:p>
          </table:table-cell>
          <table:table-cell table:style-name="ce71" office:value-type="float" office:value="85" calcext:value-type="float">
            <text:p>85</text:p>
          </table:table-cell>
          <table:table-cell office:value-type="string" calcext:value-type="string">
            <text:p>Abfall</text:p>
          </table:table-cell>
          <table:table-cell table:style-name="ce30" office:value-type="float" office:value="0.4" calcext:value-type="float">
            <text:p>0.400</text:p>
          </table:table-cell>
          <table:table-cell/>
          <table:table-cell table:style-name="ce71" table:number-columns-repeated="16366"/>
        </table:table-row>
        <table:table-row table:style-name="ro10">
          <table:table-cell office:value-type="float" office:value="14" calcext:value-type="float">
            <text:p>14</text:p>
          </table:table-cell>
          <table:table-cell office:value-type="string" calcext:value-type="string">
            <text:p>7fe294c2-a3b7-4085-bfd9-54b29d411dac</text:p>
          </table:table-cell>
          <table:table-cell office:value-type="string" calcext:value-type="string">
            <text:p>garbage bags</text:p>
          </table:table-cell>
          <table:table-cell office:value-type="string" calcext:value-type="string">
            <text:p>garbage bags,sacks,iron,football,bridge</text:p>
          </table:table-cell>
          <table:table-cell office:value-type="string" calcext:value-type="string">
            <text:p><text:s/>Abfallsäcke unter der Brücke. Es liegen drei Säcke, ein Eisen und ein alter Fußball unter der Brücke. Danke für die Beseitigung.</text:p>
          </table:table-cell>
          <table:table-cell office:value-type="string" calcext:value-type="string">
            <text:p>Abfallsäcke unter der Brücke</text:p>
          </table:table-cell>
          <table:table-cell table:style-name="ce79" office:value-type="string" calcext:value-type="string">
            <text:p>Es liegen 3 Säcke, ein Eisen und ein alter Fussball unter der Brücke. Danke für die Beseitigung!</text:p>
          </table:table-cell>
          <table:table-cell table:style-name="ce79" office:value-type="string" calcext:value-type="string">
            <text:p>a garbage bags</text:p>
          </table:table-cell>
          <table:table-cell table:style-name="ce88" table:formula="of:=[.F15]&amp;&quot; &quot;&amp;[.G15]" office:value-type="string" office:string-value="Abfallsäcke unter der Brücke Es liegen 3 Säcke, ein Eisen und ein alter Fussball unter der Brücke. Danke für die Beseitigung!" calcext:value-type="string">
            <text:p>Abfallsäcke unter der Brücke Es liegen 3 Säcke, ein Eisen und ein alter Fussball unter der Brücke. Danke für die Beseitigung!</text:p>
          </table:table-cell>
          <table:table-cell office:value-type="string" calcext:value-type="string">
            <text:p>x</text:p>
          </table:table-cell>
          <table:table-cell table:number-columns-repeated="4"/>
          <table:table-cell office:value-type="float" office:value="90" calcext:value-type="float">
            <text:p>90</text:p>
          </table:table-cell>
          <table:table-cell office:value-type="string" calcext:value-type="string">
            <text:p>Abfall</text:p>
          </table:table-cell>
          <table:table-cell table:style-name="ce99" office:value-type="float" office:value="0.19047619047619" calcext:value-type="float">
            <text:p>0.190</text:p>
          </table:table-cell>
          <table:table-cell/>
          <table:table-cell table:style-name="Default" table:number-columns-repeated="16366"/>
        </table:table-row>
        <table:table-row table:style-name="ro11">
          <table:table-cell office:value-type="float" office:value="15" calcext:value-type="float">
            <text:p>15</text:p>
          </table:table-cell>
          <table:table-cell office:value-type="string" calcext:value-type="string">
            <text:p>829dab2d-e433-4f17-9479-04cd374be2f9</text:p>
          </table:table-cell>
          <table:table-cell office:value-type="string" calcext:value-type="string">
            <text:p>lavabo</text:p>
          </table:table-cell>
          <table:table-cell office:value-type="string" calcext:value-type="string">
            <text:p>lavabo,toilet,sewing machine,path</text:p>
          </table:table-cell>
          <table:table-cell office:value-type="string" calcext:value-type="string">
            <text:p><text:s/>Lavabo, WC, alte Nähmaschine und mehr. Guten Tag Stadtmelder Team. Als erstes möchte ich mich bedanken für Ihr Engagement und Ihre immer freundlichen Antworten. Nun mein Anliegen. Anfang der Kräzernbrücke Richtung Winkeln führt ein kleiner Weg, gehört zum Brückenweg, Richtung Sitter. Dort wurden etwa 50 Meter von der Strasse entfernt allerlei abgelegt. Siehe Foto. Von der Strasse aus ist der Müll fast nicht zu sehen. Vielen Dank fürs Kümmern.</text:p>
          </table:table-cell>
          <table:table-cell office:value-type="string" calcext:value-type="string">
            <text:p>Lavabo, WC, alte Nähmaschine und mehr </text:p>
          </table:table-cell>
          <table:table-cell table:style-name="ce79" office:value-type="string" calcext:value-type="string">
            <text:p>Guten Tag Stadtmelderteam Als erstes möchte ich mich bedanken für Ihr Engagement und Ihre immer freundlichen Antworten! Nun mein Anliegen: Anfang der Kräzernbrücke Richtung Winkeln, führt ein kleiner Weg (gehört zum Brückenweg) Richtung Sitter. Dort wurde etwa 50 Meter von der Strasse entfernt allerlei abgelegt, siehe Foto. Von der Strasse aus ist der Müll fast nicht zu sehen. Vielen Dank fürs Kümmern.</text:p>
          </table:table-cell>
          <table:table-cell table:style-name="ce79" office:value-type="string" calcext:value-type="string">
            <text:p>a toilet</text:p>
          </table:table-cell>
          <table:table-cell table:style-name="ce88" table:formula="of:=[.F16]&amp;&quot; &quot;&amp;[.G16]" office:value-type="string" office:string-value="Lavabo, WC, alte Nähmaschine und mehr  Guten Tag Stadtmelderteam Als erstes möchte ich mich bedanken für Ihr Engagement und Ihre immer freundlichen Antworten! Nun mein Anliegen: Anfang der Kräzernbrücke Richtung Winkeln, führt ein kleiner Weg (gehört zum Brückenweg) Richtung Sitter. Dort wurde etwa 50 Meter von der Strasse entfernt allerlei abgelegt, siehe Foto. Von der Strasse aus ist der Müll fast nicht zu sehen. Vielen Dank fürs Kümmern." calcext:value-type="string">
            <text:p>Lavabo, WC, alte Nähmaschine und mehr <text:s/>Guten Tag Stadtmelderteam Als erstes möchte ich mich bedanken für Ihr Engagement und Ihre immer freundlichen Antworten! Nun mein Anliegen: Anfang der Kräzernbrücke Richtung Winkeln, führt ein kleiner Weg (gehört zum Brückenweg) Richtung Sitter. Dort wurde etwa 50 Meter von der Strasse entfernt allerlei abgelegt, siehe Foto. Von der Strasse aus ist der Müll fast nicht zu sehen. Vielen Dank fürs Kümmern.</text:p>
          </table:table-cell>
          <table:table-cell office:value-type="string" calcext:value-type="string">
            <text:p>x</text:p>
          </table:table-cell>
          <table:table-cell table:number-columns-repeated="4"/>
          <table:table-cell office:value-type="float" office:value="215" calcext:value-type="float">
            <text:p>215</text:p>
          </table:table-cell>
          <table:table-cell office:value-type="string" calcext:value-type="string">
            <text:p>Abfall</text:p>
          </table:table-cell>
          <table:table-cell table:style-name="ce99" office:value-type="float" office:value="0.176470588235294" calcext:value-type="float">
            <text:p>0.176</text:p>
          </table:table-cell>
          <table:table-cell/>
          <table:table-cell table:style-name="Default" table:number-columns-repeated="16366"/>
        </table:table-row>
        <table:table-row table:style-name="ro12">
          <table:table-cell office:value-type="float" office:value="16" calcext:value-type="float">
            <text:p>16</text:p>
          </table:table-cell>
          <table:table-cell office:value-type="string" calcext:value-type="string">
            <text:p>2a5da297-4ce9-4ec8-b712-983cccffe381</text:p>
          </table:table-cell>
          <table:table-cell office:value-type="string" calcext:value-type="string">
            <text:p>waste</text:p>
          </table:table-cell>
          <table:table-cell office:value-type="string" calcext:value-type="string">
            <text:p>waste,garbage,refuse,disposal truck,situation</text:p>
          </table:table-cell>
          <table:table-cell office:value-type="string" calcext:value-type="string">
            <text:p><text:s/>Entsorgung vergessen. Letzten Freitag wurde an unserer Strasse vergessen den Abfall zu entsorgen. Zwischenzeitlich präsentiert sich die Situation gemäss Foto. Bitte schicken Sie einen Entsorgungslaster. Besten Dank.</text:p>
          </table:table-cell>
          <table:table-cell office:value-type="string" calcext:value-type="string">
            <text:p>Entsorgung vergessen</text:p>
          </table:table-cell>
          <table:table-cell table:style-name="ce79" office:value-type="string" calcext:value-type="string">
            <text:p>Letzten Freitag wurde an unserer Strasse vergessen den Abfall zu entsorgen. Zwischenzeitlich präsentiert sich die Situation gemäss Foto. Bitte schicken Sie einen Entsorgungslaster. Besten Dank</text:p>
          </table:table-cell>
          <table:table-cell table:style-name="ce79" office:value-type="string" calcext:value-type="string">
            <text:p>a waste</text:p>
          </table:table-cell>
          <table:table-cell table:style-name="ce88" table:formula="of:=[.F17]&amp;&quot; &quot;&amp;[.G17]" office:value-type="string" office:string-value="Entsorgung vergessen Letzten Freitag wurde an unserer Strasse vergessen den Abfall zu entsorgen. Zwischenzeitlich präsentiert sich die Situation gemäss Foto. Bitte schicken Sie einen Entsorgungslaster. Besten Dank" calcext:value-type="string">
            <text:p>Entsorgung vergessen Letzten Freitag wurde an unserer Strasse vergessen den Abfall zu entsorgen. Zwischenzeitlich präsentiert sich die Situation gemäss Foto. Bitte schicken Sie einen Entsorgungslaster. Besten Dank</text:p>
          </table:table-cell>
          <table:table-cell office:value-type="string" calcext:value-type="string">
            <text:p>x</text:p>
          </table:table-cell>
          <table:table-cell table:number-columns-repeated="4"/>
          <table:table-cell office:value-type="float" office:value="95" calcext:value-type="float">
            <text:p>95</text:p>
          </table:table-cell>
          <table:table-cell office:value-type="string" calcext:value-type="string">
            <text:p>Abfall</text:p>
          </table:table-cell>
          <table:table-cell table:style-name="ce99" office:value-type="float" office:value="0.0740740740740741" calcext:value-type="float">
            <text:p>0.074</text:p>
          </table:table-cell>
          <table:table-cell/>
          <table:table-cell table:style-name="Default" table:number-columns-repeated="16366"/>
        </table:table-row>
        <table:table-row table:style-name="ro13">
          <table:table-cell office:value-type="float" office:value="17" calcext:value-type="float">
            <text:p>17</text:p>
          </table:table-cell>
          <table:table-cell office:value-type="string" calcext:value-type="string">
            <text:p>7811cfbd-df0e-4331-ad79-b906ab010b87</text:p>
          </table:table-cell>
          <table:table-cell office:value-type="string" calcext:value-type="string">
            <text:p>cardboard boxes</text:p>
          </table:table-cell>
          <table:table-cell office:value-type="string" calcext:value-type="string">
            <text:p>cardboard boxes,cardboard,heap,boxes,refuse</text:p>
          </table:table-cell>
          <table:table-cell office:value-type="string" calcext:value-type="string">
            <text:p><text:s/>etwas zu früh verantwortungslos kartons stehen am samstag 7 märz bereit die karton abfuhr findet erst am 17 märz ab 13 uhr statt übrigens wird der karton aus sicherheitsgründen erst ab 13 uhr abgeholt und sollte nicht über die nacht draußen liegen schon oft wurde ein solcher haufen angezündet mit verheerenden folgen ich bitte sie um kenntnisnahme</text:p>
          </table:table-cell>
          <table:table-cell office:value-type="string" calcext:value-type="string">
            <text:p>Etwas zu früh.</text:p>
          </table:table-cell>
          <table:table-cell table:style-name="ce79" office:value-type="string" calcext:value-type="string">
            <text:p>Verantwortungslos! Kartons stehen am Samstag, 7. März bereit, die Kartonabfuhr findet erst am 17. März ab 13 Uhr statt. Übrigens wird der Karton aus Sicherheitsgründen erst ab 13 Uhr abgeholt und sollte nicht über Nacht draussen liegen, schon oft wurden solche Haufen angezündet mit verheerenden Folgen. Ich bitte Sie um Kenntnisnahme.</text:p>
          </table:table-cell>
          <table:table-cell table:style-name="ce79" office:value-type="string" calcext:value-type="string">
            <text:p>a cardboard boxes</text:p>
          </table:table-cell>
          <table:table-cell table:style-name="ce88" table:formula="of:=[.F18]&amp;&quot; &quot;&amp;[.G18]" office:value-type="string" office:string-value="Etwas zu früh. Verantwortungslos! Kartons stehen am Samstag, 7. März bereit, die Kartonabfuhr findet erst am 17. März ab 13 Uhr statt. Übrigens wird der Karton aus Sicherheitsgründen erst ab 13 Uhr abgeholt und sollte nicht über Nacht draussen liegen, schon oft wurden solche Haufen angezündet mit verheerenden Folgen. Ich bitte Sie um Kenntnisnahme." calcext:value-type="string">
            <text:p>Etwas zu früh. Verantwortungslos! Kartons stehen am Samstag, 7. März bereit, die Kartonabfuhr findet erst am 17. März ab 13 Uhr statt. Übrigens wird der Karton aus Sicherheitsgründen erst ab 13 Uhr abgeholt und sollte nicht über Nacht draussen liegen, schon oft wurden solche Haufen angezündet mit verheerenden Folgen. Ich bitte Sie um Kenntnisnahme.</text:p>
          </table:table-cell>
          <table:table-cell office:value-type="string" calcext:value-type="string">
            <text:p>x</text:p>
          </table:table-cell>
          <table:table-cell table:number-columns-repeated="4"/>
          <table:table-cell office:value-type="float" office:value="118" calcext:value-type="float">
            <text:p>118</text:p>
          </table:table-cell>
          <table:table-cell office:value-type="string" calcext:value-type="string">
            <text:p>Abfall</text:p>
          </table:table-cell>
          <table:table-cell table:style-name="ce99" office:value-type="float" office:value="0.555555555555556" calcext:value-type="float">
            <text:p>0.556</text:p>
          </table:table-cell>
          <table:table-cell/>
          <table:table-cell table:style-name="Default" table:number-columns-repeated="16366"/>
        </table:table-row>
        <table:table-row table:style-name="ro5">
          <table:table-cell office:value-type="float" office:value="18" calcext:value-type="float">
            <text:p>18</text:p>
          </table:table-cell>
          <table:table-cell office:value-type="string" calcext:value-type="string">
            <text:p>9822b2fb-2bce-438c-a41f-18cd9cb9fb60</text:p>
          </table:table-cell>
          <table:table-cell office:value-type="string" calcext:value-type="string">
            <text:p>waste bags</text:p>
          </table:table-cell>
          <table:table-cell office:value-type="string" calcext:value-type="string">
            <text:p>waste bags,containers,street,debris,garbage</text:p>
          </table:table-cell>
          <table:table-cell office:value-type="string" calcext:value-type="string">
            <text:p><text:s/>Abfall auf Strasse, Baustelle Schützengarten, Stadt auswärts, Abfallsäcke aus Containern auf Strasse geworfen, aufgerissen, Abfall grossflächig verteilt.</text:p>
          </table:table-cell>
          <table:table-cell office:value-type="string" calcext:value-type="string">
            <text:p>Abfall auf Strasse</text:p>
          </table:table-cell>
          <table:table-cell table:style-name="ce79" office:value-type="string" calcext:value-type="string">
            <text:p>Bushaltestelle Schützengarten, stadtauswärts: Abfallsäcke aus Containern auf Strasse geworfen, aufgerissen, Abfall grossflächig verteilt.</text:p>
          </table:table-cell>
          <table:table-cell table:style-name="ce79" office:value-type="string" calcext:value-type="string">
            <text:p>a street</text:p>
          </table:table-cell>
          <table:table-cell table:style-name="ce88" table:formula="of:=[.F19]&amp;&quot; &quot;&amp;[.G19]" office:value-type="string" office:string-value="Abfall auf Strasse Bushaltestelle Schützengarten, stadtauswärts: Abfallsäcke aus Containern auf Strasse geworfen, aufgerissen, Abfall grossflächig verteilt." calcext:value-type="string">
            <text:p>Abfall auf Strasse Bushaltestelle Schützengarten, stadtauswärts: Abfallsäcke aus Containern auf Strasse geworfen, aufgerissen, Abfall grossflächig verteilt.</text:p>
          </table:table-cell>
          <table:table-cell table:number-columns-repeated="3"/>
          <table:table-cell office:value-type="string" calcext:value-type="string">
            <text:p>x</text:p>
          </table:table-cell>
          <table:table-cell/>
          <table:table-cell office:value-type="float" office:value="90" calcext:value-type="float">
            <text:p>90</text:p>
          </table:table-cell>
          <table:table-cell office:value-type="string" calcext:value-type="string">
            <text:p>Abfall</text:p>
          </table:table-cell>
          <table:table-cell table:style-name="ce99" office:value-type="float" office:value="0.25" calcext:value-type="float">
            <text:p>0.250</text:p>
          </table:table-cell>
          <table:table-cell/>
          <table:table-cell table:style-name="Default" table:number-columns-repeated="16366"/>
        </table:table-row>
        <table:table-row table:style-name="ro14">
          <table:table-cell office:value-type="float" office:value="19" calcext:value-type="float">
            <text:p>19</text:p>
          </table:table-cell>
          <table:table-cell office:value-type="string" calcext:value-type="string">
            <text:p>21cad984-11be-4834-b430-b7a372a8be14</text:p>
          </table:table-cell>
          <table:table-cell office:value-type="string" calcext:value-type="string">
            <text:p>trash</text:p>
          </table:table-cell>
          <table:table-cell office:value-type="string" calcext:value-type="string">
            <text:p>trash,garbage,flyers,garbage collection</text:p>
          </table:table-cell>
          <table:table-cell office:value-type="string" calcext:value-type="string">
            <text:p><text:s/>Abfall. Trotz Flyer-Offensive liegt der Müll bereits am Samstag wieder herum. Und das kommt, obwohl die Kehrichtabfuhr erst am Freitag kommt. Wirkung gleich Null.</text:p>
          </table:table-cell>
          <table:table-cell office:value-type="string" calcext:value-type="string">
            <text:p>Abfall</text:p>
          </table:table-cell>
          <table:table-cell table:style-name="ce79" office:value-type="string" calcext:value-type="string">
            <text:p>Trotz Flyer-Offensive liegt der Müll bereits am Samstag wieder herum; und das, obwohl die Kehrichtabfuhr erst am Freitag kommt. Wirkung gleich null.</text:p>
          </table:table-cell>
          <table:table-cell table:style-name="ce79"/>
          <table:table-cell table:style-name="ce88" table:formula="of:=[.F20]&amp;&quot; &quot;&amp;[.G20]" office:value-type="string" office:string-value="Abfall Trotz Flyer-Offensive liegt der Müll bereits am Samstag wieder herum; und das, obwohl die Kehrichtabfuhr erst am Freitag kommt. Wirkung gleich null." calcext:value-type="string">
            <text:p>Abfall Trotz Flyer-Offensive liegt der Müll bereits am Samstag wieder herum; und das, obwohl die Kehrichtabfuhr erst am Freitag kommt. Wirkung gleich null.</text:p>
          </table:table-cell>
          <table:table-cell office:value-type="string" calcext:value-type="string">
            <text:p>x</text:p>
          </table:table-cell>
          <table:table-cell table:number-columns-repeated="4"/>
          <table:table-cell office:value-type="float" office:value="175" calcext:value-type="float">
            <text:p>175</text:p>
          </table:table-cell>
          <table:table-cell office:value-type="string" calcext:value-type="string">
            <text:p>Abfall</text:p>
          </table:table-cell>
          <table:table-cell table:style-name="ce99" office:value-type="float" office:value="0.260869565217391" calcext:value-type="float">
            <text:p>0.261</text:p>
          </table:table-cell>
          <table:table-cell/>
          <table:table-cell table:style-name="Default" table:number-columns-repeated="16366"/>
        </table:table-row>
        <table:table-row table:style-name="ro6">
          <table:table-cell office:value-type="float" office:value="20" calcext:value-type="float">
            <text:p>20</text:p>
          </table:table-cell>
          <table:table-cell office:value-type="string" calcext:value-type="string">
            <text:p>414c15f4-6f42-4002-983a-74227c8b0d41</text:p>
          </table:table-cell>
          <table:table-cell office:value-type="string" calcext:value-type="string">
            <text:p>waste</text:p>
          </table:table-cell>
          <table:table-cell office:value-type="string" calcext:value-type="string">
            <text:p>waste,floor,meter</text:p>
          </table:table-cell>
          <table:table-cell office:value-type="string" calcext:value-type="string">
            <text:p><text:s/>Abfall seit Freitag. 50 Meter ist ein Unterflur.</text:p>
          </table:table-cell>
          <table:table-cell office:value-type="string" calcext:value-type="string">
            <text:p>Abfall seit Freitag</text:p>
          </table:table-cell>
          <table:table-cell table:style-name="ce79" office:value-type="string" calcext:value-type="string">
            <text:p>50m ist ein Unterfluhr</text:p>
          </table:table-cell>
          <table:table-cell table:style-name="ce79" office:value-type="string" calcext:value-type="string">
            <text:p>a waste</text:p>
          </table:table-cell>
          <table:table-cell table:style-name="ce88" table:formula="of:=[.F21]&amp;&quot; &quot;&amp;[.G21]" office:value-type="string" office:string-value="Abfall seit Freitag 50m ist ein Unterfluhr" calcext:value-type="string">
            <text:p>Abfall seit Freitag 50m ist ein Unterfluhr</text:p>
          </table:table-cell>
          <table:table-cell office:value-type="string" calcext:value-type="string">
            <text:p>x</text:p>
          </table:table-cell>
          <table:table-cell table:number-columns-repeated="4"/>
          <table:table-cell office:value-type="float" office:value="81" calcext:value-type="float">
            <text:p>81</text:p>
          </table:table-cell>
          <table:table-cell office:value-type="string" calcext:value-type="string">
            <text:p>Abfall</text:p>
          </table:table-cell>
          <table:table-cell table:style-name="ce99" office:value-type="float" office:value="0.571428571428571" calcext:value-type="float">
            <text:p>0.571</text:p>
          </table:table-cell>
          <table:table-cell/>
          <table:table-cell table:style-name="Default" table:number-columns-repeated="16366"/>
        </table:table-row>
        <table:table-row table:style-name="ro10">
          <table:table-cell office:value-type="float" office:value="21" calcext:value-type="float">
            <text:p>21</text:p>
          </table:table-cell>
          <table:table-cell office:value-type="string" calcext:value-type="string">
            <text:p>6d1bdf07-a080-4df7-9be0-44adb045f0ff</text:p>
          </table:table-cell>
          <table:table-cell office:value-type="string" calcext:value-type="string">
            <text:p>garbage</text:p>
          </table:table-cell>
          <table:table-cell office:value-type="string" calcext:value-type="string">
            <text:p>garbage,refuse bags,trash,waste</text:p>
          </table:table-cell>
          <table:table-cell office:value-type="string" calcext:value-type="string">
            <text:p><text:s/>Abfall. Kehrichtsäcke stehen seit Sonntag bereit, obwohl die ordentliche Kehrichtabfuhr erst Freitag ist.</text:p>
          </table:table-cell>
          <table:table-cell office:value-type="string" calcext:value-type="string">
            <text:p>Abfall</text:p>
          </table:table-cell>
          <table:table-cell table:style-name="ce79" office:value-type="string" calcext:value-type="string">
            <text:p>Kehrichtsäcke stehen seit Sonntag bereit, obwohl die ordentliche Kehrichtabfuhr erst Freitag ist</text:p>
          </table:table-cell>
          <table:table-cell table:style-name="ce79" office:value-type="string" calcext:value-type="string">
            <text:p>a garbage </text:p>
          </table:table-cell>
          <table:table-cell table:style-name="ce88" table:formula="of:=[.F22]&amp;&quot; &quot;&amp;[.G22]" office:value-type="string" office:string-value="Abfall Kehrichtsäcke stehen seit Sonntag bereit, obwohl die ordentliche Kehrichtabfuhr erst Freitag ist" calcext:value-type="string">
            <text:p>Abfall Kehrichtsäcke stehen seit Sonntag bereit, obwohl die ordentliche Kehrichtabfuhr erst Freitag ist</text:p>
          </table:table-cell>
          <table:table-cell office:value-type="string" calcext:value-type="string">
            <text:p>x</text:p>
          </table:table-cell>
          <table:table-cell table:number-columns-repeated="4"/>
          <table:table-cell office:value-type="float" office:value="157" calcext:value-type="float">
            <text:p>157</text:p>
          </table:table-cell>
          <table:table-cell office:value-type="string" calcext:value-type="string">
            <text:p>Abfall</text:p>
          </table:table-cell>
          <table:table-cell table:style-name="ce99" office:value-type="float" office:value="0.153846153846154" calcext:value-type="float">
            <text:p>0.154</text:p>
          </table:table-cell>
          <table:table-cell/>
          <table:table-cell table:style-name="Default" table:number-columns-repeated="16366"/>
        </table:table-row>
        <table:table-row table:style-name="ro5">
          <table:table-cell table:style-name="ce71" office:value-type="float" office:value="22" calcext:value-type="float">
            <text:p>22</text:p>
          </table:table-cell>
          <table:table-cell table:style-name="ce71" office:value-type="string" calcext:value-type="string">
            <text:p>013a0342-9771-409f-add0-52fde9f3d5d2</text:p>
          </table:table-cell>
          <table:table-cell table:style-name="ce71" office:value-type="string" calcext:value-type="string">
            <text:p>waste dump</text:p>
          </table:table-cell>
          <table:table-cell table:style-name="ce71" office:value-type="string" calcext:value-type="string">
            <text:p>waste dump,garbage bags,bins,residents,container</text:p>
          </table:table-cell>
          <table:table-cell table:style-name="ce80" office:value-type="string" calcext:value-type="string">
            <text:p><text:s/>Neue Abfalldeponie im Schmittengässlein. Schon seit Wochen ständig Abfallsäcke im Schmittengässlein. Bitte Anwohner über Abfuhrzeiten und Möglichkeiten des Unterflurcontainers informieren. Danke.</text:p>
          </table:table-cell>
          <table:table-cell table:style-name="ce71" office:value-type="string" calcext:value-type="string">
            <text:p>neue Abfalldeponie im Schmittengässlein</text:p>
          </table:table-cell>
          <table:table-cell table:style-name="ce80" office:value-type="string" calcext:value-type="string">
            <text:p>Schon seit Wochen ständig Abfallsäcke im Schmittengässlein. Bitte Anwohner über Abfuhrzeiten und Möglichkeiten des Unterflurcontainers informieren. Danke.</text:p>
          </table:table-cell>
          <table:table-cell table:style-name="ce80" office:value-type="string" calcext:value-type="string">
            <text:p>a garbage bags</text:p>
          </table:table-cell>
          <table:table-cell table:style-name="ce89" table:formula="of:=[.F23]&amp;&quot; &quot;&amp;[.G23]" office:value-type="string" office:string-value="neue Abfalldeponie im Schmittengässlein Schon seit Wochen ständig Abfallsäcke im Schmittengässlein. Bitte Anwohner über Abfuhrzeiten und Möglichkeiten des Unterflurcontainers informieren. Danke." calcext:value-type="string">
            <text:p>neue Abfalldeponie im Schmittengässlein Schon seit Wochen ständig Abfallsäcke im Schmittengässlein. Bitte Anwohner über Abfuhrzeiten und Möglichkeiten des Unterflurcontainers informieren. Danke.</text:p>
          </table:table-cell>
          <table:table-cell table:style-name="ce71" office:value-type="string" calcext:value-type="string">
            <text:p>x</text:p>
          </table:table-cell>
          <table:table-cell table:style-name="ce71" table:number-columns-repeated="4"/>
          <table:table-cell table:style-name="ce71" office:value-type="float" office:value="101" calcext:value-type="float">
            <text:p>101</text:p>
          </table:table-cell>
          <table:table-cell office:value-type="string" calcext:value-type="string">
            <text:p>Abfall</text:p>
          </table:table-cell>
          <table:table-cell table:style-name="ce30" office:value-type="float" office:value="0.0952380952380952" calcext:value-type="float">
            <text:p>0.095</text:p>
          </table:table-cell>
          <table:table-cell/>
          <table:table-cell table:style-name="ce71" table:number-columns-repeated="16366"/>
        </table:table-row>
        <table:table-row table:style-name="ro9">
          <table:table-cell office:value-type="float" office:value="23" calcext:value-type="float">
            <text:p>23</text:p>
          </table:table-cell>
          <table:table-cell office:value-type="string" calcext:value-type="string">
            <text:p>9d91a519-519e-4664-88db-a9102cfb0703</text:p>
          </table:table-cell>
          <table:table-cell office:value-type="string" calcext:value-type="string">
            <text:p>waste disposal</text:p>
          </table:table-cell>
          <table:table-cell office:value-type="string" calcext:value-type="string">
            <text:p>waste disposal,trash,refuse,garbage,waste</text:p>
          </table:table-cell>
          <table:table-cell office:value-type="string" calcext:value-type="string">
            <text:p><text:s/>Illegale Abfallentsorgung. Hier entsorgt ein Mitbürger seinen Abfall wöchentlich gratis.</text:p>
          </table:table-cell>
          <table:table-cell office:value-type="string" calcext:value-type="string">
            <text:p>illegale Abfallentsorgung</text:p>
          </table:table-cell>
          <table:table-cell table:style-name="ce79" office:value-type="string" calcext:value-type="string">
            <text:p>Hier entsorgt ein Mitbürger seinen Abfall wöchentlich gratis</text:p>
          </table:table-cell>
          <table:table-cell table:style-name="ce79" office:value-type="string" calcext:value-type="string">
            <text:p>a trash</text:p>
          </table:table-cell>
          <table:table-cell table:style-name="ce88" table:formula="of:=[.F24]&amp;&quot; &quot;&amp;[.G24]" office:value-type="string" office:string-value="illegale Abfallentsorgung Hier entsorgt ein Mitbürger seinen Abfall wöchentlich gratis" calcext:value-type="string">
            <text:p>illegale Abfallentsorgung Hier entsorgt ein Mitbürger seinen Abfall wöchentlich gratis</text:p>
          </table:table-cell>
          <table:table-cell office:value-type="string" calcext:value-type="string">
            <text:p>x</text:p>
          </table:table-cell>
          <table:table-cell table:number-columns-repeated="4"/>
          <table:table-cell office:value-type="float" office:value="120" calcext:value-type="float">
            <text:p>120</text:p>
          </table:table-cell>
          <table:table-cell office:value-type="string" calcext:value-type="string">
            <text:p>Abfall</text:p>
          </table:table-cell>
          <table:table-cell table:style-name="ce99" office:value-type="float" office:value="0.3" calcext:value-type="float">
            <text:p>0.300</text:p>
          </table:table-cell>
          <table:table-cell/>
          <table:table-cell table:style-name="Default" table:number-columns-repeated="16366"/>
        </table:table-row>
        <table:table-row table:style-name="ro6">
          <table:table-cell office:value-type="float" office:value="24" calcext:value-type="float">
            <text:p>24</text:p>
          </table:table-cell>
          <table:table-cell office:value-type="string" calcext:value-type="string">
            <text:p>93c22462-41c6-4d10-824a-a62f7fed993e</text:p>
          </table:table-cell>
          <table:table-cell office:value-type="string" calcext:value-type="string">
            <text:p>waste</text:p>
          </table:table-cell>
          <table:table-cell office:value-type="string" calcext:value-type="string">
            <text:p>waste,rubbish,debris,grass,pond</text:p>
          </table:table-cell>
          <table:table-cell office:value-type="string" calcext:value-type="string">
            <text:p><text:s/>Abfall. Abfall in der Wiese neben dem Weiher.</text:p>
          </table:table-cell>
          <table:table-cell office:value-type="string" calcext:value-type="string">
            <text:p>Abfall</text:p>
          </table:table-cell>
          <table:table-cell table:style-name="ce79" office:value-type="string" calcext:value-type="string">
            <text:p>Abfall in der Wiese neben dem Weiher</text:p>
          </table:table-cell>
          <table:table-cell table:style-name="ce79" office:value-type="string" calcext:value-type="string">
            <text:p>a waste</text:p>
          </table:table-cell>
          <table:table-cell table:style-name="ce88" table:formula="of:=[.F25]&amp;&quot; &quot;&amp;[.G25]" office:value-type="string" office:string-value="Abfall Abfall in der Wiese neben dem Weiher" calcext:value-type="string">
            <text:p>Abfall Abfall in der Wiese neben dem Weiher</text:p>
          </table:table-cell>
          <table:table-cell office:value-type="string" calcext:value-type="string">
            <text:p>x</text:p>
          </table:table-cell>
          <table:table-cell table:number-columns-repeated="4"/>
          <table:table-cell office:value-type="float" office:value="144" calcext:value-type="float">
            <text:p>144</text:p>
          </table:table-cell>
          <table:table-cell office:value-type="string" calcext:value-type="string">
            <text:p>Abfall</text:p>
          </table:table-cell>
          <table:table-cell table:style-name="ce99" office:value-type="float" office:value="0.25" calcext:value-type="float">
            <text:p>0.250</text:p>
          </table:table-cell>
          <table:table-cell/>
          <table:table-cell table:style-name="Default" table:number-columns-repeated="16366"/>
        </table:table-row>
        <table:table-row table:style-name="ro5">
          <table:table-cell office:value-type="float" office:value="25" calcext:value-type="float">
            <text:p>25</text:p>
          </table:table-cell>
          <table:table-cell office:value-type="string" calcext:value-type="string">
            <text:p>f1545cb0-e893-4417-966d-23afe753427e</text:p>
          </table:table-cell>
          <table:table-cell office:value-type="string" calcext:value-type="string">
            <text:p>garbage bag</text:p>
          </table:table-cell>
          <table:table-cell office:value-type="string" calcext:value-type="string">
            <text:p>garbage bag,trash bag,refuse bag,waste bag</text:p>
          </table:table-cell>
          <table:table-cell office:value-type="string" calcext:value-type="string">
            <text:p><text:s/>Abfallsack deponiert. Erneut wurde ein Abfallsack an einem Wochenende vor unserem Haus entsorgt. Unverständlich, dass dies in letzter Zeit so oft geschieht. Besten Dank für Ihre Bemühungen.</text:p>
          </table:table-cell>
          <table:table-cell office:value-type="string" calcext:value-type="string">
            <text:p>Abfallsack deponiert</text:p>
          </table:table-cell>
          <table:table-cell table:style-name="ce79" office:value-type="string" calcext:value-type="string">
            <text:p>Erneut wurde ein Abfallsack an einem Wochenende vor unserem Haus entsorgt. Unverständlich, dass dies in letzter Zeit so oft geschieht… Besten Dank für Ihre Bemühungen.</text:p>
          </table:table-cell>
          <table:table-cell table:style-name="ce79" office:value-type="string" calcext:value-type="string">
            <text:p>a garbage bag</text:p>
          </table:table-cell>
          <table:table-cell table:style-name="ce88" table:formula="of:=[.F26]&amp;&quot; &quot;&amp;[.G26]" office:value-type="string" office:string-value="Abfallsack deponiert Erneut wurde ein Abfallsack an einem Wochenende vor unserem Haus entsorgt. Unverständlich, dass dies in letzter Zeit so oft geschieht… Besten Dank für Ihre Bemühungen." calcext:value-type="string">
            <text:p>Abfallsack deponiert Erneut wurde ein Abfallsack an einem Wochenende vor unserem Haus entsorgt. Unverständlich, dass dies in letzter Zeit so oft geschieht… Besten Dank für Ihre Bemühungen.</text:p>
          </table:table-cell>
          <table:table-cell office:value-type="string" calcext:value-type="string">
            <text:p>x</text:p>
          </table:table-cell>
          <table:table-cell table:number-columns-repeated="4"/>
          <table:table-cell office:value-type="float" office:value="160" calcext:value-type="float">
            <text:p>160</text:p>
          </table:table-cell>
          <table:table-cell office:value-type="string" calcext:value-type="string">
            <text:p>Abfall</text:p>
          </table:table-cell>
          <table:table-cell table:style-name="ce99" office:value-type="float" office:value="0.0740740740740741" calcext:value-type="float">
            <text:p>0.074</text:p>
          </table:table-cell>
          <table:table-cell/>
          <table:table-cell table:style-name="Default" table:number-columns-repeated="16366"/>
        </table:table-row>
        <table:table-row table:style-name="ro9">
          <table:table-cell table:style-name="ce72" office:value-type="float" office:value="26" calcext:value-type="float">
            <text:p>26</text:p>
          </table:table-cell>
          <table:table-cell table:style-name="ce72" office:value-type="string" calcext:value-type="string">
            <text:p>b21a87f4-7f56-46fd-8db4-e2b8367c841c</text:p>
          </table:table-cell>
          <table:table-cell table:style-name="ce72" office:value-type="string" calcext:value-type="string">
            <text:p>tree</text:p>
          </table:table-cell>
          <table:table-cell table:style-name="ce72" office:value-type="string" calcext:value-type="string">
            <text:p>tree,tree,street,tree</text:p>
          </table:table-cell>
          <table:table-cell table:style-name="ce81" office:value-type="string" calcext:value-type="string">
            <text:p><text:s/>Baum gefällt. Wieso wurde in der Linsenbühlstraße schon wieder ein Baum gefällt?</text:p>
          </table:table-cell>
          <table:table-cell table:style-name="ce72" office:value-type="string" calcext:value-type="string">
            <text:p>Baum gefällt</text:p>
          </table:table-cell>
          <table:table-cell table:style-name="ce81" office:value-type="string" calcext:value-type="string">
            <text:p>Wieso wurde in der Linsenbühlstrasse schon wieder ein Baum gefällt?</text:p>
          </table:table-cell>
          <table:table-cell table:style-name="ce81" office:value-type="string" calcext:value-type="string">
            <text:p>a tree</text:p>
          </table:table-cell>
          <table:table-cell table:style-name="ce90" table:formula="of:=[.F27]&amp;&quot; &quot;&amp;[.G27]" office:value-type="string" office:string-value="Baum gefällt Wieso wurde in der Linsenbühlstrasse schon wieder ein Baum gefällt?" calcext:value-type="string">
            <text:p>Baum gefällt Wieso wurde in der Linsenbühlstrasse schon wieder ein Baum gefällt?</text:p>
          </table:table-cell>
          <table:table-cell table:style-name="ce72" table:number-columns-repeated="4"/>
          <table:table-cell table:style-name="ce72" office:value-type="string" calcext:value-type="string">
            <text:p>x</text:p>
          </table:table-cell>
          <table:table-cell table:style-name="ce72" office:value-type="float" office:value="165" calcext:value-type="float">
            <text:p>165</text:p>
          </table:table-cell>
          <table:table-cell office:value-type="string" calcext:value-type="string">
            <text:p>Grünflächen</text:p>
          </table:table-cell>
          <table:table-cell table:style-name="ce32" office:value-type="float" office:value="0.166666666666667" calcext:value-type="float">
            <text:p>0.167</text:p>
          </table:table-cell>
          <table:table-cell/>
          <table:table-cell table:style-name="ce72" table:number-columns-repeated="16366"/>
        </table:table-row>
        <table:table-row table:style-name="ro7">
          <table:table-cell office:value-type="float" office:value="27" calcext:value-type="float">
            <text:p>27</text:p>
          </table:table-cell>
          <table:table-cell office:value-type="string" calcext:value-type="string">
            <text:p>d449fa0c-b5b3-4a66-9c8f-df9335df29bf</text:p>
          </table:table-cell>
          <table:table-cell office:value-type="string" calcext:value-type="string">
            <text:p>trip hazard</text:p>
          </table:table-cell>
          <table:table-cell office:value-type="string" calcext:value-type="string">
            <text:p>trip hazard,wire,entrance,playground,wooden hedge</text:p>
          </table:table-cell>
          <table:table-cell office:value-type="string" calcext:value-type="string">
            <text:p><text:s/>Stolperfalle. Beim Eingang zum Spielplatz Zielstraße wurde am Holzhag direkt beim Eingang Höhe Pfadi Baracke ein Draht aufgerissen bzw. hängt raus. Das könnte eine gefährliche Stolperfalle werden.</text:p>
          </table:table-cell>
          <table:table-cell office:value-type="string" calcext:value-type="string">
            <text:p>Stolperfalle</text:p>
          </table:table-cell>
          <table:table-cell table:style-name="ce79" office:value-type="string" calcext:value-type="string">
            <text:p>Beim Eingang zum Spielplatz Zilstrasse wurde am Holzhag (direkt beim Eingang Höhe Pfadibaracke) ein Draht ausgerissen bzw hängt raus. Das könnte eine gefährliche Stolperfalle werden!</text:p>
          </table:table-cell>
          <table:table-cell table:style-name="ce79" office:value-type="string" calcext:value-type="string">
            <text:p>a wire</text:p>
          </table:table-cell>
          <table:table-cell table:style-name="ce88" table:formula="of:=[.F28]&amp;&quot; &quot;&amp;[.G28]" office:value-type="string" office:string-value="Stolperfalle Beim Eingang zum Spielplatz Zilstrasse wurde am Holzhag (direkt beim Eingang Höhe Pfadibaracke) ein Draht ausgerissen bzw hängt raus. Das könnte eine gefährliche Stolperfalle werden!" calcext:value-type="string">
            <text:p>Stolperfalle Beim Eingang zum Spielplatz Zilstrasse wurde am Holzhag (direkt beim Eingang Höhe Pfadibaracke) ein Draht ausgerissen bzw hängt raus. Das könnte eine gefährliche Stolperfalle werden!</text:p>
          </table:table-cell>
          <table:table-cell office:value-type="string" calcext:value-type="string">
            <text:p>x</text:p>
          </table:table-cell>
          <table:table-cell table:number-columns-repeated="4"/>
          <table:table-cell office:value-type="float" office:value="190" calcext:value-type="float">
            <text:p>190</text:p>
          </table:table-cell>
          <table:table-cell office:value-type="string" calcext:value-type="string">
            <text:p>Grünflächen</text:p>
          </table:table-cell>
          <table:table-cell table:style-name="ce99" office:value-type="float" office:value="0.307692307692308" calcext:value-type="float">
            <text:p>0.308</text:p>
          </table:table-cell>
          <table:table-cell/>
          <table:table-cell table:style-name="Default" table:number-columns-repeated="16366"/>
        </table:table-row>
        <table:table-row table:style-name="ro15">
          <table:table-cell office:value-type="float" office:value="28" calcext:value-type="float">
            <text:p>28</text:p>
          </table:table-cell>
          <table:table-cell office:value-type="string" calcext:value-type="string">
            <text:p>6b40ca74-0ac8-4959-b857-b1d7e729fc52</text:p>
          </table:table-cell>
          <table:table-cell office:value-type="string" calcext:value-type="string">
            <text:p>pavement</text:p>
          </table:table-cell>
          <table:table-cell office:value-type="string" calcext:value-type="string">
            <text:p>pavement,sidewalk,path,road,Kreuzackerstrasse</text:p>
          </table:table-cell>
          <table:table-cell office:value-type="string" calcext:value-type="string">
            <text:p><text:s/>Sehr rutschiger Velofussgängerweg. Der Laubabfall hat aufgrund der hohen Fussgänger- und Fahrradfahrerfrequenz zu einer sehr rutschigen Belag auf diesen Abschnitt Kreuzackerstrasse geführt, welcher schon länger nicht geräumt wurde. Eine Räumung dieses gemischten Weges wäre super, vielen Dank im Voraus.</text:p>
          </table:table-cell>
          <table:table-cell office:value-type="string" calcext:value-type="string">
            <text:p>Sehr rutschiger Velo-/Fussgängerweg</text:p>
          </table:table-cell>
          <table:table-cell table:style-name="ce79" office:value-type="string" calcext:value-type="string">
            <text:p>Der Laubfall hat aufgrund der hohen Fussgänger- und Fahrradfahrerfrequenz zu einem sehr rutschigen Belag auf diesem Abschnitt (Kreuzackerstrasse) geführt, welcher schon länger nicht geräumt wurde. Eine Reinigung dieses gemischten Weges wäre super - vielen Dank im Voraus! </text:p>
          </table:table-cell>
          <table:table-cell table:style-name="ce79" office:value-type="string" calcext:value-type="string">
            <text:p>a path</text:p>
          </table:table-cell>
          <table:table-cell table:style-name="ce88" table:formula="of:=[.F29]&amp;&quot; &quot;&amp;[.G29]" office:value-type="string" office:string-value="Sehr rutschiger Velo-/Fussgängerweg Der Laubfall hat aufgrund der hohen Fussgänger- und Fahrradfahrerfrequenz zu einem sehr rutschigen Belag auf diesem Abschnitt (Kreuzackerstrasse) geführt, welcher schon länger nicht geräumt wurde. Eine Reinigung dieses gemischten Weges wäre super - vielen Dank im Voraus! " calcext:value-type="string">
            <text:p>Sehr rutschiger Velo-/Fussgängerweg Der Laubfall hat aufgrund der hohen Fussgänger- und Fahrradfahrerfrequenz zu einem sehr rutschigen Belag auf diesem Abschnitt (Kreuzackerstrasse) geführt, welcher schon länger nicht geräumt wurde. Eine Reinigung dieses gemischten Weges wäre super - vielen Dank im Voraus! </text:p>
          </table:table-cell>
          <table:table-cell table:number-columns-repeated="2"/>
          <table:table-cell office:value-type="string" calcext:value-type="string">
            <text:p>x</text:p>
          </table:table-cell>
          <table:table-cell table:number-columns-repeated="2"/>
          <table:table-cell office:value-type="float" office:value="223" calcext:value-type="float">
            <text:p>223</text:p>
          </table:table-cell>
          <table:table-cell office:value-type="string" calcext:value-type="string">
            <text:p>Grünflächen</text:p>
          </table:table-cell>
          <table:table-cell table:style-name="ce99" office:value-type="float" office:value="0.225" calcext:value-type="float">
            <text:p>0.225</text:p>
          </table:table-cell>
          <table:table-cell/>
          <table:table-cell table:style-name="Default" table:number-columns-repeated="16366"/>
        </table:table-row>
        <table:table-row table:style-name="ro16">
          <table:table-cell office:value-type="float" office:value="29" calcext:value-type="float">
            <text:p>29</text:p>
          </table:table-cell>
          <table:table-cell office:value-type="string" calcext:value-type="string">
            <text:p>9728109b-2756-4082-9c5b-b60bddb9ffa6</text:p>
          </table:table-cell>
          <table:table-cell office:value-type="string" calcext:value-type="string">
            <text:p>Burg Weiher Park</text:p>
          </table:table-cell>
          <table:table-cell office:value-type="string" calcext:value-type="string">
            <text:p>Burg Weiher Park,fence,hedge,footpath,lawn</text:p>
          </table:table-cell>
          <table:table-cell office:value-type="string" calcext:value-type="string">
            <text:p><text:s/>Burg Weiher Park. Nutzung nicht offizieller Eingang von der Seite Fürstenlandstraße ca. Höhe 17. Bei der Fürstenlandstraße musste der Zaun sowie die Hecke zum Burg Weiher Park abgebaut werden, um die elektrische Leitungen für die VBSG Busse zu montieren. Der Zaun sowie die Hecke wurden nicht wiederhergestellt. Das hat zur Folge, dass sich ein Fussgängerweg als Abkürzung in den Park etabliert hat. Dieser ist bereits auf dieser Wiese erkennbar. Dadurch sehen die Hundebesitzer auch nicht das Schild am offiziellen Eingang, dass Hunde angeleint sein müssen. Die Wiese präsentiert sich ungepflegt und vermehrt sind freilaufende Hunde zu beachten.환remix google 17 Mai 2017 Eintracht München Hamburg D czas 15 Jahre D rom Bavaria knives properlyes</text:p>
          </table:table-cell>
          <table:table-cell table:style-name="ce79" office:value-type="string" calcext:value-type="string">
            <text:p>Burgweiherpark - Nutzung nicht offizieller Eingang von der Seite Fürstenlandstrasse ca. Höhe Nummer 17</text:p>
          </table:table-cell>
          <table:table-cell table:style-name="ce79" office:value-type="string" calcext:value-type="string">
            <text:p>Bei der Fürstenlandstrasse mussten der Zaun sowie die Hecken zum Burgweiherpark abgebaut werden, um die elektrischen Leitungen für die VBSG-Busse zu montieren. Der Zaun sowie die Hecken wurden nicht wiederhergestellt. Das hat zur Folge, dass sich ein Fussweg als Abkürzung in den Park etabliert hat - dieser ist bereits in der Wiese erkennbar (vgl. Foto). Dadurch sehen die Hundebesitzer auch nicht das Schild am offiziellen Eingang, dass Hunde angeleint sein müssen. Die Wiese präsentiert sich ungepflegt und vermehrt sind freilaufende Hunde zu beobachten.</text:p>
          </table:table-cell>
          <table:table-cell table:style-name="ce79" office:value-type="string" calcext:value-type="string">
            <text:p>a lawn</text:p>
          </table:table-cell>
          <table:table-cell table:style-name="ce88" table:formula="of:=[.F30]&amp;&quot; &quot;&amp;[.G30]" office:value-type="string" office:string-value="Burgweiherpark - Nutzung nicht offizieller Eingang von der Seite Fürstenlandstrasse ca. Höhe Nummer 17 Bei der Fürstenlandstrasse mussten der Zaun sowie die Hecken zum Burgweiherpark abgebaut werden, um die elektrischen Leitungen für die VBSG-Busse zu montieren. Der Zaun sowie die Hecken wurden nicht wiederhergestellt. Das hat zur Folge, dass sich ein Fussweg als Abkürzung in den Park etabliert hat - dieser ist bereits in der Wiese erkennbar (vgl. Foto). Dadurch sehen die Hundebesitzer auch nicht das Schild am offiziellen Eingang, dass Hunde angeleint sein müssen. Die Wiese präsentiert sich ungepflegt und vermehrt sind freilaufende Hunde zu beobachten." calcext:value-type="string">
            <text:p>Burgweiherpark - Nutzung nicht offizieller Eingang von der Seite Fürstenlandstrasse ca. Höhe Nummer 17 Bei der Fürstenlandstrasse mussten der Zaun sowie die Hecken zum Burgweiherpark abgebaut werden, um die elektrischen Leitungen für die VBSG-Busse zu montieren. Der Zaun sowie die Hecken wurden nicht wiederhergestellt. Das hat zur Folge, dass sich ein Fussweg als Abkürzung in den Park etabliert hat - dieser ist bereits in der Wiese erkennbar (vgl. Foto). Dadurch sehen die Hundebesitzer auch nicht das Schild am offiziellen Eingang, dass Hunde angeleint sein müssen. Die Wiese präsentiert sich ungepflegt und vermehrt sind freilaufende Hunde zu beobachten.</text:p>
          </table:table-cell>
          <table:table-cell/>
          <table:table-cell office:value-type="string" calcext:value-type="string">
            <text:p>x</text:p>
          </table:table-cell>
          <table:table-cell table:number-columns-repeated="3"/>
          <table:table-cell office:value-type="float" office:value="241" calcext:value-type="float">
            <text:p>241</text:p>
          </table:table-cell>
          <table:table-cell office:value-type="string" calcext:value-type="string">
            <text:p>Grünflächen</text:p>
          </table:table-cell>
          <table:table-cell table:style-name="ce99" office:value-type="float" office:value="0.43298969072165" calcext:value-type="float">
            <text:p>0.433</text:p>
          </table:table-cell>
          <table:table-cell/>
          <table:table-cell table:style-name="Default" table:number-columns-repeated="16366"/>
        </table:table-row>
        <table:table-row table:style-name="ro8">
          <table:table-cell office:value-type="float" office:value="30" calcext:value-type="float">
            <text:p>30</text:p>
          </table:table-cell>
          <table:table-cell office:value-type="string" calcext:value-type="string">
            <text:p>786ba5f9-a8b8-4297-b3ea-f7ada6ff4a9f</text:p>
          </table:table-cell>
          <table:table-cell office:value-type="string" calcext:value-type="string">
            <text:p>chestnuts</text:p>
          </table:table-cell>
          <table:table-cell office:value-type="string" calcext:value-type="string">
            <text:p>chestnuts,chestnuts,alley,military street,vehicle,cyclist</text:p>
          </table:table-cell>
          <table:table-cell office:value-type="string" calcext:value-type="string">
            <text:p><text:s/>Kastanien. Warum werden die zahlreichen Kastanien in der Kastanienallee zwischen der Militärstraße, Kreuzbleicheweg, Kasernenweg nicht einem Tierpark zugeführt? Anstatt dessen werden die Kastanien von Fahrzeugen plattgefahren, was sehr unangenehm ist für Velofahrer.</text:p>
          </table:table-cell>
          <table:table-cell office:value-type="string" calcext:value-type="string">
            <text:p>Kastanien</text:p>
          </table:table-cell>
          <table:table-cell table:style-name="ce79" office:value-type="string" calcext:value-type="string">
            <text:p>Warum werden die zahlreichen Kastanien in der Kastanienallee zwischen der Militärstrasse - Kreuzbleicheweg - Kasernenweg nicht einem Tierpark zugeführt? Anstatt dessen werden die Kastanien von Fahrzeugen plattgefahren, was sehr unangenehm ist für Velofahrer.</text:p>
          </table:table-cell>
          <table:table-cell table:style-name="ce79" office:value-type="string" calcext:value-type="string">
            <text:p>a vehicle</text:p>
          </table:table-cell>
          <table:table-cell table:style-name="ce88" table:formula="of:=[.F31]&amp;&quot; &quot;&amp;[.G31]" office:value-type="string" office:string-value="Kastanien Warum werden die zahlreichen Kastanien in der Kastanienallee zwischen der Militärstrasse - Kreuzbleicheweg - Kasernenweg nicht einem Tierpark zugeführt? Anstatt dessen werden die Kastanien von Fahrzeugen plattgefahren, was sehr unangenehm ist für Velofahrer." calcext:value-type="string">
            <text:p>Kastanien Warum werden die zahlreichen Kastanien in der Kastanienallee zwischen der Militärstrasse - Kreuzbleicheweg - Kasernenweg nicht einem Tierpark zugeführt? Anstatt dessen werden die Kastanien von Fahrzeugen plattgefahren, was sehr unangenehm ist für Velofahrer.</text:p>
          </table:table-cell>
          <table:table-cell table:number-columns-repeated="4"/>
          <table:table-cell office:value-type="string" calcext:value-type="string">
            <text:p>x</text:p>
          </table:table-cell>
          <table:table-cell office:value-type="float" office:value="627" calcext:value-type="float">
            <text:p>627</text:p>
          </table:table-cell>
          <table:table-cell office:value-type="string" calcext:value-type="string">
            <text:p>Grünflächen</text:p>
          </table:table-cell>
          <table:table-cell table:style-name="ce99" office:value-type="float" office:value="0.147058823529412" calcext:value-type="float">
            <text:p>0.147</text:p>
          </table:table-cell>
          <table:table-cell/>
          <table:table-cell table:style-name="Default" table:number-columns-repeated="16366"/>
        </table:table-row>
        <table:table-row table:style-name="ro7">
          <table:table-cell office:value-type="float" office:value="31" calcext:value-type="float">
            <text:p>31</text:p>
          </table:table-cell>
          <table:table-cell office:value-type="string" calcext:value-type="string">
            <text:p>4cc14cc1-c1cf-4061-9202-938ccfbffa07</text:p>
          </table:table-cell>
          <table:table-cell office:value-type="string" calcext:value-type="string">
            <text:p>plants</text:p>
          </table:table-cell>
          <table:table-cell office:value-type="string" calcext:value-type="string">
            <text:p>plants,embankment,ditch,pedestrians,people</text:p>
          </table:table-cell>
          <table:table-cell office:value-type="string" calcext:value-type="string">
            <text:p><text:s/>Fussgänger wegen Bepflanzung nicht sichtbar. Am oberen Graben vor dem Stars and Stripes sieht man aufgrund der Bepflanzung vor dem Fussgängerstreifen wartende Personen gar nicht. Bitte korrigieren Sie das. Vielen Dank schon im Voraus.</text:p>
          </table:table-cell>
          <table:table-cell office:value-type="string" calcext:value-type="string">
            <text:p>Fussgänger wegen Bepflanzung nicht sichtbar</text:p>
          </table:table-cell>
          <table:table-cell table:style-name="ce79" office:value-type="string" calcext:value-type="string">
            <text:p>Am oberen Graben, vor dem Stars and Stripes, sieht man aufgrund der Bepflanzung vor dem Fussgängerstreifen wartende Personen gar nicht. Bitte korrigieren Sie das. Vielen Dank schon im Voraus.</text:p>
          </table:table-cell>
          <table:table-cell table:style-name="ce79" office:value-type="string" calcext:value-type="string">
            <text:p>a pedestrians</text:p>
          </table:table-cell>
          <table:table-cell table:style-name="ce88" table:formula="of:=[.F32]&amp;&quot; &quot;&amp;[.G32]" office:value-type="string" office:string-value="Fussgänger wegen Bepflanzung nicht sichtbar Am oberen Graben, vor dem Stars and Stripes, sieht man aufgrund der Bepflanzung vor dem Fussgängerstreifen wartende Personen gar nicht. Bitte korrigieren Sie das. Vielen Dank schon im Voraus." calcext:value-type="string">
            <text:p>Fussgänger wegen Bepflanzung nicht sichtbar Am oberen Graben, vor dem Stars and Stripes, sieht man aufgrund der Bepflanzung vor dem Fussgängerstreifen wartende Personen gar nicht. Bitte korrigieren Sie das. Vielen Dank schon im Voraus.</text:p>
          </table:table-cell>
          <table:table-cell table:number-columns-repeated="4"/>
          <table:table-cell office:value-type="string" calcext:value-type="string">
            <text:p>x</text:p>
          </table:table-cell>
          <table:table-cell office:value-type="float" office:value="130" calcext:value-type="float">
            <text:p>130</text:p>
          </table:table-cell>
          <table:table-cell office:value-type="string" calcext:value-type="string">
            <text:p>Grünflächen</text:p>
          </table:table-cell>
          <table:table-cell table:style-name="ce99" office:value-type="float" office:value="0.0882352941176471" calcext:value-type="float">
            <text:p>0.088</text:p>
          </table:table-cell>
          <table:table-cell/>
          <table:table-cell table:style-name="Default" table:number-columns-repeated="16366"/>
        </table:table-row>
        <table:table-row table:style-name="ro17">
          <table:table-cell office:value-type="float" office:value="32" calcext:value-type="float">
            <text:p>32</text:p>
          </table:table-cell>
          <table:table-cell office:value-type="string" calcext:value-type="string">
            <text:p>dc31544c-a174-4620-97e8-bb9a6a99b98c</text:p>
          </table:table-cell>
          <table:table-cell office:value-type="string" calcext:value-type="string">
            <text:p>sidewalk</text:p>
          </table:table-cell>
          <table:table-cell office:value-type="string" calcext:value-type="string">
            <text:p>sidewalk,bushes,pavement,path,trees</text:p>
          </table:table-cell>
          <table:table-cell office:value-type="string" calcext:value-type="string">
            <text:p><text:s/>Gehweg nicht passierbar. Seit mehreren Monaten schlagen die Gebüsche ins Trottoir. Dazu wurde es vor ca. einem Monat schon mal gemeldet und nichts passierte. Ist es möglich diese zurückzuschneiden, damit man den Weg ungehindert passieren kann? Vielen Dank, schon im Voraus. Bildansicht von Augenhöhe.</text:p>
          </table:table-cell>
          <table:table-cell office:value-type="string" calcext:value-type="string">
            <text:p>Gehweg nicht passierbar</text:p>
          </table:table-cell>
          <table:table-cell table:style-name="ce79" office:value-type="string" calcext:value-type="string">
            <text:p>Seit mehreren Monaten schon ragen die Gebüsche ins Trottoir. Dazu wurde es vor ca. 1. Monat schon mal gemeldet und nichts passierte! Ist es möglich diese zurückschneiden damit man den Weg ungehindert passieren kann. Vielen Dank schon im Voraus. (Bild Ansicht von Augenhöhe)</text:p>
          </table:table-cell>
          <table:table-cell table:style-name="ce79" office:value-type="string" calcext:value-type="string">
            <text:p>a bushes</text:p>
          </table:table-cell>
          <table:table-cell table:style-name="ce88" table:formula="of:=[.F33]&amp;&quot; &quot;&amp;[.G33]" office:value-type="string" office:string-value="Gehweg nicht passierbar Seit mehreren Monaten schon ragen die Gebüsche ins Trottoir. Dazu wurde es vor ca. 1. Monat schon mal gemeldet und nichts passierte! Ist es möglich diese zurückschneiden damit man den Weg ungehindert passieren kann. Vielen Dank schon im Voraus. (Bild Ansicht von Augenhöhe)" calcext:value-type="string">
            <text:p>Gehweg nicht passierbar Seit mehreren Monaten schon ragen die Gebüsche ins Trottoir. Dazu wurde es vor ca. 1. Monat schon mal gemeldet und nichts passierte! Ist es möglich diese zurückschneiden damit man den Weg ungehindert passieren kann. Vielen Dank schon im Voraus. (Bild Ansicht von Augenhöhe)</text:p>
          </table:table-cell>
          <table:table-cell office:value-type="string" calcext:value-type="string">
            <text:p>x</text:p>
          </table:table-cell>
          <table:table-cell table:number-columns-repeated="4"/>
          <table:table-cell office:value-type="float" office:value="210" calcext:value-type="float">
            <text:p>210</text:p>
          </table:table-cell>
          <table:table-cell office:value-type="string" calcext:value-type="string">
            <text:p>Grünflächen</text:p>
          </table:table-cell>
          <table:table-cell table:style-name="ce99" office:value-type="float" office:value="0.239130434782609" calcext:value-type="float">
            <text:p>0.239</text:p>
          </table:table-cell>
          <table:table-cell/>
          <table:table-cell table:style-name="Default" table:number-columns-repeated="16366"/>
        </table:table-row>
        <table:table-row table:style-name="ro18">
          <table:table-cell office:value-type="float" office:value="33" calcext:value-type="float">
            <text:p>33</text:p>
          </table:table-cell>
          <table:table-cell office:value-type="string" calcext:value-type="string">
            <text:p>5c085fa2-553f-42ac-858c-944f3901b3ce</text:p>
          </table:table-cell>
          <table:table-cell office:value-type="string" calcext:value-type="string">
            <text:p>tree</text:p>
          </table:table-cell>
          <table:table-cell office:value-type="string" calcext:value-type="string">
            <text:p>tree,large tree,sidewalk,street,pavement</text:p>
          </table:table-cell>
          <table:table-cell office:value-type="string" calcext:value-type="string">
            <text:p><text:s/>Umsturzgefährdeter Baum Toter, umsturzgefährdeter, grosser Baum auf Privatgrundstück, aber direkt angrenzend an öffentliche Strasse und Trottoir, welches häufig von Kindern genutzt wird, gefährlich für Mensch, Autos und angrenzende Liegenschaften.</text:p>
          </table:table-cell>
          <table:table-cell office:value-type="string" calcext:value-type="string">
            <text:p>Umsturzgefährdeter Baum</text:p>
          </table:table-cell>
          <table:table-cell table:style-name="ce79" office:value-type="string" calcext:value-type="string">
            <text:p>Toter, umsturzgefährdeter, grosser Baum. Auf privatem Grundstück aber direkt angrenzend an öffentliche Strasse und Trottoir, welches häufig von Kindern genutzt wird. Gefährlich für Mensch, Autos und angrenzende Liegenschaften.</text:p>
          </table:table-cell>
          <table:table-cell table:style-name="ce79" office:value-type="string" calcext:value-type="string">
            <text:p>a tree</text:p>
          </table:table-cell>
          <table:table-cell table:style-name="ce88" table:formula="of:=[.F34]&amp;&quot; &quot;&amp;[.G34]" office:value-type="string" office:string-value="Umsturzgefährdeter Baum Toter, umsturzgefährdeter, grosser Baum. Auf privatem Grundstück aber direkt angrenzend an öffentliche Strasse und Trottoir, welches häufig von Kindern genutzt wird. Gefährlich für Mensch, Autos und angrenzende Liegenschaften." calcext:value-type="string">
            <text:p>Umsturzgefährdeter Baum Toter, umsturzgefährdeter, grosser Baum. Auf privatem Grundstück aber direkt angrenzend an öffentliche Strasse und Trottoir, welches häufig von Kindern genutzt wird. Gefährlich für Mensch, Autos und angrenzende Liegenschaften.</text:p>
          </table:table-cell>
          <table:table-cell office:value-type="string" calcext:value-type="string">
            <text:p>x</text:p>
          </table:table-cell>
          <table:table-cell table:number-columns-repeated="4"/>
          <table:table-cell office:value-type="float" office:value="230" calcext:value-type="float">
            <text:p>230</text:p>
          </table:table-cell>
          <table:table-cell office:value-type="string" calcext:value-type="string">
            <text:p>Grünflächen</text:p>
          </table:table-cell>
          <table:table-cell table:style-name="ce99" office:value-type="float" office:value="0.2" calcext:value-type="float">
            <text:p>0.200</text:p>
          </table:table-cell>
          <table:table-cell/>
          <table:table-cell table:style-name="Default" table:number-columns-repeated="16366"/>
        </table:table-row>
        <table:table-row table:style-name="ro8">
          <table:table-cell office:value-type="float" office:value="34" calcext:value-type="float">
            <text:p>34</text:p>
          </table:table-cell>
          <table:table-cell office:value-type="string" calcext:value-type="string">
            <text:p>a3ea9062-4c55-4d22-ae83-b061fca790fd</text:p>
          </table:table-cell>
          <table:table-cell office:value-type="string" calcext:value-type="string">
            <text:p>blackberry bush</text:p>
          </table:table-cell>
          <table:table-cell office:value-type="string" calcext:value-type="string">
            <text:p>blackberry bush,wall,sidewalk,street,children</text:p>
          </table:table-cell>
          <table:table-cell office:value-type="string" calcext:value-type="string">
            <text:p><text:s/>Brombeerstrauch. Es ragt über die Mauer Richtung Oberstraße, gemäss genau Richtung Trottoir raus. Die Fußgänger müssen immer wieder ausweichen, zum Teil in die Oberstraße rein. Wenn ihr es glaubt, schickt die Polizei dort vorbei. Es dauert nicht lange, bis dort ein Unfall gibt. Es gibt auch Kinder, die dort laufen. Es sind auch nicht gleich kleine Dornen.</text:p>
          </table:table-cell>
          <table:table-cell office:value-type="string" calcext:value-type="string">
            <text:p>Brombeer Strauch</text:p>
          </table:table-cell>
          <table:table-cell table:style-name="ce79" office:value-type="string" calcext:value-type="string">
            <text:p>Es ragt über die Mauer Richtung oberstrasse genau Richtung Trottoir raus die fuessgänger müssen immer wieder ausweichen zum Teil in die Oberstrasse rein! Wenn ihr es glaubt schickt die Polizei dort vorbei! Es dauert nicht lange bis dort ein Unfall gibt! Es gibt auch Kinder wo dort laufen! Es sind auch nicht gleich kleine Dornen!</text:p>
          </table:table-cell>
          <table:table-cell table:style-name="ce79" office:value-type="string" calcext:value-type="string">
            <text:p>a wall</text:p>
          </table:table-cell>
          <table:table-cell table:style-name="ce88" table:formula="of:=[.F35]&amp;&quot; &quot;&amp;[.G35]" office:value-type="string" office:string-value="Brombeer Strauch Es ragt über die Mauer Richtung oberstrasse genau Richtung Trottoir raus die fuessgänger müssen immer wieder ausweichen zum Teil in die Oberstrasse rein! Wenn ihr es glaubt schickt die Polizei dort vorbei! Es dauert nicht lange bis dort ein Unfall gibt! Es gibt auch Kinder wo dort laufen! Es sind auch nicht gleich kleine Dornen!" calcext:value-type="string">
            <text:p>Brombeer Strauch Es ragt über die Mauer Richtung oberstrasse genau Richtung Trottoir raus die fuessgänger müssen immer wieder ausweichen zum Teil in die Oberstrasse rein! Wenn ihr es glaubt schickt die Polizei dort vorbei! Es dauert nicht lange bis dort ein Unfall gibt! Es gibt auch Kinder wo dort laufen! Es sind auch nicht gleich kleine Dornen!</text:p>
          </table:table-cell>
          <table:table-cell table:number-columns-repeated="4"/>
          <table:table-cell office:value-type="string" calcext:value-type="string">
            <text:p>x</text:p>
          </table:table-cell>
          <table:table-cell office:value-type="float" office:value="350" calcext:value-type="float">
            <text:p>350</text:p>
          </table:table-cell>
          <table:table-cell office:value-type="string" calcext:value-type="string">
            <text:p>Grünflächen</text:p>
          </table:table-cell>
          <table:table-cell table:style-name="ce99" office:value-type="float" office:value="0.315789473684211" calcext:value-type="float">
            <text:p>0.316</text:p>
          </table:table-cell>
          <table:table-cell/>
          <table:table-cell table:style-name="Default" table:number-columns-repeated="16366"/>
        </table:table-row>
        <table:table-row table:style-name="ro14">
          <table:table-cell office:value-type="float" office:value="35" calcext:value-type="float">
            <text:p>35</text:p>
          </table:table-cell>
          <table:table-cell office:value-type="string" calcext:value-type="string">
            <text:p>194ec90d-f957-4525-bed8-746b60c6329b</text:p>
          </table:table-cell>
          <table:table-cell office:value-type="string" calcext:value-type="string">
            <text:p>bush</text:p>
          </table:table-cell>
          <table:table-cell office:value-type="string" calcext:value-type="string">
            <text:p>bush,bush,zebra crossing,sight,tree</text:p>
          </table:table-cell>
          <table:table-cell office:value-type="string" calcext:value-type="string">
            <text:p><text:s/>Busch versperrt Sicht. Dieser wild wachsende Busch versperrt die Sicht beim Zebrastreifen. Kinder sehen Auto nicht und umgekehrt müsste man wohl einfach abschneiden.</text:p>
          </table:table-cell>
          <table:table-cell office:value-type="string" calcext:value-type="string">
            <text:p>Busch versperrt Sicht</text:p>
          </table:table-cell>
          <table:table-cell table:style-name="ce79" office:value-type="string" calcext:value-type="string">
            <text:p>Dieser wild wachsende Busch versperrt die Sicht beim Zebrastreifen, Kinder sehen Autos nicht und umgekehrt. Müsste man wohl einfach abschneiden.</text:p>
          </table:table-cell>
          <table:table-cell table:style-name="ce79" office:value-type="string" calcext:value-type="string">
            <text:p>a bush</text:p>
          </table:table-cell>
          <table:table-cell table:style-name="ce88" table:formula="of:=[.F36]&amp;&quot; &quot;&amp;[.G36]" office:value-type="string" office:string-value="Busch versperrt Sicht Dieser wild wachsende Busch versperrt die Sicht beim Zebrastreifen, Kinder sehen Autos nicht und umgekehrt. Müsste man wohl einfach abschneiden." calcext:value-type="string">
            <text:p>Busch versperrt Sicht Dieser wild wachsende Busch versperrt die Sicht beim Zebrastreifen, Kinder sehen Autos nicht und umgekehrt. Müsste man wohl einfach abschneiden.</text:p>
          </table:table-cell>
          <table:table-cell office:value-type="string" calcext:value-type="string">
            <text:p>x</text:p>
          </table:table-cell>
          <table:table-cell table:number-columns-repeated="4"/>
          <table:table-cell office:value-type="float" office:value="152" calcext:value-type="float">
            <text:p>152</text:p>
          </table:table-cell>
          <table:table-cell office:value-type="string" calcext:value-type="string">
            <text:p>Grünflächen</text:p>
          </table:table-cell>
          <table:table-cell table:style-name="ce99" office:value-type="float" office:value="0.217391304347826" calcext:value-type="float">
            <text:p>0.217</text:p>
          </table:table-cell>
          <table:table-cell/>
          <table:table-cell table:style-name="Default" table:number-columns-repeated="16366"/>
        </table:table-row>
        <table:table-row table:style-name="ro14">
          <table:table-cell office:value-type="float" office:value="36" calcext:value-type="float">
            <text:p>36</text:p>
          </table:table-cell>
          <table:table-cell office:value-type="string" calcext:value-type="string">
            <text:p>216841c3-30b6-44bd-9a72-a7dd51bfe2a1</text:p>
          </table:table-cell>
          <table:table-cell office:value-type="string" calcext:value-type="string">
            <text:p>climbing frame</text:p>
          </table:table-cell>
          <table:table-cell office:value-type="string" calcext:value-type="string">
            <text:p>climbing frame,climbing tower,slide,playground,broken frame</text:p>
          </table:table-cell>
          <table:table-cell office:value-type="string" calcext:value-type="string">
            <text:p><text:s/>Spielplatz defekte Klettersprosse. Beim Spielplatz im Stadtpark ist eine Sprosse des Kletterturms bei der Rutsche abgeknackst und könnte bei Belastung brechen. Bitte um Ersatz.</text:p>
          </table:table-cell>
          <table:table-cell office:value-type="string" calcext:value-type="string">
            <text:p>Spielplatz - defekte Klettersprosse</text:p>
          </table:table-cell>
          <table:table-cell table:style-name="ce79" office:value-type="string" calcext:value-type="string">
            <text:p>Beim Spielplatz im Stadtpark ist eine Sprosse des Kletterturms bei der Rutsche angeknackst und könnte bei Belastung brechen. Wir bitten um Ersatz.</text:p>
          </table:table-cell>
          <table:table-cell table:style-name="ce79" office:value-type="string" calcext:value-type="string">
            <text:p>a playground</text:p>
          </table:table-cell>
          <table:table-cell table:style-name="ce88" table:formula="of:=[.F37]&amp;&quot; &quot;&amp;[.G37]" office:value-type="string" office:string-value="Spielplatz - defekte Klettersprosse Beim Spielplatz im Stadtpark ist eine Sprosse des Kletterturms bei der Rutsche angeknackst und könnte bei Belastung brechen. Wir bitten um Ersatz." calcext:value-type="string">
            <text:p>Spielplatz - defekte Klettersprosse Beim Spielplatz im Stadtpark ist eine Sprosse des Kletterturms bei der Rutsche angeknackst und könnte bei Belastung brechen. Wir bitten um Ersatz.</text:p>
          </table:table-cell>
          <table:table-cell table:number-columns-repeated="4"/>
          <table:table-cell office:value-type="string" calcext:value-type="string">
            <text:p>x</text:p>
          </table:table-cell>
          <table:table-cell office:value-type="float" office:value="124" calcext:value-type="float">
            <text:p>124</text:p>
          </table:table-cell>
          <table:table-cell office:value-type="string" calcext:value-type="string">
            <text:p>Grünflächen</text:p>
          </table:table-cell>
          <table:table-cell table:style-name="ce99" office:value-type="float" office:value="0.192307692307692" calcext:value-type="float">
            <text:p>0.192</text:p>
          </table:table-cell>
          <table:table-cell/>
          <table:table-cell table:style-name="Default" table:number-columns-repeated="16366"/>
        </table:table-row>
        <table:table-row table:style-name="ro19">
          <table:table-cell office:value-type="float" office:value="37" calcext:value-type="float">
            <text:p>37</text:p>
          </table:table-cell>
          <table:table-cell office:value-type="string" calcext:value-type="string">
            <text:p>b1bc3f44-063b-4c78-b946-3dec2c63c17c</text:p>
          </table:table-cell>
          <table:table-cell office:value-type="string" calcext:value-type="string">
            <text:p>playground</text:p>
          </table:table-cell>
          <table:table-cell office:value-type="string" calcext:value-type="string">
            <text:p>playground,swing,rubber protection,tear,fingers</text:p>
          </table:table-cell>
          <table:table-cell office:value-type="string" calcext:value-type="string">
            <text:p><text:s/>Spielplatz Stephanshorn. Die Kleinkinderschaukel hat im Gummischutz einen Riss. Kinder können sich Finger einklemmen. Vielen Dank für eine Kontrolle.</text:p>
          </table:table-cell>
          <table:table-cell office:value-type="string" calcext:value-type="string">
            <text:p>Spielplatz Stephanshorn</text:p>
          </table:table-cell>
          <table:table-cell table:style-name="ce79" office:value-type="string" calcext:value-type="string">
            <text:p>Die Kleinkinderschaukel hat im Gummischutz einen Riss. Kinder können sich die Finger einklemmen. Vielen Dank für eine Kontrolle.</text:p>
          </table:table-cell>
          <table:table-cell table:style-name="ce79" office:value-type="string" calcext:value-type="string">
            <text:p>null</text:p>
          </table:table-cell>
          <table:table-cell table:style-name="ce88" table:formula="of:=[.F38]&amp;&quot; &quot;&amp;[.G38]" office:value-type="string" office:string-value="Spielplatz Stephanshorn Die Kleinkinderschaukel hat im Gummischutz einen Riss. Kinder können sich die Finger einklemmen. Vielen Dank für eine Kontrolle." calcext:value-type="string">
            <text:p>Spielplatz Stephanshorn Die Kleinkinderschaukel hat im Gummischutz einen Riss. Kinder können sich die Finger einklemmen. Vielen Dank für eine Kontrolle.</text:p>
          </table:table-cell>
          <table:table-cell table:number-columns-repeated="4"/>
          <table:table-cell office:value-type="string" calcext:value-type="string">
            <text:p>x</text:p>
          </table:table-cell>
          <table:table-cell office:value-type="float" office:value="56" calcext:value-type="float">
            <text:p>56</text:p>
          </table:table-cell>
          <table:table-cell office:value-type="string" calcext:value-type="string">
            <text:p>Grünflächen</text:p>
          </table:table-cell>
          <table:table-cell table:style-name="ce99" office:value-type="float" office:value="0.1" calcext:value-type="float">
            <text:p>0.100</text:p>
          </table:table-cell>
          <table:table-cell/>
          <table:table-cell table:style-name="Default" table:number-columns-repeated="16366"/>
        </table:table-row>
        <table:table-row table:style-name="ro7">
          <table:table-cell office:value-type="float" office:value="38" calcext:value-type="float">
            <text:p>38</text:p>
          </table:table-cell>
          <table:table-cell office:value-type="string" calcext:value-type="string">
            <text:p>321622fb-ddfa-46b8-8488-4e8fff06276c</text:p>
          </table:table-cell>
          <table:table-cell office:value-type="string" calcext:value-type="string">
            <text:p>tree</text:p>
          </table:table-cell>
          <table:table-cell office:value-type="string" calcext:value-type="string">
            <text:p>tree,branches,sidewalk,street,bushes</text:p>
          </table:table-cell>
          <table:table-cell office:value-type="string" calcext:value-type="string">
            <text:p><text:s/>trockener baum der baum am ende der lemlisbrunnenstraße untere büschenstraße hat viele abgestorbene äste bei stürmischem wetter fallen die äste aufs trottoir und gefährden flussgänger und autos</text:p>
          </table:table-cell>
          <table:table-cell office:value-type="string" calcext:value-type="string">
            <text:p>Trockener Baum</text:p>
          </table:table-cell>
          <table:table-cell table:style-name="ce79" office:value-type="string" calcext:value-type="string">
            <text:p>Der Baum an der Ecke Lämmlisbrunnenstrasse/Untere Büschenstrasse hat viele abgestorbene Äste. Bei stürmischem Wetter fallen die Äste auf das Trottoir und gefährden Fussgänger und Autos.</text:p>
          </table:table-cell>
          <table:table-cell table:style-name="ce79" office:value-type="string" calcext:value-type="string">
            <text:p>a tree</text:p>
          </table:table-cell>
          <table:table-cell table:style-name="ce88" table:formula="of:=[.F39]&amp;&quot; &quot;&amp;[.G39]" office:value-type="string" office:string-value="Trockener Baum Der Baum an der Ecke Lämmlisbrunnenstrasse/Untere Büschenstrasse hat viele abgestorbene Äste. Bei stürmischem Wetter fallen die Äste auf das Trottoir und gefährden Fussgänger und Autos." calcext:value-type="string">
            <text:p>Trockener Baum Der Baum an der Ecke Lämmlisbrunnenstrasse/Untere Büschenstrasse hat viele abgestorbene Äste. Bei stürmischem Wetter fallen die Äste auf das Trottoir und gefährden Fussgänger und Autos.</text:p>
          </table:table-cell>
          <table:table-cell office:value-type="string" calcext:value-type="string">
            <text:p>x</text:p>
          </table:table-cell>
          <table:table-cell table:number-columns-repeated="4"/>
          <table:table-cell office:value-type="float" office:value="165" calcext:value-type="float">
            <text:p>165</text:p>
          </table:table-cell>
          <table:table-cell office:value-type="string" calcext:value-type="string">
            <text:p>Grünflächen</text:p>
          </table:table-cell>
          <table:table-cell table:style-name="ce99" office:value-type="float" office:value="0.666666666666667" calcext:value-type="float">
            <text:p>0.667</text:p>
          </table:table-cell>
          <table:table-cell/>
          <table:table-cell table:style-name="Default" table:number-columns-repeated="16366"/>
        </table:table-row>
        <table:table-row table:style-name="ro20">
          <table:table-cell table:style-name="ce71" office:value-type="float" office:value="39" calcext:value-type="float">
            <text:p>39</text:p>
          </table:table-cell>
          <table:table-cell table:style-name="ce71" office:value-type="string" calcext:value-type="string">
            <text:p>202714bd-c373-45e5-bc1a-3f32f8eb94e5</text:p>
          </table:table-cell>
          <table:table-cell table:style-name="ce71" office:value-type="string" calcext:value-type="string">
            <text:p>owl</text:p>
          </table:table-cell>
          <table:table-cell table:style-name="ce71" office:value-type="string" calcext:value-type="string">
            <text:p>owl,park,pedestal,grass</text:p>
          </table:table-cell>
          <table:table-cell table:style-name="ce80" office:value-type="string" calcext:value-type="string">
            <text:p><text:s/>Eule im Kantipark. Im Kantipark wurde die Eule vom Sockel entfernt und auf die Wiese gestellt.</text:p>
          </table:table-cell>
          <table:table-cell table:style-name="ce71" office:value-type="string" calcext:value-type="string">
            <text:p>Eule im Kantipark</text:p>
          </table:table-cell>
          <table:table-cell table:style-name="ce80" office:value-type="string" calcext:value-type="string">
            <text:p>Im Kantipark wurde die Eule vom Sockel entfernt und auf die Wiese gestellt.</text:p>
          </table:table-cell>
          <table:table-cell table:style-name="ce80" office:value-type="string" calcext:value-type="string">
            <text:p>a owl</text:p>
          </table:table-cell>
          <table:table-cell table:style-name="ce89" table:formula="of:=[.F40]&amp;&quot; &quot;&amp;[.G40]" office:value-type="string" office:string-value="Eule im Kantipark Im Kantipark wurde die Eule vom Sockel entfernt und auf die Wiese gestellt." calcext:value-type="string">
            <text:p>Eule im Kantipark Im Kantipark wurde die Eule vom Sockel entfernt und auf die Wiese gestellt.</text:p>
          </table:table-cell>
          <table:table-cell table:style-name="ce71" office:value-type="string" calcext:value-type="string">
            <text:p>x</text:p>
          </table:table-cell>
          <table:table-cell table:style-name="ce71" table:number-columns-repeated="4"/>
          <table:table-cell table:style-name="ce71" office:value-type="float" office:value="145" calcext:value-type="float">
            <text:p>145</text:p>
          </table:table-cell>
          <table:table-cell office:value-type="string" calcext:value-type="string">
            <text:p>Grünflächen</text:p>
          </table:table-cell>
          <table:table-cell table:style-name="ce30" office:value-type="float" office:value="0.0625" calcext:value-type="float">
            <text:p>0.063</text:p>
          </table:table-cell>
          <table:table-cell/>
          <table:table-cell table:style-name="ce71" table:number-columns-repeated="16366"/>
        </table:table-row>
        <table:table-row table:style-name="ro3">
          <table:table-cell office:value-type="float" office:value="40" calcext:value-type="float">
            <text:p>40</text:p>
          </table:table-cell>
          <table:table-cell office:value-type="string" calcext:value-type="string">
            <text:p>7fcee746-1a7f-4476-a5a7-918a0201639b</text:p>
          </table:table-cell>
          <table:table-cell office:value-type="string" calcext:value-type="string">
            <text:p>hedge</text:p>
          </table:table-cell>
          <table:table-cell office:value-type="string" calcext:value-type="string">
            <text:p>hedge,hedge,foliage,plant,sidewalk</text:p>
          </table:table-cell>
          <table:table-cell office:value-type="string" calcext:value-type="string">
            <text:p><text:s/>Hecke ragt auf Trottoir. Die Hecke wuchert und wächst über das Trottoir. Vielen Dank, dass Sie sich darum kümmern.</text:p>
          </table:table-cell>
          <table:table-cell office:value-type="string" calcext:value-type="string">
            <text:p>Hecke ragt auf Trottoir</text:p>
          </table:table-cell>
          <table:table-cell table:style-name="ce79" office:value-type="string" calcext:value-type="string">
            <text:p>Die Hecke wuchert und wächst über das Trottoir. Vielen Dank dass Sie sich darum kümmern.</text:p>
          </table:table-cell>
          <table:table-cell table:style-name="ce79" office:value-type="string" calcext:value-type="string">
            <text:p>a hedge</text:p>
          </table:table-cell>
          <table:table-cell table:style-name="ce88" table:formula="of:=[.F41]&amp;&quot; &quot;&amp;[.G41]" office:value-type="string" office:string-value="Hecke ragt auf Trottoir Die Hecke wuchert und wächst über das Trottoir. Vielen Dank dass Sie sich darum kümmern." calcext:value-type="string">
            <text:p>Hecke ragt auf Trottoir Die Hecke wuchert und wächst über das Trottoir. Vielen Dank dass Sie sich darum kümmern.</text:p>
          </table:table-cell>
          <table:table-cell office:value-type="string" calcext:value-type="string">
            <text:p>x</text:p>
          </table:table-cell>
          <table:table-cell table:number-columns-repeated="4"/>
          <table:table-cell office:value-type="float" office:value="154" calcext:value-type="float">
            <text:p>154</text:p>
          </table:table-cell>
          <table:table-cell office:value-type="string" calcext:value-type="string">
            <text:p>Grünflächen</text:p>
          </table:table-cell>
          <table:table-cell table:style-name="ce99" office:value-type="float" office:value="0.105263157894737" calcext:value-type="float">
            <text:p>0.105</text:p>
          </table:table-cell>
          <table:table-cell/>
          <table:table-cell table:style-name="Default" table:number-columns-repeated="16366"/>
        </table:table-row>
        <table:table-row table:style-name="ro14">
          <table:table-cell table:style-name="ce71" office:value-type="float" office:value="41" calcext:value-type="float">
            <text:p>41</text:p>
          </table:table-cell>
          <table:table-cell table:style-name="ce71" office:value-type="string" calcext:value-type="string">
            <text:p>74cc0bcc-725a-4889-b0d0-4436dd56aad5</text:p>
          </table:table-cell>
          <table:table-cell table:style-name="ce71" office:value-type="string" calcext:value-type="string">
            <text:p>tree</text:p>
          </table:table-cell>
          <table:table-cell table:style-name="ce71" office:value-type="string" calcext:value-type="string">
            <text:p>tree,supports,triangle,wind</text:p>
          </table:table-cell>
          <table:table-cell table:style-name="ce80" office:value-type="string" calcext:value-type="string">
            <text:p><text:s/>Baum gefährdet. Beim Wind neigt sich der Baum bedenklich im Wind hin und her. Die Stützen sollten sicherheitshalber übers Dreieck stabilisiert werden.</text:p>
          </table:table-cell>
          <table:table-cell table:style-name="ce71" office:value-type="string" calcext:value-type="string">
            <text:p>Baum gefährdet</text:p>
          </table:table-cell>
          <table:table-cell table:style-name="ce80" office:value-type="string" calcext:value-type="string">
            <text:p>Bei Wind neigt sich der Baum bedenklich im Wind hin und her. Die Stützen sollten sicherheitshalber übers Dreieck stabilisiert werden.</text:p>
          </table:table-cell>
          <table:table-cell table:style-name="ce80" office:value-type="string" calcext:value-type="string">
            <text:p>a tree</text:p>
          </table:table-cell>
          <table:table-cell table:style-name="ce89" table:formula="of:=[.F42]&amp;&quot; &quot;&amp;[.G42]" office:value-type="string" office:string-value="Baum gefährdet Bei Wind neigt sich der Baum bedenklich im Wind hin und her. Die Stützen sollten sicherheitshalber übers Dreieck stabilisiert werden." calcext:value-type="string">
            <text:p>Baum gefährdet Bei Wind neigt sich der Baum bedenklich im Wind hin und her. Die Stützen sollten sicherheitshalber übers Dreieck stabilisiert werden.</text:p>
          </table:table-cell>
          <table:table-cell table:style-name="ce71" office:value-type="string" calcext:value-type="string">
            <text:p>x</text:p>
          </table:table-cell>
          <table:table-cell table:style-name="ce71" table:number-columns-repeated="4"/>
          <table:table-cell table:style-name="ce71" office:value-type="float" office:value="93" calcext:value-type="float">
            <text:p>93</text:p>
          </table:table-cell>
          <table:table-cell office:value-type="string" calcext:value-type="string">
            <text:p>Grünflächen</text:p>
          </table:table-cell>
          <table:table-cell table:style-name="ce30" office:value-type="float" office:value="0.0909090909090909" calcext:value-type="float">
            <text:p>0.091</text:p>
          </table:table-cell>
          <table:table-cell/>
          <table:table-cell table:style-name="ce71" table:number-columns-repeated="16366"/>
        </table:table-row>
        <table:table-row table:style-name="ro12">
          <table:table-cell office:value-type="float" office:value="42" calcext:value-type="float">
            <text:p>42</text:p>
          </table:table-cell>
          <table:table-cell office:value-type="string" calcext:value-type="string">
            <text:p>49a4a986-64e1-4eaa-a075-4f061d1704d2</text:p>
          </table:table-cell>
          <table:table-cell office:value-type="string" calcext:value-type="string">
            <text:p>candelabra</text:p>
          </table:table-cell>
          <table:table-cell office:value-type="string" calcext:value-type="string">
            <text:p>candelabra,light,trees,public ground,light</text:p>
          </table:table-cell>
          <table:table-cell office:value-type="string" calcext:value-type="string">
            <text:p><text:s/>Kandelaber zugewachsen und fehlende Baumpflege. Der Kandelaber im Priemelweg gegenüber der Hausnummer 16 ist komplett zugewachsen. Das Licht beleuchtet die Umgebung nicht mehr. Außerdem müssten die Bäume, die auf öffentlichem Grund stehen, gepflegt werden.</text:p>
          </table:table-cell>
          <table:table-cell office:value-type="string" calcext:value-type="string">
            <text:p>Kandelaber zugewachsen &amp; fehlende Baumpflege</text:p>
          </table:table-cell>
          <table:table-cell table:style-name="ce79" office:value-type="string" calcext:value-type="string">
            <text:p>Der Kandelaber im Primelweg gegenüber der Hausnummer 16 ist komplett zugewachsen; das Licht beleuchtet die Umgebung nicht mehr. Ausserdem müssten die Bäume, die auf öffentlichem Grund stehen, gepflegt werden.</text:p>
          </table:table-cell>
          <table:table-cell table:style-name="ce79" office:value-type="string" calcext:value-type="string">
            <text:p>a trees</text:p>
          </table:table-cell>
          <table:table-cell table:style-name="ce88" table:formula="of:=[.F43]&amp;&quot; &quot;&amp;[.G43]" office:value-type="string" office:string-value="Kandelaber zugewachsen &amp; fehlende Baumpflege Der Kandelaber im Primelweg gegenüber der Hausnummer 16 ist komplett zugewachsen; das Licht beleuchtet die Umgebung nicht mehr. Ausserdem müssten die Bäume, die auf öffentlichem Grund stehen, gepflegt werden." calcext:value-type="string">
            <text:p>Kandelaber zugewachsen &amp; fehlende Baumpflege Der Kandelaber im Primelweg gegenüber der Hausnummer 16 ist komplett zugewachsen; das Licht beleuchtet die Umgebung nicht mehr. Ausserdem müssten die Bäume, die auf öffentlichem Grund stehen, gepflegt werden.</text:p>
          </table:table-cell>
          <table:table-cell office:value-type="string" calcext:value-type="string">
            <text:p>x</text:p>
          </table:table-cell>
          <table:table-cell table:number-columns-repeated="4"/>
          <table:table-cell office:value-type="float" office:value="152" calcext:value-type="float">
            <text:p>152</text:p>
          </table:table-cell>
          <table:table-cell office:value-type="string" calcext:value-type="string">
            <text:p>Grünflächen</text:p>
          </table:table-cell>
          <table:table-cell table:style-name="ce99" office:value-type="float" office:value="0.176470588235294" calcext:value-type="float">
            <text:p>0.176</text:p>
          </table:table-cell>
          <table:table-cell/>
          <table:table-cell table:style-name="Default" table:number-columns-repeated="16366"/>
        </table:table-row>
        <table:table-row table:style-name="ro21">
          <table:table-cell office:value-type="float" office:value="43" calcext:value-type="float">
            <text:p>43</text:p>
          </table:table-cell>
          <table:table-cell office:value-type="string" calcext:value-type="string">
            <text:p>bf4d9197-956a-45e8-9b00-ae5cbd8daa93</text:p>
          </table:table-cell>
          <table:table-cell office:value-type="string" calcext:value-type="string">
            <text:p>flowers</text:p>
          </table:table-cell>
          <table:table-cell office:value-type="string" calcext:value-type="string">
            <text:p>flowers,flower,garden,color combination,artists</text:p>
          </table:table-cell>
          <table:table-cell office:value-type="string" calcext:value-type="string">
            <text:p><text:s/>Blumen. Ich spazierte heute durch den Stadtpark und sehe die Blumenpracht. Ich bin so begeistert und konnte mich nicht satt sehen von dieser Farbkombi. Ich weiss ja nicht, wie sie das machen. Würde ich das machen, hätte ich vermutlich ein Farbchaos veranstaltet. Ein ganz grosses Lob an die Farbkünstler und Gärtner, die das ganz so schön harmonisch und wunderschön gestalten haben. Vielen Dank.</text:p>
          </table:table-cell>
          <table:table-cell office:value-type="string" calcext:value-type="string">
            <text:p>Blumen</text:p>
          </table:table-cell>
          <table:table-cell table:style-name="ce79" office:value-type="string" calcext:value-type="string">
            <text:p>Ich spazierte heute durch den Stadtpark und und sehe diese Blumenpracht. Ich bin so begeistert und konnte mich nicht satt sehen von dieser Farbkombi. Ich weiss ja nicht wie sie dass machen, würde ich das machen, hätte ich vermutlich ein Farbchaos veranstaltet🙈 ein ganz grosses Lob an die Farkünstler und „Gärtner“ die das ganz so harmonisch und wunderschön gestaltet haben. Vielen Dank!</text:p>
          </table:table-cell>
          <table:table-cell table:style-name="ce79" office:value-type="string" calcext:value-type="string">
            <text:p>a flowers</text:p>
          </table:table-cell>
          <table:table-cell table:style-name="ce88" table:formula="of:=[.F44]&amp;&quot; &quot;&amp;[.G44]" office:value-type="string" office:string-value="Blumen Ich spazierte heute durch den Stadtpark und und sehe diese Blumenpracht. Ich bin so begeistert und konnte mich nicht satt sehen von dieser Farbkombi. Ich weiss ja nicht wie sie dass machen, würde ich das machen, hätte ich vermutlich ein Farbchaos veranstaltet🙈 ein ganz grosses Lob an die Farkünstler und „Gärtner“ die das ganz so harmonisch und wunderschön gestaltet haben. Vielen Dank!" calcext:value-type="string">
            <text:p>Blumen Ich spazierte heute durch den Stadtpark und und sehe diese Blumenpracht. Ich bin so begeistert und konnte mich nicht satt sehen von dieser Farbkombi. Ich weiss ja nicht wie sie dass machen, würde ich das machen, hätte ich vermutlich ein Farbchaos veranstaltet🙈 ein ganz grosses Lob an die Farkünstler und „Gärtner“ die das ganz so harmonisch und wunderschön gestaltet haben. Vielen Dank!</text:p>
          </table:table-cell>
          <table:table-cell office:value-type="string" calcext:value-type="string">
            <text:p>x</text:p>
          </table:table-cell>
          <table:table-cell table:number-columns-repeated="4"/>
          <table:table-cell office:value-type="float" office:value="158" calcext:value-type="float">
            <text:p>158</text:p>
          </table:table-cell>
          <table:table-cell office:value-type="string" calcext:value-type="string">
            <text:p>Grünflächen</text:p>
          </table:table-cell>
          <table:table-cell table:style-name="ce99" office:value-type="float" office:value="0.222222222222222" calcext:value-type="float">
            <text:p>0.222</text:p>
          </table:table-cell>
          <table:table-cell/>
          <table:table-cell table:style-name="Default" table:number-columns-repeated="16366"/>
        </table:table-row>
        <table:table-row table:style-name="ro3">
          <table:table-cell office:value-type="float" office:value="44" calcext:value-type="float">
            <text:p>44</text:p>
          </table:table-cell>
          <table:table-cell office:value-type="string" calcext:value-type="string">
            <text:p>cc376725-a3d7-4426-ba10-0820c4e39d83</text:p>
          </table:table-cell>
          <table:table-cell table:style-name="ce79" office:value-type="string" calcext:value-type="string">
            <text:p>Haag</text:p>
          </table:table-cell>
          <table:table-cell office:value-type="string" calcext:value-type="string">
            <text:p>Haag,entrance,Hagenbuchwald</text:p>
          </table:table-cell>
          <table:table-cell office:value-type="string" calcext:value-type="string">
            <text:p><text:s/>Haag defekt. Beim Spielplätzli, beim Eingang zum Hagenbuchwald ist der Haag defekt.</text:p>
          </table:table-cell>
          <table:table-cell office:value-type="string" calcext:value-type="string">
            <text:p>Hag defekt</text:p>
          </table:table-cell>
          <table:table-cell table:style-name="ce79" office:value-type="string" calcext:value-type="string">
            <text:p>Beim Spielplätzli beim Eingang zum Hagenbuchwald ist der Hag defekt</text:p>
          </table:table-cell>
          <table:table-cell office:value-type="string" calcext:value-type="string">
            <text:p>null</text:p>
          </table:table-cell>
          <table:table-cell table:style-name="ce88" table:formula="of:=[.F45]&amp;&quot; &quot;&amp;[.G45]" office:value-type="string" office:string-value="Hag defekt Beim Spielplätzli beim Eingang zum Hagenbuchwald ist der Hag defekt" calcext:value-type="string">
            <text:p>Hag defekt Beim Spielplätzli beim Eingang zum Hagenbuchwald ist der Hag defekt</text:p>
          </table:table-cell>
          <table:table-cell table:number-columns-repeated="2"/>
          <table:table-cell office:value-type="string" calcext:value-type="string">
            <text:p>x</text:p>
          </table:table-cell>
          <table:table-cell table:number-columns-repeated="2"/>
          <table:table-cell office:value-type="float" office:value="25" calcext:value-type="float">
            <text:p>25</text:p>
          </table:table-cell>
          <table:table-cell office:value-type="string" calcext:value-type="string">
            <text:p>Grünflächen</text:p>
          </table:table-cell>
          <table:table-cell table:style-name="ce99" office:value-type="float" office:value="0.416666666666667" calcext:value-type="float">
            <text:p>0.417</text:p>
          </table:table-cell>
          <table:table-cell/>
          <table:table-cell table:style-name="Default" table:number-columns-repeated="16366"/>
        </table:table-row>
        <table:table-row table:style-name="ro3">
          <table:table-cell office:value-type="float" office:value="45" calcext:value-type="float">
            <text:p>45</text:p>
          </table:table-cell>
          <table:table-cell office:value-type="string" calcext:value-type="string">
            <text:p>9644ed67-535b-4f1d-aef1-f537a15b8f63</text:p>
          </table:table-cell>
          <table:table-cell office:value-type="string" calcext:value-type="string">
            <text:p>tree</text:p>
          </table:table-cell>
          <table:table-cell office:value-type="string" calcext:value-type="string">
            <text:p>tree,tree,branch,stream,bank</text:p>
          </table:table-cell>
          <table:table-cell office:value-type="string" calcext:value-type="string">
            <text:p><text:s/>Baum geknickt. Einer der frisch eingepflanzten Bäume beim renaturierten Bach ist eingeknickt.</text:p>
          </table:table-cell>
          <table:table-cell office:value-type="string" calcext:value-type="string">
            <text:p>Baum geknickt</text:p>
          </table:table-cell>
          <table:table-cell table:style-name="ce79" office:value-type="string" calcext:value-type="string">
            <text:p>Einer der frisch eingepflanzten Bäume beim renaturierten Bach ist geknickt.</text:p>
          </table:table-cell>
          <table:table-cell table:style-name="ce79" office:value-type="string" calcext:value-type="string">
            <text:p>a tree</text:p>
          </table:table-cell>
          <table:table-cell table:style-name="ce88" table:formula="of:=[.F46]&amp;&quot; &quot;&amp;[.G46]" office:value-type="string" office:string-value="Baum geknickt Einer der frisch eingepflanzten Bäume beim renaturierten Bach ist geknickt." calcext:value-type="string">
            <text:p>Baum geknickt Einer der frisch eingepflanzten Bäume beim renaturierten Bach ist geknickt.</text:p>
          </table:table-cell>
          <table:table-cell office:value-type="string" calcext:value-type="string">
            <text:p>x</text:p>
          </table:table-cell>
          <table:table-cell table:number-columns-repeated="4"/>
          <table:table-cell office:value-type="float" office:value="301" calcext:value-type="float">
            <text:p>301</text:p>
          </table:table-cell>
          <table:table-cell office:value-type="string" calcext:value-type="string">
            <text:p>Grünflächen</text:p>
          </table:table-cell>
          <table:table-cell table:style-name="ce99" office:value-type="float" office:value="0.166666666666667" calcext:value-type="float">
            <text:p>0.167</text:p>
          </table:table-cell>
          <table:table-cell/>
          <table:table-cell table:style-name="Default" table:number-columns-repeated="16366"/>
        </table:table-row>
        <table:table-row table:style-name="ro3">
          <table:table-cell table:style-name="ce72" office:value-type="float" office:value="46" calcext:value-type="float">
            <text:p>46</text:p>
          </table:table-cell>
          <table:table-cell table:style-name="ce72" office:value-type="string" calcext:value-type="string">
            <text:p>33d38b88-e5f6-4168-a812-ec8ada70c1ed</text:p>
          </table:table-cell>
          <table:table-cell table:style-name="ce72" office:value-type="string" calcext:value-type="string">
            <text:p>tree</text:p>
          </table:table-cell>
          <table:table-cell table:style-name="ce72" office:value-type="string" calcext:value-type="string">
            <text:p>tree,young tree,Lindeli,storm</text:p>
          </table:table-cell>
          <table:table-cell table:style-name="ce81" office:value-type="string" calcext:value-type="string">
            <text:p><text:s/>Baum umgeknickt. Beim Sturm am 31.07. ist dieser junge Baum auf dem Lindeli umgeknickt abgebrochen.</text:p>
          </table:table-cell>
          <table:table-cell table:style-name="ce72" office:value-type="string" calcext:value-type="string">
            <text:p>Baum umgeknickt</text:p>
          </table:table-cell>
          <table:table-cell table:style-name="ce81" office:value-type="string" calcext:value-type="string">
            <text:p>Beim Sturm am 31.7. ist dieser junge Baum auf dem Lindeli umgeknickt/abgebrochen.</text:p>
          </table:table-cell>
          <table:table-cell table:style-name="ce81" office:value-type="string" calcext:value-type="string">
            <text:p>a tree</text:p>
          </table:table-cell>
          <table:table-cell table:style-name="ce90" table:formula="of:=[.F47]&amp;&quot; &quot;&amp;[.G47]" office:value-type="string" office:string-value="Baum umgeknickt Beim Sturm am 31.7. ist dieser junge Baum auf dem Lindeli umgeknickt/abgebrochen." calcext:value-type="string">
            <text:p>Baum umgeknickt Beim Sturm am 31.7. ist dieser junge Baum auf dem Lindeli umgeknickt/abgebrochen.</text:p>
          </table:table-cell>
          <table:table-cell table:style-name="ce72" table:number-columns-repeated="4"/>
          <table:table-cell table:style-name="ce72" office:value-type="string" calcext:value-type="string">
            <text:p>x</text:p>
          </table:table-cell>
          <table:table-cell table:style-name="ce72" office:value-type="float" office:value="102" calcext:value-type="float">
            <text:p>102</text:p>
          </table:table-cell>
          <table:table-cell office:value-type="string" calcext:value-type="string">
            <text:p>Grünflächen</text:p>
          </table:table-cell>
          <table:table-cell table:style-name="ce32" office:value-type="float" office:value="0.285714285714286" calcext:value-type="float">
            <text:p>0.286</text:p>
          </table:table-cell>
          <table:table-cell/>
          <table:table-cell table:style-name="ce72" table:number-columns-repeated="16366"/>
        </table:table-row>
        <table:table-row table:style-name="ro19">
          <table:table-cell office:value-type="float" office:value="47" calcext:value-type="float">
            <text:p>47</text:p>
          </table:table-cell>
          <table:table-cell office:value-type="string" calcext:value-type="string">
            <text:p>031b03af-d667-4231-8027-a07cff3b1019</text:p>
          </table:table-cell>
          <table:table-cell office:value-type="string" calcext:value-type="string">
            <text:p>tree</text:p>
          </table:table-cell>
          <table:table-cell office:value-type="string" calcext:value-type="string">
            <text:p>tree,soil,leaves,ground,water</text:p>
          </table:table-cell>
          <table:table-cell office:value-type="string" calcext:value-type="string">
            <text:p><text:s/>Wassermangel. Der Baum hat zu wenig Wasser. Der Boden um den Baum herum ist gelb und er verliert Blätter. Sieht aus wie im Herbst. Bitte wässern.</text:p>
          </table:table-cell>
          <table:table-cell office:value-type="string" calcext:value-type="string">
            <text:p>Wassermangel</text:p>
          </table:table-cell>
          <table:table-cell table:style-name="ce79" office:value-type="string" calcext:value-type="string">
            <text:p>Der Baum hat zu wenig Wasser. Der Boden um den Baum herum ist gelb, und er verliert Blätter. Sieht aus wie im Herbst. Bitte wässern.</text:p>
          </table:table-cell>
          <table:table-cell table:style-name="ce79" office:value-type="string" calcext:value-type="string">
            <text:p>a tree</text:p>
          </table:table-cell>
          <table:table-cell table:style-name="ce88" table:formula="of:=[.F48]&amp;&quot; &quot;&amp;[.G48]" office:value-type="string" office:string-value="Wassermangel Der Baum hat zu wenig Wasser. Der Boden um den Baum herum ist gelb, und er verliert Blätter. Sieht aus wie im Herbst. Bitte wässern." calcext:value-type="string">
            <text:p>Wassermangel Der Baum hat zu wenig Wasser. Der Boden um den Baum herum ist gelb, und er verliert Blätter. Sieht aus wie im Herbst. Bitte wässern.</text:p>
          </table:table-cell>
          <table:table-cell office:value-type="string" calcext:value-type="string">
            <text:p>x</text:p>
          </table:table-cell>
          <table:table-cell table:number-columns-repeated="4"/>
          <table:table-cell office:value-type="float" office:value="975" calcext:value-type="float">
            <text:p>975</text:p>
          </table:table-cell>
          <table:table-cell office:value-type="string" calcext:value-type="string">
            <text:p>Grünflächen</text:p>
          </table:table-cell>
          <table:table-cell table:style-name="ce99" office:value-type="float" office:value="0.0769230769230769" calcext:value-type="float">
            <text:p>0.077</text:p>
          </table:table-cell>
          <table:table-cell/>
          <table:table-cell table:style-name="Default" table:number-columns-repeated="16366"/>
        </table:table-row>
        <table:table-row table:style-name="ro14">
          <table:table-cell office:value-type="float" office:value="48" calcext:value-type="float">
            <text:p>48</text:p>
          </table:table-cell>
          <table:table-cell office:value-type="string" calcext:value-type="string">
            <text:p>c7c638a9-d09d-4cee-89eb-0879a76fcd07</text:p>
          </table:table-cell>
          <table:table-cell office:value-type="string" calcext:value-type="string">
            <text:p>plants</text:p>
          </table:table-cell>
          <table:table-cell office:value-type="string" calcext:value-type="string">
            <text:p>plants,sidewalk,pavement,pedestrians,Wildeckstraße</text:p>
          </table:table-cell>
          <table:table-cell office:value-type="string" calcext:value-type="string">
            <text:p><text:s/>Alle Jahre wieder an der schmalsten Stelle am Ende der Wildeckstraße ragen die Pflanzen ins Trottoir und drängen die Fussgänger und Fussgängerinnen auf die Straße.</text:p>
          </table:table-cell>
          <table:table-cell office:value-type="string" calcext:value-type="string">
            <text:p>Alle Jahre wieder</text:p>
          </table:table-cell>
          <table:table-cell table:style-name="ce79" office:value-type="string" calcext:value-type="string">
            <text:p>An der schmalsten Stelle am Ende der Wildeggstrasse ragen die Pflanzen ins Trottoir und drängen die Fussgänger und Fussgängerinnen auf die Strasse.</text:p>
          </table:table-cell>
          <table:table-cell table:style-name="ce79" office:value-type="string" calcext:value-type="string">
            <text:p>a plants</text:p>
          </table:table-cell>
          <table:table-cell table:style-name="ce88" table:formula="of:=[.F49]&amp;&quot; &quot;&amp;[.G49]" office:value-type="string" office:string-value="Alle Jahre wieder An der schmalsten Stelle am Ende der Wildeggstrasse ragen die Pflanzen ins Trottoir und drängen die Fussgänger und Fussgängerinnen auf die Strasse." calcext:value-type="string">
            <text:p>Alle Jahre wieder An der schmalsten Stelle am Ende der Wildeggstrasse ragen die Pflanzen ins Trottoir und drängen die Fussgänger und Fussgängerinnen auf die Strasse.</text:p>
          </table:table-cell>
          <table:table-cell office:value-type="string" calcext:value-type="string">
            <text:p>x</text:p>
          </table:table-cell>
          <table:table-cell table:number-columns-repeated="4"/>
          <table:table-cell office:value-type="float" office:value="350" calcext:value-type="float">
            <text:p>350</text:p>
          </table:table-cell>
          <table:table-cell office:value-type="string" calcext:value-type="string">
            <text:p>Grünflächen</text:p>
          </table:table-cell>
          <table:table-cell table:style-name="ce99" office:value-type="float" office:value="0.12" calcext:value-type="float">
            <text:p>0.120</text:p>
          </table:table-cell>
          <table:table-cell/>
          <table:table-cell table:style-name="Default" table:number-columns-repeated="16366"/>
        </table:table-row>
        <table:table-row table:style-name="ro9">
          <table:table-cell office:value-type="float" office:value="49" calcext:value-type="float">
            <text:p>49</text:p>
          </table:table-cell>
          <table:table-cell office:value-type="string" calcext:value-type="string">
            <text:p>0323c413-5ace-41ef-8153-3f9bb4d43fad</text:p>
          </table:table-cell>
          <table:table-cell office:value-type="string" calcext:value-type="string">
            <text:p>fallen tree</text:p>
          </table:table-cell>
          <table:table-cell office:value-type="string" calcext:value-type="string">
            <text:p>fallen tree,tree,storm</text:p>
          </table:table-cell>
          <table:table-cell office:value-type="string" calcext:value-type="string">
            <text:p><text:s/>Umgestürzter Baum scheint den letzten Sturm leider nicht überstanden zu haben.</text:p>
          </table:table-cell>
          <table:table-cell office:value-type="string" calcext:value-type="string">
            <text:p>Umgestürzter Baum</text:p>
          </table:table-cell>
          <table:table-cell table:style-name="ce79" office:value-type="string" calcext:value-type="string">
            <text:p>Scheint den letzten Sturm leider nicht überstanden zu haben.</text:p>
          </table:table-cell>
          <table:table-cell table:style-name="ce79" office:value-type="string" calcext:value-type="string">
            <text:p>a fallen tree</text:p>
          </table:table-cell>
          <table:table-cell table:style-name="ce88" table:formula="of:=[.F50]&amp;&quot; &quot;&amp;[.G50]" office:value-type="string" office:string-value="Umgestürzter Baum Scheint den letzten Sturm leider nicht überstanden zu haben." calcext:value-type="string">
            <text:p>Umgestürzter Baum Scheint den letzten Sturm leider nicht überstanden zu haben.</text:p>
          </table:table-cell>
          <table:table-cell office:value-type="string" calcext:value-type="string">
            <text:p>x</text:p>
          </table:table-cell>
          <table:table-cell table:number-columns-repeated="4"/>
          <table:table-cell office:value-type="float" office:value="110" calcext:value-type="float">
            <text:p>110</text:p>
          </table:table-cell>
          <table:table-cell office:value-type="string" calcext:value-type="string">
            <text:p>Grünflächen</text:p>
          </table:table-cell>
          <table:table-cell table:style-name="ce99" office:value-type="float" office:value="0.0909090909090909" calcext:value-type="float">
            <text:p>0.091</text:p>
          </table:table-cell>
          <table:table-cell/>
          <table:table-cell table:style-name="Default" table:number-columns-repeated="16366"/>
        </table:table-row>
        <table:table-row table:style-name="ro22">
          <table:table-cell table:style-name="ce72" office:value-type="float" office:value="50" calcext:value-type="float">
            <text:p>50</text:p>
          </table:table-cell>
          <table:table-cell table:style-name="ce72" office:value-type="string" calcext:value-type="string">
            <text:p>9952af4f-6512-4dfb-8937-f272cfeb77ed</text:p>
          </table:table-cell>
          <table:table-cell table:style-name="ce72" office:value-type="string" calcext:value-type="string">
            <text:p>bench</text:p>
          </table:table-cell>
          <table:table-cell table:style-name="ce72" office:value-type="string" calcext:value-type="string">
            <text:p>bench,seat,seating,furniture</text:p>
          </table:table-cell>
          <table:table-cell table:style-name="ce81" office:value-type="string" calcext:value-type="string">
            <text:p><text:s/>Sitzbänke abgebaut. Schade, dass Sie an diversen Orten die Sitzbänke abgeschraubt haben. Gerade zu Covid-Zeiten wäre es sinnvoll, wenn solche Sachen zur Verfügung stehen würden. Diverse Leute sprechen nicht gerade positiv über die Verantwortlichen.</text:p>
          </table:table-cell>
          <table:table-cell table:style-name="ce72" office:value-type="string" calcext:value-type="string">
            <text:p>Sitzbänke abgebaut</text:p>
          </table:table-cell>
          <table:table-cell table:style-name="ce81" office:value-type="string" calcext:value-type="string">
            <text:p>Schade, dass Sie an diversen Orten die Sitzbänke abgebaut haben. Gerade zu Covid Zeiten wäre es sinnvoll, wenn solche Sachen zur Verfügung stehen würden. Diverse Leute sprechen nicht gerade positiv über die Verantwortlichen.</text:p>
          </table:table-cell>
          <table:table-cell table:style-name="ce81" office:value-type="string" calcext:value-type="string">
            <text:p>null</text:p>
          </table:table-cell>
          <table:table-cell table:style-name="ce90" table:formula="of:=[.F51]&amp;&quot; &quot;&amp;[.G51]" office:value-type="string" office:string-value="Sitzbänke abgebaut Schade, dass Sie an diversen Orten die Sitzbänke abgebaut haben. Gerade zu Covid Zeiten wäre es sinnvoll, wenn solche Sachen zur Verfügung stehen würden. Diverse Leute sprechen nicht gerade positiv über die Verantwortlichen." calcext:value-type="string">
            <text:p>Sitzbänke abgebaut Schade, dass Sie an diversen Orten die Sitzbänke abgebaut haben. Gerade zu Covid Zeiten wäre es sinnvoll, wenn solche Sachen zur Verfügung stehen würden. Diverse Leute sprechen nicht gerade positiv über die Verantwortlichen.</text:p>
          </table:table-cell>
          <table:table-cell table:style-name="ce72" office:value-type="string" calcext:value-type="string">
            <text:p>x</text:p>
          </table:table-cell>
          <table:table-cell table:style-name="ce72" table:number-columns-repeated="4"/>
          <table:table-cell table:style-name="ce72" office:value-type="float" office:value="45" calcext:value-type="float">
            <text:p>45</text:p>
          </table:table-cell>
          <table:table-cell office:value-type="string" calcext:value-type="string">
            <text:p>Grünflächen</text:p>
          </table:table-cell>
          <table:table-cell table:style-name="ce32" office:value-type="float" office:value="0.114285714285714" calcext:value-type="float">
            <text:p>0.114</text:p>
          </table:table-cell>
          <table:table-cell/>
          <table:table-cell table:style-name="ce72" table:number-columns-repeated="16366"/>
        </table:table-row>
        <table:table-row table:style-name="ro23">
          <table:table-cell office:value-type="float" office:value="51" calcext:value-type="float">
            <text:p>51</text:p>
          </table:table-cell>
          <table:table-cell office:value-type="string" calcext:value-type="string">
            <text:p>69e2dc47-36cb-4c35-9906-c1b6eb51704f</text:p>
          </table:table-cell>
          <table:table-cell office:value-type="string" calcext:value-type="string">
            <text:p>light signal</text:p>
          </table:table-cell>
          <table:table-cell office:value-type="string" calcext:value-type="string">
            <text:p>light signal,light signal,street,street</text:p>
          </table:table-cell>
          <table:table-cell office:value-type="string" calcext:value-type="string">
            <text:p><text:s/>Lichtsignal. Wenn man von der Hagenbuchstraße oben in die Flurhofstraße kommt, sieht man das Lichtsignal kaum. Je nach Lichteinfall gar nicht. Könnte man das bitte noch etwas nach hinten stellen? Danke.</text:p>
          </table:table-cell>
          <table:table-cell office:value-type="string" calcext:value-type="string">
            <text:p>Lichtsignal</text:p>
          </table:table-cell>
          <table:table-cell table:style-name="ce79" office:value-type="string" calcext:value-type="string">
            <text:p>Wenn man von der Hagenbuchstrasse oben in die Flurhofstrasse kommt, sieht man das Lichtsignal kaum. Je nach Lichteinfall gar nicht. Könnte man das bitte noch etwas nach hinten stellen? Danke</text:p>
          </table:table-cell>
          <table:table-cell table:style-name="ce79" office:value-type="string" calcext:value-type="string">
            <text:p>a street</text:p>
          </table:table-cell>
          <table:table-cell table:style-name="ce88" table:formula="of:=[.F52]&amp;&quot; &quot;&amp;[.G52]" office:value-type="string" office:string-value="Lichtsignal Wenn man von der Hagenbuchstrasse oben in die Flurhofstrasse kommt, sieht man das Lichtsignal kaum. Je nach Lichteinfall gar nicht. Könnte man das bitte noch etwas nach hinten stellen? Danke" calcext:value-type="string">
            <text:p>Lichtsignal Wenn man von der Hagenbuchstrasse oben in die Flurhofstrasse kommt, sieht man das Lichtsignal kaum. Je nach Lichteinfall gar nicht. Könnte man das bitte noch etwas nach hinten stellen? Danke</text:p>
          </table:table-cell>
          <table:table-cell table:number-columns-repeated="4"/>
          <table:table-cell office:value-type="string" calcext:value-type="string">
            <text:p>x</text:p>
          </table:table-cell>
          <table:table-cell office:value-type="float" office:value="130" calcext:value-type="float">
            <text:p>130</text:p>
          </table:table-cell>
          <table:table-cell office:value-type="string" calcext:value-type="string">
            <text:p>Lichtsignalanlage</text:p>
          </table:table-cell>
          <table:table-cell table:style-name="ce99" office:value-type="float" office:value="0.129032258064516" calcext:value-type="float">
            <text:p>0.129</text:p>
          </table:table-cell>
          <table:table-cell/>
          <table:table-cell table:style-name="Default" table:number-columns-repeated="16366"/>
        </table:table-row>
        <table:table-row table:style-name="ro24">
          <table:table-cell office:value-type="float" office:value="52" calcext:value-type="float">
            <text:p>52</text:p>
          </table:table-cell>
          <table:table-cell office:value-type="string" calcext:value-type="string">
            <text:p>3d643723-3a86-4cb4-a5f9-0222fb3aaf79</text:p>
          </table:table-cell>
          <table:table-cell office:value-type="string" calcext:value-type="string">
            <text:p>traffic light signal</text:p>
          </table:table-cell>
          <table:table-cell office:value-type="string" calcext:value-type="string">
            <text:p>traffic light signal,pressure button,yellow reflector,part,light signal</text:p>
          </table:table-cell>
          <table:table-cell office:value-type="string" calcext:value-type="string">
            <text:p><text:s/>Lichtsignal für Fußgänger defekt. Der Druckknopf für Fußgängerinnen und Fußgänger, die beim Lichtsignal vor der alten Post lachen, die Zürcher Strasse überqueren wollen, ist defekt. Jemand mit vermutlich überflüssiger Kraft hat einen Teil des gelben Kässerens abgerissen. Drücken und damit das Lichtsignal steuern kann man zwar immer noch, es ist aber allerdings umständlich. Danke für eine Reparatur.</text:p>
          </table:table-cell>
          <table:table-cell office:value-type="string" calcext:value-type="string">
            <text:p>Lichtsignal für Fussgänger defekt</text:p>
          </table:table-cell>
          <table:table-cell table:style-name="ce79" office:value-type="string" calcext:value-type="string">
            <text:p>Der Druckknopf für Fussgängerinnen und Fussgänger, die beim Lichtsignal vor der alten Post Lachen die Zürcher Strasse überqueren wollen, ist defekt. Jemand mit vermutlich überschüssiger Kraft hat einen Teil des gelben Kästchens abgerissen. Drücken und damit das Lichtsignal steuern kann man zwar immer noch, es ist allerdings etwas umständlich. Danke für eine Reparatur.</text:p>
          </table:table-cell>
          <table:table-cell table:style-name="ce79" office:value-type="string" calcext:value-type="string">
            <text:p>a yellow reflector</text:p>
          </table:table-cell>
          <table:table-cell table:style-name="ce88" table:formula="of:=[.F53]&amp;&quot; &quot;&amp;[.G53]" office:value-type="string" office:string-value="Lichtsignal für Fussgänger defekt Der Druckknopf für Fussgängerinnen und Fussgänger, die beim Lichtsignal vor der alten Post Lachen die Zürcher Strasse überqueren wollen, ist defekt. Jemand mit vermutlich überschüssiger Kraft hat einen Teil des gelben Kästchens abgerissen. Drücken und damit das Lichtsignal steuern kann man zwar immer noch, es ist allerdings etwas umständlich. Danke für eine Reparatur." calcext:value-type="string">
            <text:p>Lichtsignal für Fussgänger defekt Der Druckknopf für Fussgängerinnen und Fussgänger, die beim Lichtsignal vor der alten Post Lachen die Zürcher Strasse überqueren wollen, ist defekt. Jemand mit vermutlich überschüssiger Kraft hat einen Teil des gelben Kästchens abgerissen. Drücken und damit das Lichtsignal steuern kann man zwar immer noch, es ist allerdings etwas umständlich. Danke für eine Reparatur.</text:p>
          </table:table-cell>
          <table:table-cell office:value-type="string" calcext:value-type="string">
            <text:p>x</text:p>
          </table:table-cell>
          <table:table-cell table:number-columns-repeated="4"/>
          <table:table-cell office:value-type="float" office:value="380" calcext:value-type="float">
            <text:p>380</text:p>
          </table:table-cell>
          <table:table-cell office:value-type="string" calcext:value-type="string">
            <text:p>Lichtsignalanlage</text:p>
          </table:table-cell>
          <table:table-cell table:style-name="ce99" office:value-type="float" office:value="0.157894736842105" calcext:value-type="float">
            <text:p>0.158</text:p>
          </table:table-cell>
          <table:table-cell/>
          <table:table-cell table:style-name="Default" table:number-columns-repeated="16366"/>
        </table:table-row>
        <table:table-row table:style-name="ro3">
          <table:table-cell office:value-type="float" office:value="53" calcext:value-type="float">
            <text:p>53</text:p>
          </table:table-cell>
          <table:table-cell office:value-type="string" calcext:value-type="string">
            <text:p>c5b070a3-b416-47db-a533-fe28da84e9b1</text:p>
          </table:table-cell>
          <table:table-cell office:value-type="string" calcext:value-type="string">
            <text:p>green light</text:p>
          </table:table-cell>
          <table:table-cell office:value-type="string" calcext:value-type="string">
            <text:p>green light,traffic light,traffic light,signal</text:p>
          </table:table-cell>
          <table:table-cell office:value-type="string" calcext:value-type="string">
            <text:p><text:s/>Grünlicht funktioniert nicht. Das Grünlicht der Ampel links Richtung Osten funktioniert nicht. Die restlichen Farben schon.</text:p>
          </table:table-cell>
          <table:table-cell office:value-type="string" calcext:value-type="string">
            <text:p>Grünlicht funktioniert nicht</text:p>
          </table:table-cell>
          <table:table-cell table:style-name="ce79" office:value-type="string" calcext:value-type="string">
            <text:p>Das Grünlicht der Ampel (links, richtung Osten) funktioniert nicht. Die restlichen Farben schon.</text:p>
          </table:table-cell>
          <table:table-cell table:style-name="ce79" office:value-type="string" calcext:value-type="string">
            <text:p>a traffic light</text:p>
          </table:table-cell>
          <table:table-cell table:style-name="ce88" table:formula="of:=[.F54]&amp;&quot; &quot;&amp;[.G54]" office:value-type="string" office:string-value="Grünlicht funktioniert nicht Das Grünlicht der Ampel (links, richtung Osten) funktioniert nicht. Die restlichen Farben schon." calcext:value-type="string">
            <text:p>Grünlicht funktioniert nicht Das Grünlicht der Ampel (links, richtung Osten) funktioniert nicht. Die restlichen Farben schon.</text:p>
          </table:table-cell>
          <table:table-cell office:value-type="string" calcext:value-type="string">
            <text:p>x</text:p>
          </table:table-cell>
          <table:table-cell table:number-columns-repeated="4"/>
          <table:table-cell office:value-type="float" office:value="145" calcext:value-type="float">
            <text:p>145</text:p>
          </table:table-cell>
          <table:table-cell office:value-type="string" calcext:value-type="string">
            <text:p>Lichtsignalanlage</text:p>
          </table:table-cell>
          <table:table-cell table:style-name="ce99" office:value-type="float" office:value="0.25" calcext:value-type="float">
            <text:p>0.250</text:p>
          </table:table-cell>
          <table:table-cell/>
          <table:table-cell table:style-name="Default" table:number-columns-repeated="16366"/>
        </table:table-row>
        <table:table-row table:style-name="ro18">
          <table:table-cell office:value-type="float" office:value="54" calcext:value-type="float">
            <text:p>54</text:p>
          </table:table-cell>
          <table:table-cell office:value-type="string" calcext:value-type="string">
            <text:p>cfbad3cf-ca8c-4179-9fd2-4a310494bfc2</text:p>
          </table:table-cell>
          <table:table-cell office:value-type="string" calcext:value-type="string">
            <text:p>traffic light</text:p>
          </table:table-cell>
          <table:table-cell office:value-type="string" calcext:value-type="string">
            <text:p>traffic light,ampel,street,corner,neumarkt</text:p>
          </table:table-cell>
          <table:table-cell office:value-type="string" calcext:value-type="string">
            <text:p><text:s/>ewiges provisorium ampeln grüezi miteinander an der ecke st leonhard straße gebris straße und eine ecke weiter vor dem neumarkt stehen seit jahren dieses ampeln als provisorium wird da irgendwann irgendwann mal was geplant oder gemacht herzlichen dank für die kenntnisnahme</text:p>
          </table:table-cell>
          <table:table-cell office:value-type="string" calcext:value-type="string">
            <text:p>Ewiges Provisorium Ampeln</text:p>
          </table:table-cell>
          <table:table-cell table:style-name="ce79" office:value-type="string" calcext:value-type="string">
            <text:p>Grüezi mitenand, an der Ecke St Leonhardstrasse/Gäbrisstrasstresse und eine Ecke weiter vor dem Neumarkt stehen seit Jahren diese Ampeln als Provisorium! Wird da irgendwann mal was geplant oder gemacht? Herzlichen Dank für die Kenntnisnahme</text:p>
          </table:table-cell>
          <table:table-cell table:style-name="ce79" office:value-type="string" calcext:value-type="string">
            <text:p>a street</text:p>
          </table:table-cell>
          <table:table-cell table:style-name="ce88" table:formula="of:=[.F55]&amp;&quot; &quot;&amp;[.G55]" office:value-type="string" office:string-value="Ewiges Provisorium Ampeln Grüezi mitenand, an der Ecke St Leonhardstrasse/Gäbrisstrasstresse und eine Ecke weiter vor dem Neumarkt stehen seit Jahren diese Ampeln als Provisorium! Wird da irgendwann mal was geplant oder gemacht? Herzlichen Dank für die Kenntnisnahme" calcext:value-type="string">
            <text:p>Ewiges Provisorium Ampeln Grüezi mitenand, an der Ecke St Leonhardstrasse/Gäbrisstrasstresse und eine Ecke weiter vor dem Neumarkt stehen seit Jahren diese Ampeln als Provisorium! Wird da irgendwann mal was geplant oder gemacht? Herzlichen Dank für die Kenntnisnahme</text:p>
          </table:table-cell>
          <table:table-cell table:number-columns-repeated="2"/>
          <table:table-cell office:value-type="string" calcext:value-type="string">
            <text:p>x</text:p>
          </table:table-cell>
          <table:table-cell table:number-columns-repeated="2"/>
          <table:table-cell office:value-type="float" office:value="229" calcext:value-type="float">
            <text:p>229</text:p>
          </table:table-cell>
          <table:table-cell office:value-type="string" calcext:value-type="string">
            <text:p>Lichtsignalanlage</text:p>
          </table:table-cell>
          <table:table-cell table:style-name="ce99" office:value-type="float" office:value="0.621621621621622" calcext:value-type="float">
            <text:p>0.622</text:p>
          </table:table-cell>
          <table:table-cell/>
          <table:table-cell table:style-name="Default" table:number-columns-repeated="16366"/>
        </table:table-row>
        <table:table-row table:style-name="ro25">
          <table:table-cell office:value-type="float" office:value="55" calcext:value-type="float">
            <text:p>55</text:p>
          </table:table-cell>
          <table:table-cell office:value-type="string" calcext:value-type="string">
            <text:p>b0e9d9b4-04aa-467b-9d36-a5d709d521d4</text:p>
          </table:table-cell>
          <table:table-cell office:value-type="string" calcext:value-type="string">
            <text:p>street lighting</text:p>
          </table:table-cell>
          <table:table-cell office:value-type="string" calcext:value-type="string">
            <text:p>street lighting,lighting,lamps,streetlights</text:p>
          </table:table-cell>
          <table:table-cell office:value-type="string" calcext:value-type="string">
            <text:p><text:s/>Defekte Straßenbeleuchtung</text:p>
          </table:table-cell>
          <table:table-cell office:value-type="string" calcext:value-type="string">
            <text:p>Defekte Strassenbeleuchtung</text:p>
          </table:table-cell>
          <table:table-cell table:style-name="ce79"/>
          <table:table-cell table:style-name="ce79" office:value-type="string" calcext:value-type="string">
            <text:p>a street lighting</text:p>
          </table:table-cell>
          <table:table-cell table:style-name="ce88" table:formula="of:=[.F56]&amp;&quot; &quot;&amp;[.G56]" office:value-type="string" office:string-value="Defekte Strassenbeleuchtung " calcext:value-type="string">
            <text:p>Defekte Strassenbeleuchtung </text:p>
          </table:table-cell>
          <table:table-cell office:value-type="string" calcext:value-type="string">
            <text:p>x</text:p>
          </table:table-cell>
          <table:table-cell table:number-columns-repeated="4"/>
          <table:table-cell office:value-type="float" office:value="102" calcext:value-type="float">
            <text:p>102</text:p>
          </table:table-cell>
          <table:table-cell office:value-type="string" calcext:value-type="string">
            <text:p>Lichtsignalanlage</text:p>
          </table:table-cell>
          <table:table-cell table:style-name="ce99" office:value-type="float" office:value="0.5" calcext:value-type="float">
            <text:p>0.500</text:p>
          </table:table-cell>
          <table:table-cell/>
          <table:table-cell table:style-name="Default" table:number-columns-repeated="16366"/>
        </table:table-row>
        <table:table-row table:style-name="ro8">
          <table:table-cell table:style-name="ce71" office:value-type="float" office:value="56" calcext:value-type="float">
            <text:p>56</text:p>
          </table:table-cell>
          <table:table-cell table:style-name="ce71" office:value-type="string" calcext:value-type="string">
            <text:p>20696ecf-1293-4f7f-a066-e00820a6aa4b</text:p>
          </table:table-cell>
          <table:table-cell table:style-name="ce71" office:value-type="string" calcext:value-type="string">
            <text:p>traffic lights</text:p>
          </table:table-cell>
          <table:table-cell table:style-name="ce71" office:value-type="string" calcext:value-type="string">
            <text:p>traffic lights,traffic signal,signal,lights,road</text:p>
          </table:table-cell>
          <table:table-cell table:style-name="ce80" office:value-type="string" calcext:value-type="string">
            <text:p><text:s/>Schlechte Sichtampeln. Fährt man auf der rechten Spur geradeaus Richtung Norden, sind zwei Ampeln für die rechte Spur so weit nach links abgedreht, dass man die Rot-Orange-Grün Anzeige erst im letzten Moment erblicken kann. Frage ist, ist es möglich diese Ampeln etwas nach rechts zu drehen, damit man die Lichter besser erblicken kann.</text:p>
          </table:table-cell>
          <table:table-cell table:style-name="ce71" office:value-type="string" calcext:value-type="string">
            <text:p>Schlechte Sicht Ampel</text:p>
          </table:table-cell>
          <table:table-cell table:style-name="ce80" office:value-type="string" calcext:value-type="string">
            <text:p>Fährt man auf der rechten Spur gerade aus Richtung Norden sind zwei Ampeln für die rechte Spur so weit nach Links abgedreht, dass man die Rot/Orang/Hrün-Anzeige erst im letzten Moment erblicken kann. Frage: ist es möglich diese Ampeln etwas mehr nach rechts zu drehen, damit man die Lichter besser erblicken kann?</text:p>
          </table:table-cell>
          <table:table-cell table:style-name="ce80" office:value-type="string" calcext:value-type="string">
            <text:p>a traffic lights</text:p>
          </table:table-cell>
          <table:table-cell table:style-name="ce89" table:formula="of:=[.F57]&amp;&quot; &quot;&amp;[.G57]" office:value-type="string" office:string-value="Schlechte Sicht Ampel Fährt man auf der rechten Spur gerade aus Richtung Norden sind zwei Ampeln für die rechte Spur so weit nach Links abgedreht, dass man die Rot/Orang/Hrün-Anzeige erst im letzten Moment erblicken kann. Frage: ist es möglich diese Ampeln etwas mehr nach rechts zu drehen, damit man die Lichter besser erblicken kann?" calcext:value-type="string">
            <text:p>Schlechte Sicht Ampel Fährt man auf der rechten Spur gerade aus Richtung Norden sind zwei Ampeln für die rechte Spur so weit nach Links abgedreht, dass man die Rot/Orang/Hrün-Anzeige erst im letzten Moment erblicken kann. Frage: ist es möglich diese Ampeln etwas mehr nach rechts zu drehen, damit man die Lichter besser erblicken kann?</text:p>
          </table:table-cell>
          <table:table-cell table:style-name="ce71" office:value-type="string" calcext:value-type="string">
            <text:p>x</text:p>
          </table:table-cell>
          <table:table-cell table:style-name="ce71" table:number-columns-repeated="4"/>
          <table:table-cell table:style-name="ce71" office:value-type="float" office:value="101" calcext:value-type="float">
            <text:p>101</text:p>
          </table:table-cell>
          <table:table-cell office:value-type="string" calcext:value-type="string">
            <text:p>Lichtsignalanlage</text:p>
          </table:table-cell>
          <table:table-cell table:style-name="ce30" office:value-type="float" office:value="0.222222222222222" calcext:value-type="float">
            <text:p>0.222</text:p>
          </table:table-cell>
          <table:table-cell/>
          <table:table-cell table:style-name="ce71" table:number-columns-repeated="16366"/>
        </table:table-row>
        <table:table-row table:style-name="ro3">
          <table:table-cell office:value-type="float" office:value="57" calcext:value-type="float">
            <text:p>57</text:p>
          </table:table-cell>
          <table:table-cell office:value-type="string" calcext:value-type="string">
            <text:p>015e6923-ec4a-431a-a8b3-def5aea0a1fd</text:p>
          </table:table-cell>
          <table:table-cell office:value-type="string" calcext:value-type="string">
            <text:p>traffic light</text:p>
          </table:table-cell>
          <table:table-cell office:value-type="string" calcext:value-type="string">
            <text:p>traffic light,traffic light system,signal,light signal</text:p>
          </table:table-cell>
          <table:table-cell office:value-type="string" calcext:value-type="string">
            <text:p><text:s/>Lichtsignal beschädigt. Lichtsignalanlage bei der Bahnhofseinfahrt ist beschädigt. Siehe Foto.</text:p>
          </table:table-cell>
          <table:table-cell office:value-type="string" calcext:value-type="string">
            <text:p>Lichtsignal beschädigt</text:p>
          </table:table-cell>
          <table:table-cell table:style-name="ce79" office:value-type="string" calcext:value-type="string">
            <text:p>Lichtsignalanlage bei der Bahnhofseinfahrt ist beschädigt. Siehe Foto.</text:p>
          </table:table-cell>
          <table:table-cell table:style-name="ce79" office:value-type="string" calcext:value-type="string">
            <text:p>a traffic light</text:p>
          </table:table-cell>
          <table:table-cell table:style-name="ce88" table:formula="of:=[.F58]&amp;&quot; &quot;&amp;[.G58]" office:value-type="string" office:string-value="Lichtsignal beschädigt Lichtsignalanlage bei der Bahnhofseinfahrt ist beschädigt. Siehe Foto." calcext:value-type="string">
            <text:p>Lichtsignal beschädigt Lichtsignalanlage bei der Bahnhofseinfahrt ist beschädigt. Siehe Foto.</text:p>
          </table:table-cell>
          <table:table-cell office:value-type="string" calcext:value-type="string">
            <text:p>x</text:p>
          </table:table-cell>
          <table:table-cell table:number-columns-repeated="4"/>
          <table:table-cell office:value-type="float" office:value="315" calcext:value-type="float">
            <text:p>315</text:p>
          </table:table-cell>
          <table:table-cell office:value-type="string" calcext:value-type="string">
            <text:p>Lichtsignalanlage</text:p>
          </table:table-cell>
          <table:table-cell table:style-name="ce99" office:value-type="float" office:value="0.1" calcext:value-type="float">
            <text:p>0.100</text:p>
          </table:table-cell>
          <table:table-cell/>
          <table:table-cell table:style-name="Default" table:number-columns-repeated="16366"/>
        </table:table-row>
        <table:table-row table:style-name="ro9">
          <table:table-cell table:style-name="ce71" office:value-type="float" office:value="58" calcext:value-type="float">
            <text:p>58</text:p>
          </table:table-cell>
          <table:table-cell table:style-name="ce71" office:value-type="string" calcext:value-type="string">
            <text:p>da300aa0-6f7c-4ee9-a753-e97430b2cc94</text:p>
          </table:table-cell>
          <table:table-cell table:style-name="ce71" office:value-type="string" calcext:value-type="string">
            <text:p>light signal cover</text:p>
          </table:table-cell>
          <table:table-cell table:style-name="ce71" office:value-type="string" calcext:value-type="string">
            <text:p>light signal cover,cover,light signal,cover</text:p>
          </table:table-cell>
          <table:table-cell table:style-name="ce80" office:value-type="string" calcext:value-type="string">
            <text:p><text:s/>Lichtsignalabdeckung. Die Abdeckung des Lichtsignals liegt am Boden.</text:p>
          </table:table-cell>
          <table:table-cell table:style-name="ce71" office:value-type="string" calcext:value-type="string">
            <text:p>Lichtsignal Abdeckung</text:p>
          </table:table-cell>
          <table:table-cell table:style-name="ce80" office:value-type="string" calcext:value-type="string">
            <text:p>Die „Abdeckung“ des Lichtsignals liegt am Boden.</text:p>
          </table:table-cell>
          <table:table-cell table:style-name="ce80" office:value-type="string" calcext:value-type="string">
            <text:p>a light signal</text:p>
          </table:table-cell>
          <table:table-cell table:style-name="ce89" table:formula="of:=[.F59]&amp;&quot; &quot;&amp;[.G59]" office:value-type="string" office:string-value="Lichtsignal Abdeckung Die „Abdeckung“ des Lichtsignals liegt am Boden." calcext:value-type="string">
            <text:p>Lichtsignal Abdeckung Die „Abdeckung“ des Lichtsignals liegt am Boden.</text:p>
          </table:table-cell>
          <table:table-cell table:style-name="ce71" table:number-columns-repeated="4"/>
          <table:table-cell table:style-name="ce71" office:value-type="string" calcext:value-type="string">
            <text:p>x</text:p>
          </table:table-cell>
          <table:table-cell table:style-name="ce71" office:value-type="float" office:value="138" calcext:value-type="float">
            <text:p>138</text:p>
          </table:table-cell>
          <table:table-cell office:value-type="string" calcext:value-type="string">
            <text:p>Lichtsignalanlage</text:p>
          </table:table-cell>
          <table:table-cell table:style-name="ce30" office:value-type="float" office:value="0.333333333333333" calcext:value-type="float">
            <text:p>0.333</text:p>
          </table:table-cell>
          <table:table-cell/>
          <table:table-cell table:style-name="ce71" table:number-columns-repeated="16366"/>
        </table:table-row>
        <table:table-row table:style-name="ro5">
          <table:table-cell office:value-type="float" office:value="59" calcext:value-type="float">
            <text:p>59</text:p>
          </table:table-cell>
          <table:table-cell office:value-type="string" calcext:value-type="string">
            <text:p>bf37ac81-923c-448b-ba8a-e451d6464077</text:p>
          </table:table-cell>
          <table:table-cell office:value-type="string" calcext:value-type="string">
            <text:p>traffic light</text:p>
          </table:table-cell>
          <table:table-cell office:value-type="string" calcext:value-type="string">
            <text:p>traffic light,traffic signal,ampel,green light,red light,orange light</text:p>
          </table:table-cell>
          <table:table-cell office:value-type="string" calcext:value-type="string">
            <text:p><text:s/>grün defekt bei der ampel leuchtet kein grün mehr nur rot und orange ist die ampel von der tagblattstraße aus zur autobahn geradeaus und links richtung</text:p>
          </table:table-cell>
          <table:table-cell office:value-type="string" calcext:value-type="string">
            <text:p>Grün Defekt</text:p>
          </table:table-cell>
          <table:table-cell table:style-name="ce79" office:value-type="string" calcext:value-type="string">
            <text:p>Bei der Ampel leuchtet kein Grün mehr auf. Nur Rot und Orange. Ist Die Ampel von der Tablattstrasse aus zur Autobahn(gerade aus) und links richtung Gallusmarkt</text:p>
          </table:table-cell>
          <table:table-cell table:style-name="ce79" office:value-type="string" calcext:value-type="string">
            <text:p>a traffic light</text:p>
          </table:table-cell>
          <table:table-cell table:style-name="ce88" table:formula="of:=[.F60]&amp;&quot; &quot;&amp;[.G60]" office:value-type="string" office:string-value="Grün Defekt Bei der Ampel leuchtet kein Grün mehr auf. Nur Rot und Orange. Ist Die Ampel von der Tablattstrasse aus zur Autobahn(gerade aus) und links richtung Gallusmarkt" calcext:value-type="string">
            <text:p>Grün Defekt Bei der Ampel leuchtet kein Grün mehr auf. Nur Rot und Orange. Ist Die Ampel von der Tablattstrasse aus zur Autobahn(gerade aus) und links richtung Gallusmarkt</text:p>
          </table:table-cell>
          <table:table-cell office:value-type="string" calcext:value-type="string">
            <text:p>x</text:p>
          </table:table-cell>
          <table:table-cell table:number-columns-repeated="4"/>
          <table:table-cell office:value-type="float" office:value="265" calcext:value-type="float">
            <text:p>265</text:p>
          </table:table-cell>
          <table:table-cell office:value-type="string" calcext:value-type="string">
            <text:p>Lichtsignalanlage</text:p>
          </table:table-cell>
          <table:table-cell table:style-name="ce99" office:value-type="float" office:value="0.571428571428571" calcext:value-type="float">
            <text:p>0.571</text:p>
          </table:table-cell>
          <table:table-cell/>
          <table:table-cell table:style-name="Default" table:number-columns-repeated="16366"/>
        </table:table-row>
        <table:table-row table:style-name="ro3">
          <table:table-cell office:value-type="float" office:value="60" calcext:value-type="float">
            <text:p>60</text:p>
          </table:table-cell>
          <table:table-cell office:value-type="string" calcext:value-type="string">
            <text:p>ccc11b38-3b29-4fea-a2e8-5ca0936e57af</text:p>
          </table:table-cell>
          <table:table-cell office:value-type="string" calcext:value-type="string">
            <text:p>cover</text:p>
          </table:table-cell>
          <table:table-cell office:value-type="string" calcext:value-type="string">
            <text:p>cover,signal mast,pedestrian crossing,Broderbrunnen,Weber</text:p>
          </table:table-cell>
          <table:table-cell office:value-type="string" calcext:value-type="string">
            <text:p><text:s/>Abdeckung offen bei Signalmast Südfußgängerstreifer Broderbrunnen Mode Weber.</text:p>
          </table:table-cell>
          <table:table-cell office:value-type="string" calcext:value-type="string">
            <text:p>Abdeckung offen</text:p>
          </table:table-cell>
          <table:table-cell table:style-name="ce79" office:value-type="string" calcext:value-type="string">
            <text:p>Bei Signalmast Süd Fussgängerstreifen Broderbrunnen - Mode Weber</text:p>
          </table:table-cell>
          <table:table-cell table:style-name="ce79" office:value-type="string" calcext:value-type="string">
            <text:p>a pedestrian crossing</text:p>
          </table:table-cell>
          <table:table-cell table:style-name="ce88" table:formula="of:=[.F61]&amp;&quot; &quot;&amp;[.G61]" office:value-type="string" office:string-value="Abdeckung offen Bei Signalmast Süd Fussgängerstreifen Broderbrunnen - Mode Weber" calcext:value-type="string">
            <text:p>Abdeckung offen Bei Signalmast Süd Fussgängerstreifen Broderbrunnen - Mode Weber</text:p>
          </table:table-cell>
          <table:table-cell table:number-columns-repeated="4"/>
          <table:table-cell office:value-type="string" calcext:value-type="string">
            <text:p>x</text:p>
          </table:table-cell>
          <table:table-cell office:value-type="float" office:value="247" calcext:value-type="float">
            <text:p>247</text:p>
          </table:table-cell>
          <table:table-cell office:value-type="string" calcext:value-type="string">
            <text:p>Lichtsignalanlage</text:p>
          </table:table-cell>
          <table:table-cell table:style-name="ce99" office:value-type="float" office:value="0.5" calcext:value-type="float">
            <text:p>0.500</text:p>
          </table:table-cell>
          <table:table-cell/>
          <table:table-cell table:style-name="Default" table:number-columns-repeated="16366"/>
        </table:table-row>
        <table:table-row table:style-name="ro10">
          <table:table-cell office:value-type="float" office:value="61" calcext:value-type="float">
            <text:p>61</text:p>
          </table:table-cell>
          <table:table-cell office:value-type="string" calcext:value-type="string">
            <text:p>210186eb-b9e5-4899-913b-e9aa5977b21c</text:p>
          </table:table-cell>
          <table:table-cell office:value-type="string" calcext:value-type="string">
            <text:p>green light</text:p>
          </table:table-cell>
          <table:table-cell office:value-type="string" calcext:value-type="string">
            <text:p>green light,traffic light,signal,bus lanes,traffic light</text:p>
          </table:table-cell>
          <table:table-cell office:value-type="string" calcext:value-type="string">
            <text:p><text:s/>Grünes Lichtdefekt. Beim Übergang über die beiden Busspuren ist das grüne Licht an der Ampel pro Bahnhofseite defekt.</text:p>
          </table:table-cell>
          <table:table-cell office:value-type="string" calcext:value-type="string">
            <text:p>Grünes Licht defekt</text:p>
          </table:table-cell>
          <table:table-cell table:style-name="ce79" office:value-type="string" calcext:value-type="string">
            <text:p>Beim Übergang über die beiden Busspuren ist das Grüne Licht an der Ampel Bahnhofseite defekt</text:p>
          </table:table-cell>
          <table:table-cell table:style-name="ce79" office:value-type="string" calcext:value-type="string">
            <text:p>a traffic light</text:p>
          </table:table-cell>
          <table:table-cell table:style-name="ce88" table:formula="of:=[.F62]&amp;&quot; &quot;&amp;[.G62]" office:value-type="string" office:string-value="Grünes Licht defekt Beim Übergang über die beiden Busspuren ist das Grüne Licht an der Ampel Bahnhofseite defekt" calcext:value-type="string">
            <text:p>Grünes Licht defekt Beim Übergang über die beiden Busspuren ist das Grüne Licht an der Ampel Bahnhofseite defekt</text:p>
          </table:table-cell>
          <table:table-cell office:value-type="string" calcext:value-type="string">
            <text:p>x</text:p>
          </table:table-cell>
          <table:table-cell table:number-columns-repeated="4"/>
          <table:table-cell office:value-type="float" office:value="302" calcext:value-type="float">
            <text:p>302</text:p>
          </table:table-cell>
          <table:table-cell office:value-type="string" calcext:value-type="string">
            <text:p>Lichtsignalanlage</text:p>
          </table:table-cell>
          <table:table-cell table:style-name="ce99" office:value-type="float" office:value="0.277777777777778" calcext:value-type="float">
            <text:p>0.278</text:p>
          </table:table-cell>
          <table:table-cell/>
          <table:table-cell table:style-name="Default" table:number-columns-repeated="16366"/>
        </table:table-row>
        <table:table-row table:style-name="ro10">
          <table:table-cell office:value-type="float" office:value="62" calcext:value-type="float">
            <text:p>62</text:p>
          </table:table-cell>
          <table:table-cell office:value-type="string" calcext:value-type="string">
            <text:p>d2d12b36-39f9-4dcb-b257-76bdd5dc6038</text:p>
          </table:table-cell>
          <table:table-cell office:value-type="string" calcext:value-type="string">
            <text:p>light signal system cover</text:p>
          </table:table-cell>
          <table:table-cell office:value-type="string" calcext:value-type="string">
            <text:p>light signal system cover,cover,signal system,Nespresso page</text:p>
          </table:table-cell>
          <table:table-cell office:value-type="string" calcext:value-type="string">
            <text:p><text:s/>Lichtsignalanlage Abdeckung. Die Abdeckung der Signalanlage ist offen. Dieser sollte wieder geschlossen werden. Nespresso Seite.</text:p>
          </table:table-cell>
          <table:table-cell office:value-type="string" calcext:value-type="string">
            <text:p>Lichtsignalanlage Abdeckung</text:p>
          </table:table-cell>
          <table:table-cell table:style-name="ce79" office:value-type="string" calcext:value-type="string">
            <text:p>Die Abdeckung der Signalanlage ist offen. Diese sollte wieder geschlossen werden. Nespresso Seite.</text:p>
          </table:table-cell>
          <table:table-cell table:style-name="ce79" office:value-type="string" calcext:value-type="string">
            <text:p>null</text:p>
          </table:table-cell>
          <table:table-cell table:style-name="ce88" table:formula="of:=[.F63]&amp;&quot; &quot;&amp;[.G63]" office:value-type="string" office:string-value="Lichtsignalanlage Abdeckung Die Abdeckung der Signalanlage ist offen. Diese sollte wieder geschlossen werden. Nespresso Seite." calcext:value-type="string">
            <text:p>Lichtsignalanlage Abdeckung Die Abdeckung der Signalanlage ist offen. Diese sollte wieder geschlossen werden. Nespresso Seite.</text:p>
          </table:table-cell>
          <table:table-cell table:number-columns-repeated="4"/>
          <table:table-cell office:value-type="string" calcext:value-type="string">
            <text:p>x</text:p>
          </table:table-cell>
          <table:table-cell office:value-type="float" office:value="140" calcext:value-type="float">
            <text:p>140</text:p>
          </table:table-cell>
          <table:table-cell office:value-type="string" calcext:value-type="string">
            <text:p>Lichtsignalanlage</text:p>
          </table:table-cell>
          <table:table-cell table:style-name="ce99" office:value-type="float" office:value="0.133333333333333" calcext:value-type="float">
            <text:p>0.133</text:p>
          </table:table-cell>
          <table:table-cell/>
          <table:table-cell table:style-name="Default" table:number-columns-repeated="16366"/>
        </table:table-row>
        <table:table-row table:style-name="ro26">
          <table:table-cell office:value-type="float" office:value="63" calcext:value-type="float">
            <text:p>63</text:p>
          </table:table-cell>
          <table:table-cell office:value-type="string" calcext:value-type="string">
            <text:p>5476607c-f0bb-486e-8e03-49af6ae025e3</text:p>
          </table:table-cell>
          <table:table-cell office:value-type="string" calcext:value-type="string">
            <text:p>traffic light</text:p>
          </table:table-cell>
          <table:table-cell office:value-type="string" calcext:value-type="string">
            <text:p>traffic light,traffic light button,pedestrian crossing,UBS,pedestrian crossing</text:p>
          </table:table-cell>
          <table:table-cell office:value-type="string" calcext:value-type="string">
            <text:p><text:s/>Straßenampel Tasterdefekt. Gegenüber UBS beim Fussgängerstreifen Richtung Wellauer ist der Taster kaputt.</text:p>
          </table:table-cell>
          <table:table-cell office:value-type="string" calcext:value-type="string">
            <text:p>Strassenampel Taster defekt</text:p>
          </table:table-cell>
          <table:table-cell table:style-name="ce79" office:value-type="string" calcext:value-type="string">
            <text:p>Gegenüber ubs beim Fussgängerstreifen richtung Wellauer ist der Taster kaputt</text:p>
          </table:table-cell>
          <table:table-cell table:style-name="ce79" office:value-type="string" calcext:value-type="string">
            <text:p>a traffic light</text:p>
          </table:table-cell>
          <table:table-cell table:style-name="ce88" table:formula="of:=[.F64]&amp;&quot; &quot;&amp;[.G64]" office:value-type="string" office:string-value="Strassenampel Taster defekt Gegenüber ubs beim Fussgängerstreifen richtung Wellauer ist der Taster kaputt" calcext:value-type="string">
            <text:p>Strassenampel Taster defekt Gegenüber ubs beim Fussgängerstreifen richtung Wellauer ist der Taster kaputt</text:p>
          </table:table-cell>
          <table:table-cell table:number-columns-repeated="3"/>
          <table:table-cell office:value-type="string" calcext:value-type="string">
            <text:p>x</text:p>
          </table:table-cell>
          <table:table-cell/>
          <table:table-cell office:value-type="float" office:value="383" calcext:value-type="float">
            <text:p>383</text:p>
          </table:table-cell>
          <table:table-cell office:value-type="string" calcext:value-type="string">
            <text:p>Lichtsignalanlage</text:p>
          </table:table-cell>
          <table:table-cell table:style-name="ce99" office:value-type="float" office:value="0.461538461538462" calcext:value-type="float">
            <text:p>0.462</text:p>
          </table:table-cell>
          <table:table-cell/>
          <table:table-cell table:style-name="Default" table:number-columns-repeated="16366"/>
        </table:table-row>
        <table:table-row table:style-name="ro9">
          <table:table-cell office:value-type="float" office:value="64" calcext:value-type="float">
            <text:p>64</text:p>
          </table:table-cell>
          <table:table-cell office:value-type="string" calcext:value-type="string">
            <text:p>f8be721a-dd71-4a9e-9d9e-6862db7ce6c8</text:p>
          </table:table-cell>
          <table:table-cell office:value-type="string" calcext:value-type="string">
            <text:p>tension strap</text:p>
          </table:table-cell>
          <table:table-cell office:value-type="string" calcext:value-type="string">
            <text:p>tension strap,tension strap defect,weights,LSA,strap</text:p>
          </table:table-cell>
          <table:table-cell office:value-type="string" calcext:value-type="string">
            <text:p><text:s/>Spanngurt-Defekt. Die Gewichte der LSA sind lose durch den kaputten Spanngurt.</text:p>
          </table:table-cell>
          <table:table-cell office:value-type="string" calcext:value-type="string">
            <text:p>Spanngurte defekt</text:p>
          </table:table-cell>
          <table:table-cell table:style-name="ce79" office:value-type="string" calcext:value-type="string">
            <text:p>Die Gewichte der LSA sind lose durch den kaputten Spanngurt.</text:p>
          </table:table-cell>
          <table:table-cell table:style-name="ce79" office:value-type="string" calcext:value-type="string">
            <text:p>null</text:p>
          </table:table-cell>
          <table:table-cell table:style-name="ce88" table:formula="of:=[.F65]&amp;&quot; &quot;&amp;[.G65]" office:value-type="string" office:string-value="Spanngurte defekt Die Gewichte der LSA sind lose durch den kaputten Spanngurt." calcext:value-type="string">
            <text:p>Spanngurte defekt Die Gewichte der LSA sind lose durch den kaputten Spanngurt.</text:p>
          </table:table-cell>
          <table:table-cell table:number-columns-repeated="4"/>
          <table:table-cell office:value-type="string" calcext:value-type="string">
            <text:p>x</text:p>
          </table:table-cell>
          <table:table-cell office:value-type="float" office:value="102" calcext:value-type="float">
            <text:p>102</text:p>
          </table:table-cell>
          <table:table-cell office:value-type="string" calcext:value-type="string">
            <text:p>Lichtsignalanlage</text:p>
          </table:table-cell>
          <table:table-cell table:style-name="ce99" office:value-type="float" office:value="0.166666666666667" calcext:value-type="float">
            <text:p>0.167</text:p>
          </table:table-cell>
          <table:table-cell/>
          <table:table-cell table:style-name="Default" table:number-columns-repeated="16366"/>
        </table:table-row>
        <table:table-row table:style-name="ro3">
          <table:table-cell office:value-type="float" office:value="65" calcext:value-type="float">
            <text:p>65</text:p>
          </table:table-cell>
          <table:table-cell office:value-type="string" calcext:value-type="string">
            <text:p>e7ad67f6-0bb5-4646-b1f4-9be1da8494aa</text:p>
          </table:table-cell>
          <table:table-cell office:value-type="string" calcext:value-type="string">
            <text:p>cover</text:p>
          </table:table-cell>
          <table:table-cell office:value-type="string" calcext:value-type="string">
            <text:p>cover,traffic light,intersection,street,cover</text:p>
          </table:table-cell>
          <table:table-cell office:value-type="string" calcext:value-type="string">
            <text:p><text:s/>Abdeckung offen. An der Ampelmarktplatz Richtung Bahnhofstraße ist die Abdeckung offen.</text:p>
          </table:table-cell>
          <table:table-cell office:value-type="string" calcext:value-type="string">
            <text:p>Abdeckung offen</text:p>
          </table:table-cell>
          <table:table-cell table:style-name="ce79" office:value-type="string" calcext:value-type="string">
            <text:p>An der Ampel Marktplatz Richtung Bahnhofstrasse ist die Abdeckung offen (siehe Bild)</text:p>
          </table:table-cell>
          <table:table-cell table:style-name="ce79" office:value-type="string" calcext:value-type="string">
            <text:p>a traffic light</text:p>
          </table:table-cell>
          <table:table-cell table:style-name="ce88" table:formula="of:=[.F66]&amp;&quot; &quot;&amp;[.G66]" office:value-type="string" office:string-value="Abdeckung offen An der Ampel Marktplatz Richtung Bahnhofstrasse ist die Abdeckung offen (siehe Bild)" calcext:value-type="string">
            <text:p>Abdeckung offen An der Ampel Marktplatz Richtung Bahnhofstrasse ist die Abdeckung offen (siehe Bild)</text:p>
          </table:table-cell>
          <table:table-cell table:number-columns-repeated="3"/>
          <table:table-cell office:value-type="string" calcext:value-type="string">
            <text:p>x</text:p>
          </table:table-cell>
          <table:table-cell/>
          <table:table-cell office:value-type="float" office:value="365" calcext:value-type="float">
            <text:p>365</text:p>
          </table:table-cell>
          <table:table-cell office:value-type="string" calcext:value-type="string">
            <text:p>Lichtsignalanlage</text:p>
          </table:table-cell>
          <table:table-cell table:style-name="ce99" office:value-type="float" office:value="0.5" calcext:value-type="float">
            <text:p>0.500</text:p>
          </table:table-cell>
          <table:table-cell/>
          <table:table-cell table:style-name="Default" table:number-columns-repeated="16366"/>
        </table:table-row>
        <table:table-row table:style-name="ro9">
          <table:table-cell office:value-type="float" office:value="66" calcext:value-type="float">
            <text:p>66</text:p>
          </table:table-cell>
          <table:table-cell office:value-type="string" calcext:value-type="string">
            <text:p>37ffd91a-aed1-44b0-8c07-45a082cce2a3</text:p>
          </table:table-cell>
          <table:table-cell office:value-type="string" calcext:value-type="string">
            <text:p>street lighting</text:p>
          </table:table-cell>
          <table:table-cell office:value-type="string" calcext:value-type="string">
            <text:p>street lighting,lamp,lighting,light</text:p>
          </table:table-cell>
          <table:table-cell office:value-type="string" calcext:value-type="string">
            <text:p><text:s/>Die Straßenbeleuchtung leuchtet stromsparend, geht anders.</text:p>
          </table:table-cell>
          <table:table-cell office:value-type="string" calcext:value-type="string">
            <text:p>Strassenbeleuchtung</text:p>
          </table:table-cell>
          <table:table-cell table:style-name="ce79" office:value-type="string" calcext:value-type="string">
            <text:p>Die Strassenbeleuchtung leuchtet, stromsparend geht anders…</text:p>
          </table:table-cell>
          <table:table-cell office:value-type="string" calcext:value-type="string">
            <text:p>a street lighting</text:p>
          </table:table-cell>
          <table:table-cell table:style-name="ce88" table:formula="of:=[.F67]&amp;&quot; &quot;&amp;[.G67]" office:value-type="string" office:string-value="Strassenbeleuchtung Die Strassenbeleuchtung leuchtet, stromsparend geht anders…" calcext:value-type="string">
            <text:p>Strassenbeleuchtung Die Strassenbeleuchtung leuchtet, stromsparend geht anders…</text:p>
          </table:table-cell>
          <table:table-cell office:value-type="string" calcext:value-type="string">
            <text:p>x</text:p>
          </table:table-cell>
          <table:table-cell table:number-columns-repeated="4"/>
          <table:table-cell office:value-type="float" office:value="278" calcext:value-type="float">
            <text:p>278</text:p>
          </table:table-cell>
          <table:table-cell office:value-type="string" calcext:value-type="string">
            <text:p>Lichtsignalanlage</text:p>
          </table:table-cell>
          <table:table-cell table:style-name="ce99" office:value-type="float" office:value="0.714285714285714" calcext:value-type="float">
            <text:p>0.714</text:p>
          </table:table-cell>
          <table:table-cell/>
          <table:table-cell table:style-name="Default" table:number-columns-repeated="16366"/>
        </table:table-row>
        <table:table-row table:style-name="ro19">
          <table:table-cell office:value-type="float" office:value="67" calcext:value-type="float">
            <text:p>67</text:p>
          </table:table-cell>
          <table:table-cell office:value-type="string" calcext:value-type="string">
            <text:p>322dd698-0462-43cf-9dd3-2688aeab0fcf</text:p>
          </table:table-cell>
          <table:table-cell office:value-type="string" calcext:value-type="string">
            <text:p>light signal</text:p>
          </table:table-cell>
          <table:table-cell office:value-type="string" calcext:value-type="string">
            <text:p>light signal,control,button,pedestrian button,control panel</text:p>
          </table:table-cell>
          <table:table-cell office:value-type="string" calcext:value-type="string">
            <text:p><text:s/>Lichtsignal reagiert nicht sichtbar auf Tasten. Die Steuerung scheint seit der kürzlichen Revision nicht mehr auf das Drücken der Taste für Fussgänger zu reagieren.</text:p>
          </table:table-cell>
          <table:table-cell office:value-type="string" calcext:value-type="string">
            <text:p>Lichtignal reagiert nicht sichtbar auf Taste</text:p>
          </table:table-cell>
          <table:table-cell table:style-name="ce79" office:value-type="string" calcext:value-type="string">
            <text:p>Die Steuerung scheint seit der kürzlichen Revision nicht mehr auf das Drücken der Taste für Fussgänger zu reagieren.</text:p>
          </table:table-cell>
          <table:table-cell table:style-name="ce79" office:value-type="string" calcext:value-type="string">
            <text:p>a control</text:p>
          </table:table-cell>
          <table:table-cell table:style-name="ce88" table:formula="of:=[.F68]&amp;&quot; &quot;&amp;[.G68]" office:value-type="string" office:string-value="Lichtignal reagiert nicht sichtbar auf Taste Die Steuerung scheint seit der kürzlichen Revision nicht mehr auf das Drücken der Taste für Fussgänger zu reagieren." calcext:value-type="string">
            <text:p>Lichtignal reagiert nicht sichtbar auf Taste Die Steuerung scheint seit der kürzlichen Revision nicht mehr auf das Drücken der Taste für Fussgänger zu reagieren.</text:p>
          </table:table-cell>
          <table:table-cell office:value-type="string" calcext:value-type="string">
            <text:p>x</text:p>
          </table:table-cell>
          <table:table-cell table:number-columns-repeated="4"/>
          <table:table-cell office:value-type="float" office:value="378" calcext:value-type="float">
            <text:p>378</text:p>
          </table:table-cell>
          <table:table-cell office:value-type="string" calcext:value-type="string">
            <text:p>Lichtsignalanlage</text:p>
          </table:table-cell>
          <table:table-cell table:style-name="ce99" office:value-type="float" office:value="0.0833333333333333" calcext:value-type="float">
            <text:p>0.083</text:p>
          </table:table-cell>
          <table:table-cell/>
          <table:table-cell table:style-name="Default" table:number-columns-repeated="16366"/>
        </table:table-row>
        <table:table-row table:style-name="ro19">
          <table:table-cell office:value-type="float" office:value="68" calcext:value-type="float">
            <text:p>68</text:p>
          </table:table-cell>
          <table:table-cell office:value-type="string" calcext:value-type="string">
            <text:p>4f9b9bb1-f7ab-424e-8759-c5d23a65f7fa</text:p>
          </table:table-cell>
          <table:table-cell office:value-type="string" calcext:value-type="string">
            <text:p>pedestrian light</text:p>
          </table:table-cell>
          <table:table-cell office:value-type="string" calcext:value-type="string">
            <text:p>pedestrian light,pedestrian light,light,indicator</text:p>
          </table:table-cell>
          <table:table-cell office:value-type="string" calcext:value-type="string">
            <text:p><text:s/>Der Fußgängermelder leuchtet nicht mehr rot. Der Fußgängermelder funktioniert zwar, er wird aber nicht mehr rot, um anzuzeigen, dass man warten soll.</text:p>
          </table:table-cell>
          <table:table-cell office:value-type="string" calcext:value-type="string">
            <text:p>Fussgänger-Melder leuchtet nicht mehr rot</text:p>
          </table:table-cell>
          <table:table-cell table:style-name="ce79" office:value-type="string" calcext:value-type="string">
            <text:p>Der Fussgänger-Melder funktioniert zwar, er wird aber nicht mehr rot um anzuzeigen, dass man warten soll.</text:p>
          </table:table-cell>
          <table:table-cell table:style-name="ce79" office:value-type="string" calcext:value-type="string">
            <text:p>null</text:p>
          </table:table-cell>
          <table:table-cell table:style-name="ce88" table:formula="of:=[.F69]&amp;&quot; &quot;&amp;[.G69]" office:value-type="string" office:string-value="Fussgänger-Melder leuchtet nicht mehr rot Der Fussgänger-Melder funktioniert zwar, er wird aber nicht mehr rot um anzuzeigen, dass man warten soll." calcext:value-type="string">
            <text:p>Fussgänger-Melder leuchtet nicht mehr rot Der Fussgänger-Melder funktioniert zwar, er wird aber nicht mehr rot um anzuzeigen, dass man warten soll.</text:p>
          </table:table-cell>
          <table:table-cell table:number-columns-repeated="4"/>
          <table:table-cell office:value-type="string" calcext:value-type="string">
            <text:p>x</text:p>
          </table:table-cell>
          <table:table-cell office:value-type="float" office:value="95" calcext:value-type="float">
            <text:p>95</text:p>
          </table:table-cell>
          <table:table-cell office:value-type="string" calcext:value-type="string">
            <text:p>Lichtsignalanlage</text:p>
          </table:table-cell>
          <table:table-cell table:style-name="ce99" office:value-type="float" office:value="0.238095238095238" calcext:value-type="float">
            <text:p>0.238</text:p>
          </table:table-cell>
          <table:table-cell/>
          <table:table-cell table:style-name="Default" table:number-columns-repeated="16366"/>
        </table:table-row>
        <table:table-row table:style-name="ro6">
          <table:table-cell office:value-type="float" office:value="69" calcext:value-type="float">
            <text:p>69</text:p>
          </table:table-cell>
          <table:table-cell office:value-type="string" calcext:value-type="string">
            <text:p>7260b304-f012-4fef-97f3-63cdc271de08</text:p>
          </table:table-cell>
          <table:table-cell office:value-type="string" calcext:value-type="string">
            <text:p>lamp</text:p>
          </table:table-cell>
          <table:table-cell office:value-type="string" calcext:value-type="string">
            <text:p>lamp,light,lamp,electrical fixture</text:p>
          </table:table-cell>
          <table:table-cell office:value-type="string" calcext:value-type="string">
            <text:p><text:s/>Lampe brennt nicht, die Lampe scheint kaputt zu sein.</text:p>
          </table:table-cell>
          <table:table-cell office:value-type="string" calcext:value-type="string">
            <text:p>Lampe brennt nicht</text:p>
          </table:table-cell>
          <table:table-cell table:style-name="ce79" office:value-type="string" calcext:value-type="string">
            <text:p>Die Lampe scheint kaputt zu sein</text:p>
          </table:table-cell>
          <table:table-cell table:style-name="ce79" office:value-type="string" calcext:value-type="string">
            <text:p>null</text:p>
          </table:table-cell>
          <table:table-cell table:style-name="ce88" table:formula="of:=[.F70]&amp;&quot; &quot;&amp;[.G70]" office:value-type="string" office:string-value="Lampe brennt nicht Die Lampe scheint kaputt zu sein" calcext:value-type="string">
            <text:p>Lampe brennt nicht Die Lampe scheint kaputt zu sein</text:p>
          </table:table-cell>
          <table:table-cell table:number-columns-repeated="4"/>
          <table:table-cell office:value-type="string" calcext:value-type="string">
            <text:p>x</text:p>
          </table:table-cell>
          <table:table-cell office:value-type="float" office:value="86" calcext:value-type="float">
            <text:p>86</text:p>
          </table:table-cell>
          <table:table-cell office:value-type="string" calcext:value-type="string">
            <text:p>Lichtsignalanlage</text:p>
          </table:table-cell>
          <table:table-cell table:style-name="ce99" office:value-type="float" office:value="0.333333333333333" calcext:value-type="float">
            <text:p>0.333</text:p>
          </table:table-cell>
          <table:table-cell/>
          <table:table-cell table:style-name="Default" table:number-columns-repeated="16366"/>
        </table:table-row>
        <table:table-row table:style-name="ro18">
          <table:table-cell office:value-type="float" office:value="70" calcext:value-type="float">
            <text:p>70</text:p>
          </table:table-cell>
          <table:table-cell office:value-type="string" calcext:value-type="string">
            <text:p>8bc34068-741f-449a-b9e0-8edad5395710</text:p>
          </table:table-cell>
          <table:table-cell office:value-type="string" calcext:value-type="string">
            <text:p>football figures</text:p>
          </table:table-cell>
          <table:table-cell office:value-type="string" calcext:value-type="string">
            <text:p>football figures,traffic lights,city administration,construction office,people</text:p>
          </table:table-cell>
          <table:table-cell office:value-type="string" calcext:value-type="string">
            <text:p><text:s/>Super! Also die kleinen Fussballmännchen-Ampeln sind wirklich super. Vielen Dank an die Stadtverwaltung und vor allem die Leute vom Bauamt, welche sie in der Freizeit ausgewechselt haben. Bleibt nur noch Daumen drücken und Hopp San Galle!</text:p>
          </table:table-cell>
          <table:table-cell office:value-type="string" calcext:value-type="string">
            <text:p>Super :-)</text:p>
          </table:table-cell>
          <table:table-cell table:style-name="ce79" office:value-type="string" calcext:value-type="string">
            <text:p>Also diese kleinen "Fussballmännchen - Ampeln" sind wirklich super. Vielen Dank an die Stadtverwaltung und vor allem die Leute vom Bauamt welche sie in der Freizeit ausgewechselt haben. Bleibt nur noch Daumen drücken und "Hopp SanGalle"!</text:p>
            <text:p/>
          </table:table-cell>
          <table:table-cell table:style-name="ce79" office:value-type="string" calcext:value-type="string">
            <text:p>a people</text:p>
          </table:table-cell>
          <table:table-cell table:style-name="ce88" table:formula="of:=[.F71]&amp;&quot; &quot;&amp;[.G71]" office:value-type="string" office:string-value="Super :-) Also diese kleinen &quot;Fussballmännchen - Ampeln&quot; sind wirklich super. Vielen Dank an die Stadtverwaltung und vor allem die Leute vom Bauamt welche sie in der Freizeit ausgewechselt haben. Bleibt nur noch Daumen drücken und &quot;Hopp SanGalle&quot;!&#10;" calcext:value-type="string">
            <text:p>Super :-) Also diese kleinen "Fussballmännchen - Ampeln" sind wirklich super. Vielen Dank an die Stadtverwaltung und vor allem die Leute vom Bauamt welche sie in der Freizeit ausgewechselt haben. Bleibt nur noch Daumen drücken und "Hopp SanGalle"!</text:p>
            <text:p/>
          </table:table-cell>
          <table:table-cell office:value-type="string" calcext:value-type="string">
            <text:p>x</text:p>
          </table:table-cell>
          <table:table-cell table:number-columns-repeated="4"/>
          <table:table-cell office:value-type="float" office:value="186" calcext:value-type="float">
            <text:p>186</text:p>
          </table:table-cell>
          <table:table-cell office:value-type="string" calcext:value-type="string">
            <text:p>Lichtsignalanlage</text:p>
          </table:table-cell>
          <table:table-cell table:style-name="ce99" office:value-type="float" office:value="0.263157894736842" calcext:value-type="float">
            <text:p>0.263</text:p>
          </table:table-cell>
          <table:table-cell/>
          <table:table-cell table:style-name="Default" table:number-columns-repeated="16366"/>
        </table:table-row>
        <table:table-row table:style-name="ro3">
          <table:table-cell office:value-type="float" office:value="71" calcext:value-type="float">
            <text:p>71</text:p>
          </table:table-cell>
          <table:table-cell office:value-type="string" calcext:value-type="string">
            <text:p>65d7fa40-8665-4e37-9deb-ac726b14d68c</text:p>
          </table:table-cell>
          <table:table-cell office:value-type="string" calcext:value-type="string">
            <text:p>push button</text:p>
          </table:table-cell>
          <table:table-cell office:value-type="string" calcext:value-type="string">
            <text:p>push button,push button,button,pedestrian push button,traffic light</text:p>
          </table:table-cell>
          <table:table-cell office:value-type="string" calcext:value-type="string">
            <text:p><text:s/>Druckknopf verklemmt. Der Druckknopf für die Fussgänger ist verklemmt und führt zu unnötigen Schaltungen auf Rotlicht.</text:p>
          </table:table-cell>
          <table:table-cell office:value-type="string" calcext:value-type="string">
            <text:p>druckknopf verklemmt</text:p>
          </table:table-cell>
          <table:table-cell table:style-name="ce79" office:value-type="string" calcext:value-type="string">
            <text:p>der druckknopf für die fussgänger ist verklenmt &amp; führt zu unnötigen schaltungen aufs rotlicht.</text:p>
          </table:table-cell>
          <table:table-cell table:style-name="ce79" office:value-type="string" calcext:value-type="string">
            <text:p>a pedestrian push button</text:p>
          </table:table-cell>
          <table:table-cell table:style-name="ce88" table:formula="of:=[.F72]&amp;&quot; &quot;&amp;[.G72]" office:value-type="string" office:string-value="druckknopf verklemmt der druckknopf für die fussgänger ist verklenmt &amp; führt zu unnötigen schaltungen aufs rotlicht." calcext:value-type="string">
            <text:p>druckknopf verklemmt der druckknopf für die fussgänger ist verklenmt &amp; führt zu unnötigen schaltungen aufs rotlicht.</text:p>
          </table:table-cell>
          <table:table-cell office:value-type="string" calcext:value-type="string">
            <text:p>x</text:p>
          </table:table-cell>
          <table:table-cell table:number-columns-repeated="4"/>
          <table:table-cell office:value-type="float" office:value="198" calcext:value-type="float">
            <text:p>198</text:p>
          </table:table-cell>
          <table:table-cell office:value-type="string" calcext:value-type="string">
            <text:p>Lichtsignalanlage</text:p>
          </table:table-cell>
          <table:table-cell table:style-name="ce99" office:value-type="float" office:value="0.625" calcext:value-type="float">
            <text:p>0.625</text:p>
          </table:table-cell>
          <table:table-cell/>
          <table:table-cell table:style-name="Default" table:number-columns-repeated="16366"/>
        </table:table-row>
        <table:table-row table:style-name="ro10">
          <table:table-cell office:value-type="float" office:value="72" calcext:value-type="float">
            <text:p>72</text:p>
          </table:table-cell>
          <table:table-cell office:value-type="string" calcext:value-type="string">
            <text:p>421090e1-1d72-4add-aa6a-d3a6edded92f</text:p>
          </table:table-cell>
          <table:table-cell office:value-type="string" calcext:value-type="string">
            <text:p>yellow signal</text:p>
          </table:table-cell>
          <table:table-cell office:value-type="string" calcext:value-type="string">
            <text:p>yellow signal,traffic light,traffic light,intersection,road</text:p>
          </table:table-cell>
          <table:table-cell office:value-type="string" calcext:value-type="string">
            <text:p><text:s/>Kaputtes Gelbsignal an der Ampel. An der Kreuzung Rochacher Strasse-Singenberg Strasse ist bei der Ampel das Gelblicht kaputt.</text:p>
          </table:table-cell>
          <table:table-cell office:value-type="string" calcext:value-type="string">
            <text:p>Kaputtes Gelbsignal an der Ampel</text:p>
          </table:table-cell>
          <table:table-cell table:style-name="ce79" office:value-type="string" calcext:value-type="string">
            <text:p>An der Kreuzung Rorschacher Strasse/ Singenbergstrasse ist bei der Ampel das Gelblicht kaputt.</text:p>
          </table:table-cell>
          <table:table-cell table:style-name="ce79" office:value-type="string" calcext:value-type="string">
            <text:p>a traffic light</text:p>
          </table:table-cell>
          <table:table-cell table:style-name="ce88" table:formula="of:=[.F73]&amp;&quot; &quot;&amp;[.G73]" office:value-type="string" office:string-value="Kaputtes Gelbsignal an der Ampel An der Kreuzung Rorschacher Strasse/ Singenbergstrasse ist bei der Ampel das Gelblicht kaputt." calcext:value-type="string">
            <text:p>Kaputtes Gelbsignal an der Ampel An der Kreuzung Rorschacher Strasse/ Singenbergstrasse ist bei der Ampel das Gelblicht kaputt.</text:p>
          </table:table-cell>
          <table:table-cell office:value-type="string" calcext:value-type="string">
            <text:p>x</text:p>
          </table:table-cell>
          <table:table-cell table:number-columns-repeated="4"/>
          <table:table-cell office:value-type="float" office:value="196" calcext:value-type="float">
            <text:p>196</text:p>
          </table:table-cell>
          <table:table-cell office:value-type="string" calcext:value-type="string">
            <text:p>Lichtsignalanlage</text:p>
          </table:table-cell>
          <table:table-cell table:style-name="ce99" office:value-type="float" office:value="0.222222222222222" calcext:value-type="float">
            <text:p>0.222</text:p>
          </table:table-cell>
          <table:table-cell/>
          <table:table-cell table:style-name="Default" table:number-columns-repeated="16366"/>
        </table:table-row>
        <table:table-row table:style-name="ro1">
          <table:table-cell office:value-type="float" office:value="73" calcext:value-type="float">
            <text:p>73</text:p>
          </table:table-cell>
          <table:table-cell table:style-name="ce77" office:value-type="string" calcext:value-type="string">
            <text:p>63bd227f-a957-4475-84ae-5636902048de</text:p>
          </table:table-cell>
          <table:table-cell office:value-type="string" calcext:value-type="string">
            <text:p>light</text:p>
          </table:table-cell>
          <table:table-cell office:value-type="string" calcext:value-type="string">
            <text:p>light,light</text:p>
          </table:table-cell>
          <table:table-cell office:value-type="string" calcext:value-type="string">
            <text:p><text:s/>Licht flackert.</text:p>
          </table:table-cell>
          <table:table-cell office:value-type="string" calcext:value-type="string">
            <text:p>Licht flackert</text:p>
          </table:table-cell>
          <table:table-cell table:style-name="ce79"/>
          <table:table-cell table:style-name="ce79" office:value-type="string" calcext:value-type="string">
            <text:p>a light</text:p>
          </table:table-cell>
          <table:table-cell table:style-name="ce88" table:formula="of:=[.F74]&amp;&quot; &quot;&amp;[.G74]" office:value-type="string" office:string-value="Licht flackert " calcext:value-type="string">
            <text:p>Licht flackert </text:p>
          </table:table-cell>
          <table:table-cell office:value-type="string" calcext:value-type="string">
            <text:p>x</text:p>
          </table:table-cell>
          <table:table-cell table:number-columns-repeated="4"/>
          <table:table-cell office:value-type="float" office:value="134" calcext:value-type="float">
            <text:p>134</text:p>
          </table:table-cell>
          <table:table-cell office:value-type="string" calcext:value-type="string">
            <text:p>Lichtsignalanlage</text:p>
          </table:table-cell>
          <table:table-cell table:style-name="ce99" office:value-type="float" office:value="0.5" calcext:value-type="float">
            <text:p>0.500</text:p>
          </table:table-cell>
          <table:table-cell/>
          <table:table-cell table:style-name="Default" table:number-columns-repeated="16366"/>
        </table:table-row>
        <table:table-row table:style-name="ro19">
          <table:table-cell office:value-type="float" office:value="74" calcext:value-type="float">
            <text:p>74</text:p>
          </table:table-cell>
          <table:table-cell table:style-name="ce77" office:value-type="string" calcext:value-type="string">
            <text:p>b3c3945a-4686-43a0-8108-573f11d78f69</text:p>
          </table:table-cell>
          <table:table-cell office:value-type="string" calcext:value-type="string">
            <text:p>yellow press</text:p>
          </table:table-cell>
          <table:table-cell office:value-type="string" calcext:value-type="string">
            <text:p>yellow press,press,machine,button,pedestrian press</text:p>
          </table:table-cell>
          <table:table-cell office:value-type="string" calcext:value-type="string">
            <text:p><text:s/>Gelber Drücker reagiert nicht. Auf der Seite, welche in der Aufnahme abgebildet ist, funktioniert der Drücker für die Fussgänger seit ein paar Tagen nicht mehr.</text:p>
          </table:table-cell>
          <table:table-cell office:value-type="string" calcext:value-type="string">
            <text:p>Gelber Drücker reagiert nicht</text:p>
          </table:table-cell>
          <table:table-cell table:style-name="ce79" office:value-type="string" calcext:value-type="string">
            <text:p>Auf der Seite, welche in der Aufnahme abgebildet ist, funktioniert der Drücker für die Fussgänger seit ein paar Tagen nicht mehr.</text:p>
          </table:table-cell>
          <table:table-cell table:style-name="ce79" office:value-type="string" calcext:value-type="string">
            <text:p>null</text:p>
          </table:table-cell>
          <table:table-cell table:style-name="ce88" table:formula="of:=[.F75]&amp;&quot; &quot;&amp;[.G75]" office:value-type="string" office:string-value="Gelber Drücker reagiert nicht Auf der Seite, welche in der Aufnahme abgebildet ist, funktioniert der Drücker für die Fussgänger seit ein paar Tagen nicht mehr." calcext:value-type="string">
            <text:p>Gelber Drücker reagiert nicht Auf der Seite, welche in der Aufnahme abgebildet ist, funktioniert der Drücker für die Fussgänger seit ein paar Tagen nicht mehr.</text:p>
          </table:table-cell>
          <table:table-cell table:number-columns-repeated="4"/>
          <table:table-cell office:value-type="string" calcext:value-type="string">
            <text:p>x</text:p>
          </table:table-cell>
          <table:table-cell office:value-type="float" office:value="57" calcext:value-type="float">
            <text:p>57</text:p>
          </table:table-cell>
          <table:table-cell office:value-type="string" calcext:value-type="string">
            <text:p>Lichtsignalanlage</text:p>
          </table:table-cell>
          <table:table-cell table:style-name="ce99" office:value-type="float" office:value="0.04" calcext:value-type="float">
            <text:p>0.040</text:p>
          </table:table-cell>
          <table:table-cell/>
          <table:table-cell table:style-name="Default" table:number-columns-repeated="16366"/>
        </table:table-row>
        <table:table-row table:style-name="ro18">
          <table:table-cell office:value-type="float" office:value="75" calcext:value-type="float">
            <text:p>75</text:p>
          </table:table-cell>
          <table:table-cell office:value-type="string" calcext:value-type="string">
            <text:p>fdc5b76a-340c-4b69-a062-85ee490cc5d3</text:p>
          </table:table-cell>
          <table:table-cell office:value-type="string" calcext:value-type="string">
            <text:p>button</text:p>
          </table:table-cell>
          <table:table-cell office:value-type="string" calcext:value-type="string">
            <text:p>button,pedestrian light signal,light signal,button,crosswalk</text:p>
          </table:table-cell>
          <table:table-cell office:value-type="string" calcext:value-type="string">
            <text:p><text:s/>Knopf für Fussgängerlichtsignal funktioniert nicht mehr. Der Knopf für das Lichtsignal funktioniert auf der Seite zum Bahnhof nicht mehr. Auch durch festeres Drücken nicht. Es bleibt einem nur zu warten, bis auf der Gegenseite jemand drückt oder bei Rot über die Fussgängerstreifen zu überqueren.</text:p>
          </table:table-cell>
          <table:table-cell office:value-type="string" calcext:value-type="string">
            <text:p>Knopf für Fussgänger Lichtsignal funktioniert nicht mehr</text:p>
          </table:table-cell>
          <table:table-cell table:style-name="ce79" office:value-type="string" calcext:value-type="string">
            <text:p>Der Knopf für das Lichtsignal funktioniert auf der Seite zum Bahnhof nicht mehr. Auch durch festeres Drücken nicht. Es bleibt einem nur zu warten bis auf der Gegenseite jemand drück oder bei Rot den Fussgängerstreifen zu überqueren</text:p>
          </table:table-cell>
          <table:table-cell table:style-name="ce79" office:value-type="string" calcext:value-type="string">
            <text:p>a crosswalk</text:p>
          </table:table-cell>
          <table:table-cell table:style-name="ce88" table:formula="of:=[.F76]&amp;&quot; &quot;&amp;[.G76]" office:value-type="string" office:string-value="Knopf für Fussgänger Lichtsignal funktioniert nicht mehr Der Knopf für das Lichtsignal funktioniert auf der Seite zum Bahnhof nicht mehr. Auch durch festeres Drücken nicht. Es bleibt einem nur zu warten bis auf der Gegenseite jemand drück oder bei Rot den Fussgängerstreifen zu überqueren" calcext:value-type="string">
            <text:p>Knopf für Fussgänger Lichtsignal funktioniert nicht mehr Der Knopf für das Lichtsignal funktioniert auf der Seite zum Bahnhof nicht mehr. Auch durch festeres Drücken nicht. Es bleibt einem nur zu warten bis auf der Gegenseite jemand drück oder bei Rot den Fussgängerstreifen zu überqueren</text:p>
          </table:table-cell>
          <table:table-cell table:number-columns-repeated="4"/>
          <table:table-cell office:value-type="string" calcext:value-type="string">
            <text:p>x</text:p>
          </table:table-cell>
          <table:table-cell office:value-type="float" office:value="173" calcext:value-type="float">
            <text:p>173</text:p>
          </table:table-cell>
          <table:table-cell office:value-type="string" calcext:value-type="string">
            <text:p>Lichtsignalanlage</text:p>
          </table:table-cell>
          <table:table-cell table:style-name="ce99" office:value-type="float" office:value="0.181818181818182" calcext:value-type="float">
            <text:p>0.182</text:p>
          </table:table-cell>
          <table:table-cell/>
          <table:table-cell table:style-name="Default" table:number-columns-repeated="16366"/>
        </table:table-row>
        <table:table-row table:style-name="ro6">
          <table:table-cell office:value-type="float" office:value="76" calcext:value-type="float">
            <text:p>76</text:p>
          </table:table-cell>
          <table:table-cell office:value-type="string" calcext:value-type="string">
            <text:p>b1c8d8e5-53ca-4d7b-93e6-20dc825e0660</text:p>
          </table:table-cell>
          <table:table-cell office:value-type="string" calcext:value-type="string">
            <text:p>graffiti</text:p>
          </table:table-cell>
          <table:table-cell office:value-type="string" calcext:value-type="string">
            <text:p>graffiti,outer wall,school building,Schönenwegen</text:p>
          </table:table-cell>
          <table:table-cell office:value-type="string" calcext:value-type="string">
            <text:p><text:s/>Graffiti-Aussenmauer Schulhaus Schönenwegen. Bitte entfernen.</text:p>
          </table:table-cell>
          <table:table-cell office:value-type="string" calcext:value-type="string">
            <text:p>Graffiti Aussenmauer Schulhaus Schönenwegen</text:p>
          </table:table-cell>
          <table:table-cell table:style-name="ce79" office:value-type="string" calcext:value-type="string">
            <text:p>Bitte entfernen</text:p>
          </table:table-cell>
          <table:table-cell table:style-name="ce79" office:value-type="string" calcext:value-type="string">
            <text:p>a graffiti</text:p>
          </table:table-cell>
          <table:table-cell table:style-name="ce88" table:formula="of:=[.F77]&amp;&quot; &quot;&amp;[.G77]" office:value-type="string" office:string-value="Graffiti Aussenmauer Schulhaus Schönenwegen Bitte entfernen" calcext:value-type="string">
            <text:p>Graffiti Aussenmauer Schulhaus Schönenwegen Bitte entfernen</text:p>
          </table:table-cell>
          <table:table-cell office:value-type="string" calcext:value-type="string">
            <text:p>x</text:p>
          </table:table-cell>
          <table:table-cell table:number-columns-repeated="4"/>
          <table:table-cell office:value-type="float" office:value="136" calcext:value-type="float">
            <text:p>136</text:p>
          </table:table-cell>
          <table:table-cell office:value-type="string" calcext:value-type="string">
            <text:p>Graffiti / Tags</text:p>
          </table:table-cell>
          <table:table-cell table:style-name="ce99" office:value-type="float" office:value="0.666666666666667" calcext:value-type="float">
            <text:p>0.667</text:p>
          </table:table-cell>
          <table:table-cell/>
          <table:table-cell table:style-name="Default" table:number-columns-repeated="16366"/>
        </table:table-row>
        <table:table-row table:style-name="ro27">
          <table:table-cell table:style-name="ce71" office:value-type="float" office:value="77" calcext:value-type="float">
            <text:p>77</text:p>
          </table:table-cell>
          <table:table-cell table:style-name="ce71" office:value-type="string" calcext:value-type="string">
            <text:p>e8ea1315-f05a-445c-9b62-7329dea80ba8</text:p>
          </table:table-cell>
          <table:table-cell table:style-name="ce71" office:value-type="string" calcext:value-type="string">
            <text:p>building</text:p>
          </table:table-cell>
          <table:table-cell table:style-name="ce71" office:value-type="string" calcext:value-type="string">
            <text:p>building,wardrobe building,fans,graffiti,police</text:p>
          </table:table-cell>
          <table:table-cell table:style-name="ce80" office:value-type="string" calcext:value-type="string">
            <text:p><text:s/>Schmierereien FC St. Gallen Fans. Wiederum wurde das denkmalgeschützte Garderobengebäude Opfer von zahlreichen Schmierereien der Fans des FC SG. Auch Polizei beleidigende Schmierereien. Ich bitte Sie diese von Steuern bezahlten Fanarbeit 126.000 pro Jahr zu entfernen zu lassen. Wenn die Fans schon die Rechtschreibung nicht beherrschen, dann können sie hoffentlich putzen. Danke.</text:p>
          </table:table-cell>
          <table:table-cell table:style-name="ce71" office:value-type="string" calcext:value-type="string">
            <text:p>Schmierereien FC St. Gallen Fans</text:p>
          </table:table-cell>
          <table:table-cell table:style-name="ce80" office:value-type="string" calcext:value-type="string">
            <text:p>Wiederum wurde das denkmalgeschützte Garderobengebäude Opfer von zahlreichen Schmierereien der Fans des FCSG auch Polizei beleidigende Schmierereien. Ich bitte Sie diese von teuer bezahlten Fanarbeit (162'000Fr./Jahr) entfernen zu lassen, wenn die Fans schon die Rechtschreibung nicht beherrschen, dann können sie hoffentlich putzen. Danke!</text:p>
          </table:table-cell>
          <table:table-cell table:style-name="ce80" office:value-type="string" calcext:value-type="string">
            <text:p>a graffiti</text:p>
          </table:table-cell>
          <table:table-cell table:style-name="ce89" table:formula="of:=[.F78]&amp;&quot; &quot;&amp;[.G78]" office:value-type="string" office:string-value="Schmierereien FC St. Gallen Fans Wiederum wurde das denkmalgeschützte Garderobengebäude Opfer von zahlreichen Schmierereien der Fans des FCSG auch Polizei beleidigende Schmierereien. Ich bitte Sie diese von teuer bezahlten Fanarbeit (162'000Fr./Jahr) entfernen zu lassen, wenn die Fans schon die Rechtschreibung nicht beherrschen, dann können sie hoffentlich putzen. Danke!" calcext:value-type="string">
            <text:p>Schmierereien FC St. Gallen Fans Wiederum wurde das denkmalgeschützte Garderobengebäude Opfer von zahlreichen Schmierereien der Fans des FCSG auch Polizei beleidigende Schmierereien. Ich bitte Sie diese von teuer bezahlten Fanarbeit (162'000Fr./Jahr) entfernen zu lassen, wenn die Fans schon die Rechtschreibung nicht beherrschen, dann können sie hoffentlich putzen. Danke!</text:p>
          </table:table-cell>
          <table:table-cell table:style-name="ce71" office:value-type="string" calcext:value-type="string">
            <text:p>x</text:p>
          </table:table-cell>
          <table:table-cell table:style-name="ce71" table:number-columns-repeated="4"/>
          <table:table-cell table:style-name="ce71" office:value-type="float" office:value="124" calcext:value-type="float">
            <text:p>124</text:p>
          </table:table-cell>
          <table:table-cell office:value-type="string" calcext:value-type="string">
            <text:p>Graffiti / Tags</text:p>
          </table:table-cell>
          <table:table-cell table:style-name="ce30" office:value-type="float" office:value="0.25" calcext:value-type="float">
            <text:p>0.250</text:p>
          </table:table-cell>
          <table:table-cell/>
          <table:table-cell table:style-name="ce71" table:number-columns-repeated="16366"/>
        </table:table-row>
        <table:table-row table:style-name="ro10">
          <table:table-cell office:value-type="float" office:value="78" calcext:value-type="float">
            <text:p>78</text:p>
          </table:table-cell>
          <table:table-cell office:value-type="string" calcext:value-type="string">
            <text:p>57919c14-c2e0-4444-bd9d-52bf1ad88a62</text:p>
          </table:table-cell>
          <table:table-cell office:value-type="string" calcext:value-type="string">
            <text:p>graffiti</text:p>
          </table:table-cell>
          <table:table-cell office:value-type="string" calcext:value-type="string">
            <text:p>graffiti,building,building,building,building</text:p>
          </table:table-cell>
          <table:table-cell office:value-type="string" calcext:value-type="string">
            <text:p><text:s/>Schmierereien. Die Südseite des kleinen Gebäudes in der Kurve vom Stationsweg, siehe Bild, wurde verschmiert. Gebäude ID 5000003174.</text:p>
          </table:table-cell>
          <table:table-cell office:value-type="string" calcext:value-type="string">
            <text:p>Schmierereien</text:p>
          </table:table-cell>
          <table:table-cell table:style-name="ce79" office:value-type="string" calcext:value-type="string">
            <text:p>Die Südseite des kleinen Gebäudes in der Kurve vom Stationsweg (siehe Bild) wurde verschmiert. Gebäude ID 500003174</text:p>
          </table:table-cell>
          <table:table-cell table:style-name="ce79" office:value-type="string" calcext:value-type="string">
            <text:p>a graffiti</text:p>
          </table:table-cell>
          <table:table-cell table:style-name="ce88" table:formula="of:=[.F79]&amp;&quot; &quot;&amp;[.G79]" office:value-type="string" office:string-value="Schmierereien Die Südseite des kleinen Gebäudes in der Kurve vom Stationsweg (siehe Bild) wurde verschmiert. Gebäude ID 500003174" calcext:value-type="string">
            <text:p>Schmierereien Die Südseite des kleinen Gebäudes in der Kurve vom Stationsweg (siehe Bild) wurde verschmiert. Gebäude ID 500003174</text:p>
          </table:table-cell>
          <table:table-cell office:value-type="string" calcext:value-type="string">
            <text:p>x</text:p>
          </table:table-cell>
          <table:table-cell table:number-columns-repeated="4"/>
          <table:table-cell office:value-type="float" office:value="259" calcext:value-type="float">
            <text:p>259</text:p>
          </table:table-cell>
          <table:table-cell office:value-type="string" calcext:value-type="string">
            <text:p>Graffiti / Tags</text:p>
          </table:table-cell>
          <table:table-cell table:style-name="ce99" office:value-type="float" office:value="0.277777777777778" calcext:value-type="float">
            <text:p>0.278</text:p>
          </table:table-cell>
          <table:table-cell/>
          <table:table-cell table:style-name="Default" table:number-columns-repeated="16366"/>
        </table:table-row>
        <table:table-row table:style-name="ro1">
          <table:table-cell office:value-type="float" office:value="79" calcext:value-type="float">
            <text:p>79</text:p>
          </table:table-cell>
          <table:table-cell office:value-type="string" calcext:value-type="string">
            <text:p>0397a15a-3036-4013-bdad-4d99380b22f2</text:p>
          </table:table-cell>
          <table:table-cell office:value-type="string" calcext:value-type="string">
            <text:p>dirty board</text:p>
          </table:table-cell>
          <table:table-cell office:value-type="string" calcext:value-type="string">
            <text:p>dirty board,chalkboard,slate</text:p>
          </table:table-cell>
          <table:table-cell office:value-type="string" calcext:value-type="string">
            <text:p><text:s/>Verschmutzte Tafel.</text:p>
          </table:table-cell>
          <table:table-cell office:value-type="string" calcext:value-type="string">
            <text:p>Verschmutzte Tafel</text:p>
          </table:table-cell>
          <table:table-cell table:style-name="ce79"/>
          <table:table-cell table:style-name="ce79" office:value-type="string" calcext:value-type="string">
            <text:p>null</text:p>
          </table:table-cell>
          <table:table-cell table:style-name="ce88" table:formula="of:=[.F80]&amp;&quot; &quot;&amp;[.G80]" office:value-type="string" office:string-value="Verschmutzte Tafel " calcext:value-type="string">
            <text:p>Verschmutzte Tafel </text:p>
          </table:table-cell>
          <table:table-cell table:number-columns-repeated="2"/>
          <table:table-cell office:value-type="string" calcext:value-type="string">
            <text:p>x</text:p>
          </table:table-cell>
          <table:table-cell table:number-columns-repeated="2"/>
          <table:table-cell office:value-type="float" office:value="78" calcext:value-type="float">
            <text:p>78</text:p>
          </table:table-cell>
          <table:table-cell office:value-type="string" calcext:value-type="string">
            <text:p>Graffiti / Tags</text:p>
          </table:table-cell>
          <table:table-cell table:style-name="ce99" office:value-type="float" office:value="0.5" calcext:value-type="float">
            <text:p>0.500</text:p>
          </table:table-cell>
          <table:table-cell/>
          <table:table-cell table:style-name="Default" table:number-columns-repeated="16366"/>
        </table:table-row>
        <table:table-row table:style-name="ro9">
          <table:table-cell office:value-type="float" office:value="80" calcext:value-type="float">
            <text:p>80</text:p>
          </table:table-cell>
          <table:table-cell office:value-type="string" calcext:value-type="string">
            <text:p>29a1d89e-0584-44b8-9b3b-69c5b0931951</text:p>
          </table:table-cell>
          <table:table-cell office:value-type="string" calcext:value-type="string">
            <text:p>graffiti</text:p>
          </table:table-cell>
          <table:table-cell office:value-type="string" calcext:value-type="string">
            <text:p>graffiti,graffiti,markings,vandalism</text:p>
          </table:table-cell>
          <table:table-cell office:value-type="string" calcext:value-type="string">
            <text:p><text:s/>Graffiti. Bitte die Graffitis bei der Kantonsspitalunterführung entfernen.</text:p>
          </table:table-cell>
          <table:table-cell office:value-type="string" calcext:value-type="string">
            <text:p>Graffiti</text:p>
          </table:table-cell>
          <table:table-cell table:style-name="ce79" office:value-type="string" calcext:value-type="string">
            <text:p>Bitte die Graffitis bei der Kantonsspital Unterführung entfernen</text:p>
          </table:table-cell>
          <table:table-cell table:style-name="ce79" office:value-type="string" calcext:value-type="string">
            <text:p>a graffiti</text:p>
          </table:table-cell>
          <table:table-cell table:style-name="ce88" table:formula="of:=[.F81]&amp;&quot; &quot;&amp;[.G81]" office:value-type="string" office:string-value="Graffiti Bitte die Graffitis bei der Kantonsspital Unterführung entfernen" calcext:value-type="string">
            <text:p>Graffiti Bitte die Graffitis bei der Kantonsspital Unterführung entfernen</text:p>
          </table:table-cell>
          <table:table-cell office:value-type="string" calcext:value-type="string">
            <text:p>x</text:p>
          </table:table-cell>
          <table:table-cell table:number-columns-repeated="4"/>
          <table:table-cell office:value-type="float" office:value="126" calcext:value-type="float">
            <text:p>126</text:p>
          </table:table-cell>
          <table:table-cell office:value-type="string" calcext:value-type="string">
            <text:p>Graffiti / Tags</text:p>
          </table:table-cell>
          <table:table-cell table:style-name="ce99" office:value-type="float" office:value="0.444444444444444" calcext:value-type="float">
            <text:p>0.444</text:p>
          </table:table-cell>
          <table:table-cell/>
          <table:table-cell table:style-name="Default" table:number-columns-repeated="16366"/>
        </table:table-row>
        <table:table-row table:style-name="ro28">
          <table:table-cell office:value-type="float" office:value="81" calcext:value-type="float">
            <text:p>81</text:p>
          </table:table-cell>
          <table:table-cell office:value-type="string" calcext:value-type="string">
            <text:p>f14e07c8-c396-4e6b-b50d-28adac24972d</text:p>
          </table:table-cell>
          <table:table-cell office:value-type="string" calcext:value-type="string">
            <text:p>sports hall</text:p>
          </table:table-cell>
          <table:table-cell office:value-type="string" calcext:value-type="string">
            <text:p>sports hall,wall,masonry,graffiti,wallwork</text:p>
          </table:table-cell>
          <table:table-cell office:value-type="string" calcext:value-type="string">
            <text:p><text:s/>Sporthalle Buchwald. Werter den Anfängen. Erstmaliges Graffiti auf diesem grossartigen und seltenen Verbandsmauerwerk Kreuzverband und ausgezeichneten Mauerhandwerk 1952. Mauer ist über 70 Jahre immer noch im besten Zustand.</text:p>
          </table:table-cell>
          <table:table-cell office:value-type="string" calcext:value-type="string">
            <text:p>Sporthalle Buechwald</text:p>
          </table:table-cell>
          <table:table-cell table:style-name="ce79" office:value-type="string" calcext:value-type="string">
            <text:p>Wehret den Anfängen!! Erstmaliges Graffiti auf diesem grossartigen und seltenen Verbandmauerwerk (Kreuzverband) und ausgezeichneten Maurerhandwerk (1952). Mauer ist über 70 Jahre immer noch in bestem Zustand!</text:p>
          </table:table-cell>
          <table:table-cell table:style-name="ce79" office:value-type="string" calcext:value-type="string">
            <text:p>a wall</text:p>
          </table:table-cell>
          <table:table-cell table:style-name="ce88" table:formula="of:=[.F82]&amp;&quot; &quot;&amp;[.G82]" office:value-type="string" office:string-value="Sporthalle Buechwald Wehret den Anfängen!! Erstmaliges Graffiti auf diesem grossartigen und seltenen Verbandmauerwerk (Kreuzverband) und ausgezeichneten Maurerhandwerk (1952). Mauer ist über 70 Jahre immer noch in bestem Zustand!" calcext:value-type="string">
            <text:p>Sporthalle Buechwald Wehret den Anfängen!! Erstmaliges Graffiti auf diesem grossartigen und seltenen Verbandmauerwerk (Kreuzverband) und ausgezeichneten Maurerhandwerk (1952). Mauer ist über 70 Jahre immer noch in bestem Zustand!</text:p>
          </table:table-cell>
          <table:table-cell table:number-columns-repeated="3"/>
          <table:table-cell office:value-type="string" calcext:value-type="string">
            <text:p>x</text:p>
          </table:table-cell>
          <table:table-cell/>
          <table:table-cell office:value-type="float" office:value="186" calcext:value-type="float">
            <text:p>186</text:p>
          </table:table-cell>
          <table:table-cell office:value-type="string" calcext:value-type="string">
            <text:p>Graffiti / Tags</text:p>
          </table:table-cell>
          <table:table-cell table:style-name="ce99" office:value-type="float" office:value="0.357142857142857" calcext:value-type="float">
            <text:p>0.357</text:p>
          </table:table-cell>
          <table:table-cell/>
          <table:table-cell table:style-name="Default" table:number-columns-repeated="16366"/>
        </table:table-row>
        <table:table-row table:style-name="ro14">
          <table:table-cell office:value-type="float" office:value="82" calcext:value-type="float">
            <text:p>82</text:p>
          </table:table-cell>
          <table:table-cell office:value-type="string" calcext:value-type="string">
            <text:p>1dbb75dd-152a-4041-8572-afb007537bf2</text:p>
          </table:table-cell>
          <table:table-cell office:value-type="string" calcext:value-type="string">
            <text:p>spray cans</text:p>
          </table:table-cell>
          <table:table-cell office:value-type="string" calcext:value-type="string">
            <text:p>spray cans,glue,stickers,vandals,FCSG</text:p>
          </table:table-cell>
          <table:table-cell office:value-type="string" calcext:value-type="string">
            <text:p><text:s/>Brülltor-Unterführung Tags. Die Brülltor-Unterführung wird wieder vermehrt von Sprayern heimgesucht. Auch Kleber, Sticker verunstalten die Gegend. FCSG-Vandalen sind ein großes Ärgernis.</text:p>
          </table:table-cell>
          <table:table-cell office:value-type="string" calcext:value-type="string">
            <text:p>Brühltor Unterführung Tags</text:p>
          </table:table-cell>
          <table:table-cell table:style-name="ce79" office:value-type="string" calcext:value-type="string">
            <text:p>Die Brühltor Unterführung wird wieder vermehrt von Sprayern heimgesucht. Auch Klebe Sticker verunstalten die Gegend. FC SG Vandalen sind ein grosses Ärgernis.</text:p>
          </table:table-cell>
          <table:table-cell table:style-name="ce79" office:value-type="string" calcext:value-type="string">
            <text:p>a vandals</text:p>
          </table:table-cell>
          <table:table-cell table:style-name="ce88" table:formula="of:=[.F83]&amp;&quot; &quot;&amp;[.G83]" office:value-type="string" office:string-value="Brühltor Unterführung Tags Die Brühltor Unterführung wird wieder vermehrt von Sprayern heimgesucht. Auch Klebe Sticker verunstalten die Gegend. FC SG Vandalen sind ein grosses Ärgernis." calcext:value-type="string">
            <text:p>Brühltor Unterführung Tags Die Brühltor Unterführung wird wieder vermehrt von Sprayern heimgesucht. Auch Klebe Sticker verunstalten die Gegend. FC SG Vandalen sind ein grosses Ärgernis.</text:p>
          </table:table-cell>
          <table:table-cell office:value-type="string" calcext:value-type="string">
            <text:p>x</text:p>
          </table:table-cell>
          <table:table-cell table:number-columns-repeated="4"/>
          <table:table-cell office:value-type="float" office:value="192" calcext:value-type="float">
            <text:p>192</text:p>
          </table:table-cell>
          <table:table-cell office:value-type="string" calcext:value-type="string">
            <text:p>Graffiti / Tags</text:p>
          </table:table-cell>
          <table:table-cell table:style-name="ce99" office:value-type="float" office:value="0.4" calcext:value-type="float">
            <text:p>0.400</text:p>
          </table:table-cell>
          <table:table-cell/>
          <table:table-cell table:style-name="Default" table:number-columns-repeated="16366"/>
        </table:table-row>
        <table:table-row table:style-name="ro3">
          <table:table-cell office:value-type="float" office:value="83" calcext:value-type="float">
            <text:p>83</text:p>
          </table:table-cell>
          <table:table-cell office:value-type="string" calcext:value-type="string">
            <text:p>c323bc3a-a6e3-409c-932e-f6faab267d37</text:p>
          </table:table-cell>
          <table:table-cell office:value-type="string" calcext:value-type="string">
            <text:p>graffiti</text:p>
          </table:table-cell>
          <table:table-cell office:value-type="string" calcext:value-type="string">
            <text:p>graffiti,concrete wall,trench,concrete wall,spray paint</text:p>
          </table:table-cell>
          <table:table-cell office:value-type="string" calcext:value-type="string">
            <text:p><text:s/>Bitte Graffiti entfernen. Grabenhalle. Grabenhalle zum unteren Graben. Betonwand wurde versprayt.</text:p>
          </table:table-cell>
          <table:table-cell office:value-type="string" calcext:value-type="string">
            <text:p>Bitte Graffiti entfernen / Grabenhalle</text:p>
          </table:table-cell>
          <table:table-cell table:style-name="ce79" office:value-type="string" calcext:value-type="string">
            <text:p>Grabenhalle zum Unteren Graben / Beton Wand wurde versprayt</text:p>
          </table:table-cell>
          <table:table-cell table:style-name="ce79" office:value-type="string" calcext:value-type="string">
            <text:p>a graffiti</text:p>
          </table:table-cell>
          <table:table-cell table:style-name="ce88" table:formula="of:=[.F84]&amp;&quot; &quot;&amp;[.G84]" office:value-type="string" office:string-value="Bitte Graffiti entfernen / Grabenhalle Grabenhalle zum Unteren Graben / Beton Wand wurde versprayt" calcext:value-type="string">
            <text:p>Bitte Graffiti entfernen / Grabenhalle Grabenhalle zum Unteren Graben / Beton Wand wurde versprayt</text:p>
          </table:table-cell>
          <table:table-cell office:value-type="string" calcext:value-type="string">
            <text:p>x</text:p>
          </table:table-cell>
          <table:table-cell table:number-columns-repeated="4"/>
          <table:table-cell office:value-type="float" office:value="165" calcext:value-type="float">
            <text:p>165</text:p>
          </table:table-cell>
          <table:table-cell office:value-type="string" calcext:value-type="string">
            <text:p>Graffiti / Tags</text:p>
          </table:table-cell>
          <table:table-cell table:style-name="ce99" office:value-type="float" office:value="0.642857142857143" calcext:value-type="float">
            <text:p>0.643</text:p>
          </table:table-cell>
          <table:table-cell/>
          <table:table-cell table:style-name="Default" table:number-columns-repeated="16366"/>
        </table:table-row>
        <table:table-row table:style-name="ro3">
          <table:table-cell office:value-type="float" office:value="84" calcext:value-type="float">
            <text:p>84</text:p>
          </table:table-cell>
          <table:table-cell office:value-type="string" calcext:value-type="string">
            <text:p>70443473-0fce-463c-b335-85773a93f324</text:p>
          </table:table-cell>
          <table:table-cell office:value-type="string" calcext:value-type="string">
            <text:p>rollpark</text:p>
          </table:table-cell>
          <table:table-cell office:value-type="string" calcext:value-type="string">
            <text:p>rollpark,St. Gallen,area,park</text:p>
          </table:table-cell>
          <table:table-cell office:value-type="string" calcext:value-type="string">
            <text:p><text:s/>Schweinerei. Der gesamte Rollpark St. Gallen ist beschmiert. Bitte um Gesamtreinigung.</text:p>
          </table:table-cell>
          <table:table-cell office:value-type="string" calcext:value-type="string">
            <text:p>Schweinerei !</text:p>
          </table:table-cell>
          <table:table-cell table:style-name="ce79" office:value-type="string" calcext:value-type="string">
            <text:p>Der gesamte Rollpark St.Gallen in beschmiert! Bitte um Gesamtreinigung.</text:p>
          </table:table-cell>
          <table:table-cell table:style-name="ce79"/>
          <table:table-cell table:style-name="ce88" table:formula="of:=[.F85]&amp;&quot; &quot;&amp;[.G85]" office:value-type="string" office:string-value="Schweinerei ! Der gesamte Rollpark St.Gallen in beschmiert! Bitte um Gesamtreinigung." calcext:value-type="string">
            <text:p>Schweinerei ! Der gesamte Rollpark St.Gallen in beschmiert! Bitte um Gesamtreinigung.</text:p>
          </table:table-cell>
          <table:table-cell table:number-columns-repeated="2"/>
          <table:table-cell office:value-type="string" calcext:value-type="string">
            <text:p>x</text:p>
          </table:table-cell>
          <table:table-cell table:number-columns-repeated="2"/>
          <table:table-cell office:value-type="float" office:value="142" calcext:value-type="float">
            <text:p>142</text:p>
          </table:table-cell>
          <table:table-cell office:value-type="string" calcext:value-type="string">
            <text:p>Graffiti / Tags</text:p>
          </table:table-cell>
          <table:table-cell table:style-name="ce99" office:value-type="float" office:value="0.545454545454545" calcext:value-type="float">
            <text:p>0.545</text:p>
          </table:table-cell>
          <table:table-cell/>
          <table:table-cell table:style-name="Default" table:number-columns-repeated="16366"/>
        </table:table-row>
        <table:table-row table:style-name="ro19">
          <table:table-cell office:value-type="float" office:value="85" calcext:value-type="float">
            <text:p>85</text:p>
          </table:table-cell>
          <table:table-cell office:value-type="string" calcext:value-type="string">
            <text:p>d1cfb76d-e115-4377-b292-b2b866c985ae</text:p>
          </table:table-cell>
          <table:table-cell office:value-type="string" calcext:value-type="string">
            <text:p>graffiti</text:p>
          </table:table-cell>
          <table:table-cell office:value-type="string" calcext:value-type="string">
            <text:p>graffiti,wartehäuschen,walls,paint,cleaning</text:p>
          </table:table-cell>
          <table:table-cell office:value-type="string" calcext:value-type="string">
            <text:p><text:s/>Graffiti. Das Wartehäuschen ist schon seit geraumer Zeit an mehreren Seiten mit Graffiti verschmiert. Bitte um Reinigung. Besten Dank im Voraus.</text:p>
          </table:table-cell>
          <table:table-cell office:value-type="string" calcext:value-type="string">
            <text:p>Graffiti</text:p>
          </table:table-cell>
          <table:table-cell table:style-name="ce79" office:value-type="string" calcext:value-type="string">
            <text:p>Das Wartehäuschen ist schon seit geraumer Zeit an mehreren Seiten mit Graffiti verschmiert. Mit der Bitte um Reinigung. Besten Dank im Voraus.</text:p>
          </table:table-cell>
          <table:table-cell table:style-name="ce79" office:value-type="string" calcext:value-type="string">
            <text:p>a graffiti</text:p>
          </table:table-cell>
          <table:table-cell table:style-name="ce88" table:formula="of:=[.F86]&amp;&quot; &quot;&amp;[.G86]" office:value-type="string" office:string-value="Graffiti Das Wartehäuschen ist schon seit geraumer Zeit an mehreren Seiten mit Graffiti verschmiert. Mit der Bitte um Reinigung. Besten Dank im Voraus." calcext:value-type="string">
            <text:p>Graffiti Das Wartehäuschen ist schon seit geraumer Zeit an mehreren Seiten mit Graffiti verschmiert. Mit der Bitte um Reinigung. Besten Dank im Voraus.</text:p>
          </table:table-cell>
          <table:table-cell office:value-type="string" calcext:value-type="string">
            <text:p>x</text:p>
          </table:table-cell>
          <table:table-cell table:number-columns-repeated="4"/>
          <table:table-cell office:value-type="float" office:value="204" calcext:value-type="float">
            <text:p>204</text:p>
          </table:table-cell>
          <table:table-cell office:value-type="string" calcext:value-type="string">
            <text:p>Graffiti / Tags</text:p>
          </table:table-cell>
          <table:table-cell table:style-name="ce99" office:value-type="float" office:value="0.130434782608696" calcext:value-type="float">
            <text:p>0.130</text:p>
          </table:table-cell>
          <table:table-cell/>
          <table:table-cell table:style-name="Default" table:number-columns-repeated="16366"/>
        </table:table-row>
        <table:table-row table:style-name="ro6">
          <table:table-cell office:value-type="float" office:value="86" calcext:value-type="float">
            <text:p>86</text:p>
          </table:table-cell>
          <table:table-cell office:value-type="string" calcext:value-type="string">
            <text:p>00afd90a-806d-41ed-8e3e-7385d81e7a3d</text:p>
          </table:table-cell>
          <table:table-cell office:value-type="string" calcext:value-type="string">
            <text:p>graffiti</text:p>
          </table:table-cell>
          <table:table-cell office:value-type="string" calcext:value-type="string">
            <text:p>graffiti,markings,vandalism</text:p>
          </table:table-cell>
          <table:table-cell office:value-type="string" calcext:value-type="string">
            <text:p><text:s/>Schmierereien bitte umgehend entfernen.</text:p>
          </table:table-cell>
          <table:table-cell office:value-type="string" calcext:value-type="string">
            <text:p>Schmiererei</text:p>
          </table:table-cell>
          <table:table-cell table:style-name="ce79" office:value-type="string" calcext:value-type="string">
            <text:p>Bitte umgehend entfernen</text:p>
          </table:table-cell>
          <table:table-cell table:style-name="ce79" office:value-type="string" calcext:value-type="string">
            <text:p>a markings</text:p>
          </table:table-cell>
          <table:table-cell table:style-name="ce88" table:formula="of:=[.F87]&amp;&quot; &quot;&amp;[.G87]" office:value-type="string" office:string-value="Schmiererei Bitte umgehend entfernen" calcext:value-type="string">
            <text:p>Schmiererei Bitte umgehend entfernen</text:p>
          </table:table-cell>
          <table:table-cell office:value-type="string" calcext:value-type="string">
            <text:p>x</text:p>
          </table:table-cell>
          <table:table-cell table:number-columns-repeated="4"/>
          <table:table-cell office:value-type="float" office:value="85" calcext:value-type="float">
            <text:p>85</text:p>
          </table:table-cell>
          <table:table-cell office:value-type="string" calcext:value-type="string">
            <text:p>Graffiti / Tags</text:p>
          </table:table-cell>
          <table:table-cell table:style-name="ce99" office:value-type="float" office:value="0.75" calcext:value-type="float">
            <text:p>0.750</text:p>
          </table:table-cell>
          <table:table-cell/>
          <table:table-cell table:style-name="Default" table:number-columns-repeated="16366"/>
        </table:table-row>
        <table:table-row table:style-name="ro29">
          <table:table-cell office:value-type="float" office:value="87" calcext:value-type="float">
            <text:p>87</text:p>
          </table:table-cell>
          <table:table-cell office:value-type="string" calcext:value-type="string">
            <text:p>3f563e5c-be91-44dc-95ae-38d639aa747f</text:p>
          </table:table-cell>
          <table:table-cell office:value-type="string" calcext:value-type="string">
            <text:p>monument</text:p>
          </table:table-cell>
          <table:table-cell office:value-type="string" calcext:value-type="string">
            <text:p>monument,monument,pedestal,lines,markings</text:p>
          </table:table-cell>
          <table:table-cell office:value-type="string" calcext:value-type="string">
            <text:p><text:s/>Wadian Denkmal, bitte die Schmierreihen oberhalb dem Sockel entfernen. Danke.</text:p>
          </table:table-cell>
          <table:table-cell office:value-type="string" calcext:value-type="string">
            <text:p>Vadian Denkmal</text:p>
          </table:table-cell>
          <table:table-cell table:style-name="ce79" office:value-type="string" calcext:value-type="string">
            <text:p>Bitte die Schmiererei oberhalb dem Sockel entfernen. Danke</text:p>
          </table:table-cell>
          <table:table-cell table:style-name="ce79" office:value-type="string" calcext:value-type="string">
            <text:p>a lines</text:p>
          </table:table-cell>
          <table:table-cell table:style-name="ce88" table:formula="of:=[.F88]&amp;&quot; &quot;&amp;[.G88]" office:value-type="string" office:string-value="Vadian Denkmal Bitte die Schmiererei oberhalb dem Sockel entfernen. Danke" calcext:value-type="string">
            <text:p>Vadian Denkmal Bitte die Schmiererei oberhalb dem Sockel entfernen. Danke</text:p>
          </table:table-cell>
          <table:table-cell table:number-columns-repeated="3"/>
          <table:table-cell office:value-type="string" calcext:value-type="string">
            <text:p>x</text:p>
          </table:table-cell>
          <table:table-cell/>
          <table:table-cell office:value-type="float" office:value="213" calcext:value-type="float">
            <text:p>213</text:p>
          </table:table-cell>
          <table:table-cell office:value-type="string" calcext:value-type="string">
            <text:p>Graffiti / Tags</text:p>
          </table:table-cell>
          <table:table-cell table:style-name="ce99" office:value-type="float" office:value="0.5" calcext:value-type="float">
            <text:p>0.500</text:p>
          </table:table-cell>
          <table:table-cell/>
          <table:table-cell table:style-name="Default" table:number-columns-repeated="16366"/>
        </table:table-row>
        <table:table-row table:style-name="ro6">
          <table:table-cell office:value-type="float" office:value="88" calcext:value-type="float">
            <text:p>88</text:p>
          </table:table-cell>
          <table:table-cell office:value-type="string" calcext:value-type="string">
            <text:p>c7a6ac34-456e-40ef-82ed-8b91468c8151</text:p>
          </table:table-cell>
          <table:table-cell office:value-type="string" calcext:value-type="string">
            <text:p>waste bin</text:p>
          </table:table-cell>
          <table:table-cell office:value-type="string" calcext:value-type="string">
            <text:p>waste bin,dumpster,container,trash can</text:p>
          </table:table-cell>
          <table:table-cell office:value-type="string" calcext:value-type="string">
            <text:p><text:s/>Escape Company verklebt Abfalleimer.</text:p>
          </table:table-cell>
          <table:table-cell office:value-type="string" calcext:value-type="string">
            <text:p>Escape Company verklebt Abfalleimer</text:p>
          </table:table-cell>
          <table:table-cell table:style-name="ce79"/>
          <table:table-cell table:style-name="ce79" office:value-type="string" calcext:value-type="string">
            <text:p>a waste bin</text:p>
          </table:table-cell>
          <table:table-cell table:style-name="ce88" table:formula="of:=[.F89]&amp;&quot; &quot;&amp;[.G89]" office:value-type="string" office:string-value="Escape Company verklebt Abfalleimer " calcext:value-type="string">
            <text:p>Escape Company verklebt Abfalleimer </text:p>
          </table:table-cell>
          <table:table-cell table:number-columns-repeated="2"/>
          <table:table-cell office:value-type="string" calcext:value-type="string">
            <text:p>x</text:p>
          </table:table-cell>
          <table:table-cell table:number-columns-repeated="2"/>
          <table:table-cell office:value-type="float" office:value="197" calcext:value-type="float">
            <text:p>197</text:p>
          </table:table-cell>
          <table:table-cell office:value-type="string" calcext:value-type="string">
            <text:p>Graffiti / Tags</text:p>
          </table:table-cell>
          <table:table-cell table:style-name="ce99" office:value-type="float" office:value="0.25" calcext:value-type="float">
            <text:p>0.250</text:p>
          </table:table-cell>
          <table:table-cell/>
          <table:table-cell table:style-name="Default" table:number-columns-repeated="16366"/>
        </table:table-row>
        <table:table-row table:style-name="ro6">
          <table:table-cell office:value-type="float" office:value="89" calcext:value-type="float">
            <text:p>89</text:p>
          </table:table-cell>
          <table:table-cell office:value-type="string" calcext:value-type="string">
            <text:p>aacecc4a-0b37-47bd-bedf-399a3b7d59fe</text:p>
          </table:table-cell>
          <table:table-cell office:value-type="string" calcext:value-type="string">
            <text:p>signboard</text:p>
          </table:table-cell>
          <table:table-cell office:value-type="string" calcext:value-type="string">
            <text:p>signboard,orientation sign,timetable board,sign</text:p>
          </table:table-cell>
          <table:table-cell office:value-type="string" calcext:value-type="string">
            <text:p><text:s/>VBSG-Orientierungs- und Fahrplantafel verschmiert.</text:p>
          </table:table-cell>
          <table:table-cell office:value-type="string" calcext:value-type="string">
            <text:p>VBSG-Orientierungs-und Fahrplantafel verschmiert</text:p>
          </table:table-cell>
          <table:table-cell table:style-name="ce79"/>
          <table:table-cell table:style-name="ce79" office:value-type="string" calcext:value-type="string">
            <text:p>a signboard</text:p>
          </table:table-cell>
          <table:table-cell table:style-name="ce88" table:formula="of:=[.F90]&amp;&quot; &quot;&amp;[.G90]" office:value-type="string" office:string-value="VBSG-Orientierungs-und Fahrplantafel verschmiert " calcext:value-type="string">
            <text:p>VBSG-Orientierungs-und Fahrplantafel verschmiert </text:p>
          </table:table-cell>
          <table:table-cell office:value-type="string" calcext:value-type="string">
            <text:p>x</text:p>
          </table:table-cell>
          <table:table-cell table:number-columns-repeated="4"/>
          <table:table-cell office:value-type="float" office:value="201" calcext:value-type="float">
            <text:p>201</text:p>
          </table:table-cell>
          <table:table-cell office:value-type="string" calcext:value-type="string">
            <text:p>Graffiti / Tags</text:p>
          </table:table-cell>
          <table:table-cell table:style-name="ce99" office:value-type="float" office:value="1" calcext:value-type="float">
            <text:p>1.000</text:p>
          </table:table-cell>
          <table:table-cell/>
          <table:table-cell table:style-name="Default" table:number-columns-repeated="16366"/>
        </table:table-row>
        <table:table-row table:style-name="ro14">
          <table:table-cell office:value-type="float" office:value="90" calcext:value-type="float">
            <text:p>90</text:p>
          </table:table-cell>
          <table:table-cell office:value-type="string" calcext:value-type="string">
            <text:p>0a94f0f6-e7e1-4c81-b13e-053e657a6cac</text:p>
          </table:table-cell>
          <table:table-cell office:value-type="string" calcext:value-type="string">
            <text:p>person</text:p>
          </table:table-cell>
          <table:table-cell office:value-type="string" calcext:value-type="string">
            <text:p>person,sprayer,underpass,paint,spray</text:p>
          </table:table-cell>
          <table:table-cell office:value-type="string" calcext:value-type="string">
            <text:p><text:s/>Personenunterführung St. Fieden wieder im Visier der Sprayer. Ich nutze die Unterführung täglich nach wochenlanger relativer Enthaltsamkeit. Der Sprayer nehmen ihre Schmierereien nun wieder zu.</text:p>
          </table:table-cell>
          <table:table-cell office:value-type="string" calcext:value-type="string">
            <text:p>Personenunterführung St. Fiden wieder im Visier der Sprayer</text:p>
          </table:table-cell>
          <table:table-cell table:style-name="ce79" office:value-type="string" calcext:value-type="string">
            <text:p>Ich nutze diese Unterführung täglich. Nach wochenlanger relativer 'Enthaltsamkeit' der Sprayer nehmen ihre Schmierereien nun wieder zu.</text:p>
          </table:table-cell>
          <table:table-cell table:style-name="ce79" office:value-type="string" calcext:value-type="string">
            <text:p>a paint</text:p>
          </table:table-cell>
          <table:table-cell table:style-name="ce88" table:formula="of:=[.F91]&amp;&quot; &quot;&amp;[.G91]" office:value-type="string" office:string-value="Personenunterführung St. Fiden wieder im Visier der Sprayer Ich nutze diese Unterführung täglich. Nach wochenlanger relativer 'Enthaltsamkeit' der Sprayer nehmen ihre Schmierereien nun wieder zu." calcext:value-type="string">
            <text:p>Personenunterführung St. Fiden wieder im Visier der Sprayer Ich nutze diese Unterführung täglich. Nach wochenlanger relativer 'Enthaltsamkeit' der Sprayer nehmen ihre Schmierereien nun wieder zu.</text:p>
          </table:table-cell>
          <table:table-cell office:value-type="string" calcext:value-type="string">
            <text:p>x</text:p>
          </table:table-cell>
          <table:table-cell table:number-columns-repeated="4"/>
          <table:table-cell office:value-type="float" office:value="184" calcext:value-type="float">
            <text:p>184</text:p>
          </table:table-cell>
          <table:table-cell office:value-type="string" calcext:value-type="string">
            <text:p>Graffiti / Tags</text:p>
          </table:table-cell>
          <table:table-cell table:style-name="ce99" office:value-type="float" office:value="0.28" calcext:value-type="float">
            <text:p>0.280</text:p>
          </table:table-cell>
          <table:table-cell/>
          <table:table-cell table:style-name="Default" table:number-columns-repeated="16366"/>
        </table:table-row>
        <table:table-row table:style-name="ro9">
          <table:table-cell office:value-type="float" office:value="91" calcext:value-type="float">
            <text:p>91</text:p>
          </table:table-cell>
          <table:table-cell office:value-type="string" calcext:value-type="string">
            <text:p>72df4f62-9c45-4b63-a0c5-0ccadc0efba8</text:p>
          </table:table-cell>
          <table:table-cell office:value-type="string" calcext:value-type="string">
            <text:p>adhesive tape</text:p>
          </table:table-cell>
          <table:table-cell office:value-type="string" calcext:value-type="string">
            <text:p>adhesive tape,fans,supporters,victory</text:p>
          </table:table-cell>
          <table:table-cell office:value-type="string" calcext:value-type="string">
            <text:p><text:s/>Klebestreifen. Leider haben die FC SG Fans zu fest gefreut über den Sieg.</text:p>
          </table:table-cell>
          <table:table-cell office:value-type="string" calcext:value-type="string">
            <text:p>Klebeschreifen</text:p>
          </table:table-cell>
          <table:table-cell table:style-name="ce79" office:value-type="string" calcext:value-type="string">
            <text:p>Leider haben die FC SG fähns zu fest gefreut über den Sieg</text:p>
          </table:table-cell>
          <table:table-cell table:style-name="ce79" office:value-type="string" calcext:value-type="string">
            <text:p>null</text:p>
          </table:table-cell>
          <table:table-cell table:style-name="ce88" table:formula="of:=[.F92]&amp;&quot; &quot;&amp;[.G92]" office:value-type="string" office:string-value="Klebeschreifen Leider haben die FC SG fähns zu fest gefreut über den Sieg" calcext:value-type="string">
            <text:p>Klebeschreifen Leider haben die FC SG fähns zu fest gefreut über den Sieg</text:p>
          </table:table-cell>
          <table:table-cell table:number-columns-repeated="4"/>
          <table:table-cell office:value-type="string" calcext:value-type="string">
            <text:p>x</text:p>
          </table:table-cell>
          <table:table-cell office:value-type="float" office:value="106" calcext:value-type="float">
            <text:p>106</text:p>
          </table:table-cell>
          <table:table-cell office:value-type="string" calcext:value-type="string">
            <text:p>Graffiti / Tags</text:p>
          </table:table-cell>
          <table:table-cell table:style-name="ce99" office:value-type="float" office:value="0.230769230769231" calcext:value-type="float">
            <text:p>0.231</text:p>
          </table:table-cell>
          <table:table-cell/>
          <table:table-cell table:style-name="Default" table:number-columns-repeated="16366"/>
        </table:table-row>
        <table:table-row table:style-name="ro13">
          <table:table-cell office:value-type="float" office:value="92" calcext:value-type="float">
            <text:p>92</text:p>
          </table:table-cell>
          <table:table-cell office:value-type="string" calcext:value-type="string">
            <text:p>acfaa260-4dc9-4b2d-befe-019d1731fcf5</text:p>
          </table:table-cell>
          <table:table-cell office:value-type="string" calcext:value-type="string">
            <text:p>FCS</text:p>
          </table:table-cell>
          <table:table-cell office:value-type="string" calcext:value-type="string">
            <text:p>FCS,Pfadihaus,cleaning costs,association fund,city,buildings</text:p>
          </table:table-cell>
          <table:table-cell office:value-type="string" calcext:value-type="string">
            <text:p><text:s/>FCS-Geschmierereien am Pfadihaus. Wie wäre es, wenn zünftig die Reinigungskosten direkt aus der Vereinskasse abgezogen werden, statt von Hausbesitzern oder Pfadi-Vereinen? Die ganze Stadt ist dank der FCS-Vandalen verschmutzt, Privatgebäude inklusive einfach traurig, wie konsequenzlos und unsinnig hier Lokalpatriotismus ausgelebt wird auf Kosten anderer.</text:p>
          </table:table-cell>
          <table:table-cell office:value-type="string" calcext:value-type="string">
            <text:p>FCSG Schmierereien am Pfadihaus</text:p>
          </table:table-cell>
          <table:table-cell table:style-name="ce79" office:value-type="string" calcext:value-type="string">
            <text:p>Wie wäre es, wenn zukünftig die Reinigungskosten direkt aus der Vereinskasse abgezogen werden statt von Hausbesitzern oder Pfadivereinen? Die ganze Stadt ist dank der FCSG Vandalen verschmutzt, Privatgebäude inklusive, einfach traurig wie konsequenzlos und unsinnig hier Lokalpatriotismus ausgelebt wird auf Kosten anderer.</text:p>
          </table:table-cell>
          <table:table-cell table:style-name="ce79" office:value-type="string" calcext:value-type="string">
            <text:p>null</text:p>
          </table:table-cell>
          <table:table-cell table:style-name="ce88" table:formula="of:=[.F93]&amp;&quot; &quot;&amp;[.G93]" office:value-type="string" office:string-value="FCSG Schmierereien am Pfadihaus Wie wäre es, wenn zukünftig die Reinigungskosten direkt aus der Vereinskasse abgezogen werden statt von Hausbesitzern oder Pfadivereinen? Die ganze Stadt ist dank der FCSG Vandalen verschmutzt, Privatgebäude inklusive, einfach traurig wie konsequenzlos und unsinnig hier Lokalpatriotismus ausgelebt wird auf Kosten anderer." calcext:value-type="string">
            <text:p>FCSG Schmierereien am Pfadihaus Wie wäre es, wenn zukünftig die Reinigungskosten direkt aus der Vereinskasse abgezogen werden statt von Hausbesitzern oder Pfadivereinen? Die ganze Stadt ist dank der FCSG Vandalen verschmutzt, Privatgebäude inklusive, einfach traurig wie konsequenzlos und unsinnig hier Lokalpatriotismus ausgelebt wird auf Kosten anderer.</text:p>
          </table:table-cell>
          <table:table-cell table:number-columns-repeated="2"/>
          <table:table-cell office:value-type="string" calcext:value-type="string">
            <text:p>x</text:p>
          </table:table-cell>
          <table:table-cell table:number-columns-repeated="2"/>
          <table:table-cell office:value-type="float" office:value="143" calcext:value-type="float">
            <text:p>143</text:p>
          </table:table-cell>
          <table:table-cell office:value-type="string" calcext:value-type="string">
            <text:p>Graffiti / Tags</text:p>
          </table:table-cell>
          <table:table-cell table:style-name="ce99" office:value-type="float" office:value="0.217391304347826" calcext:value-type="float">
            <text:p>0.217</text:p>
          </table:table-cell>
          <table:table-cell/>
          <table:table-cell table:style-name="Default" table:number-columns-repeated="16366"/>
        </table:table-row>
        <table:table-row table:style-name="ro9">
          <table:table-cell office:value-type="float" office:value="93" calcext:value-type="float">
            <text:p>93</text:p>
          </table:table-cell>
          <table:table-cell office:value-type="string" calcext:value-type="string">
            <text:p>85f2a42c-6ffb-4cd7-a3cc-26936cb6838d</text:p>
          </table:table-cell>
          <table:table-cell office:value-type="string" calcext:value-type="string">
            <text:p>city</text:p>
          </table:table-cell>
          <table:table-cell office:value-type="string" calcext:value-type="string">
            <text:p>city,tourists</text:p>
          </table:table-cell>
          <table:table-cell office:value-type="string" calcext:value-type="string">
            <text:p><text:s/>Verklebt einer Stadt unwürdig, was denken die Touristen?</text:p>
          </table:table-cell>
          <table:table-cell office:value-type="string" calcext:value-type="string">
            <text:p>Verklebt</text:p>
          </table:table-cell>
          <table:table-cell table:style-name="ce79" office:value-type="string" calcext:value-type="string">
            <text:p>Einer Stadt unwürdig. Was denken die Touristen?</text:p>
          </table:table-cell>
          <table:table-cell table:style-name="ce79" office:value-type="string" calcext:value-type="string">
            <text:p>null</text:p>
          </table:table-cell>
          <table:table-cell table:style-name="ce88" table:formula="of:=[.F94]&amp;&quot; &quot;&amp;[.G94]" office:value-type="string" office:string-value="Verklebt Einer Stadt unwürdig. Was denken die Touristen?" calcext:value-type="string">
            <text:p>Verklebt Einer Stadt unwürdig. Was denken die Touristen?</text:p>
          </table:table-cell>
          <table:table-cell table:number-columns-repeated="2"/>
          <table:table-cell office:value-type="string" calcext:value-type="string">
            <text:p>x</text:p>
          </table:table-cell>
          <table:table-cell table:number-columns-repeated="2"/>
          <table:table-cell office:value-type="float" office:value="232" calcext:value-type="float">
            <text:p>232</text:p>
          </table:table-cell>
          <table:table-cell office:value-type="string" calcext:value-type="string">
            <text:p>Graffiti / Tags</text:p>
          </table:table-cell>
          <table:table-cell table:style-name="ce99" office:value-type="float" office:value="0.375" calcext:value-type="float">
            <text:p>0.375</text:p>
          </table:table-cell>
          <table:table-cell/>
          <table:table-cell table:style-name="Default" table:number-columns-repeated="16366"/>
        </table:table-row>
        <table:table-row table:style-name="ro19">
          <table:table-cell office:value-type="float" office:value="94" calcext:value-type="float">
            <text:p>94</text:p>
          </table:table-cell>
          <table:table-cell office:value-type="string" calcext:value-type="string">
            <text:p>ab7e20ae-7252-4bb3-b3b4-a78ee0eaf1f5</text:p>
          </table:table-cell>
          <table:table-cell office:value-type="string" calcext:value-type="string">
            <text:p>hook</text:p>
          </table:table-cell>
          <table:table-cell office:value-type="string" calcext:value-type="string">
            <text:p>hook,KR-point,symbols,timetable,bus stop</text:p>
          </table:table-cell>
          <table:table-cell office:value-type="string" calcext:value-type="string">
            <text:p><text:s/>Haken, KR-Punkt und andere Symbole. Abfahrplan in Bushaltestelle Singenberg hat leider einige Symbole, welche nicht Teil vom Abfahrplan sind.</text:p>
          </table:table-cell>
          <table:table-cell office:value-type="string" calcext:value-type="string">
            <text:p>Hakenkr. und andere Symbolen</text:p>
          </table:table-cell>
          <table:table-cell table:style-name="ce79" office:value-type="string" calcext:value-type="string">
            <text:p>Abfahrplan, in Bushaltestelle Singenberg, hat leider einige symbolen, welche nicht teil vom Abfahrplan sind.</text:p>
          </table:table-cell>
          <table:table-cell table:style-name="ce79" office:value-type="string" calcext:value-type="string">
            <text:p>null</text:p>
          </table:table-cell>
          <table:table-cell table:style-name="ce88" table:formula="of:=[.F95]&amp;&quot; &quot;&amp;[.G95]" office:value-type="string" office:string-value="Hakenkr. und andere Symbolen Abfahrplan, in Bushaltestelle Singenberg, hat leider einige symbolen, welche nicht teil vom Abfahrplan sind." calcext:value-type="string">
            <text:p>Hakenkr. und andere Symbolen Abfahrplan, in Bushaltestelle Singenberg, hat leider einige symbolen, welche nicht teil vom Abfahrplan sind.</text:p>
          </table:table-cell>
          <table:table-cell table:number-columns-repeated="2"/>
          <table:table-cell office:value-type="string" calcext:value-type="string">
            <text:p>x</text:p>
          </table:table-cell>
          <table:table-cell table:number-columns-repeated="2"/>
          <table:table-cell office:value-type="float" office:value="121" calcext:value-type="float">
            <text:p>121</text:p>
          </table:table-cell>
          <table:table-cell office:value-type="string" calcext:value-type="string">
            <text:p>Graffiti / Tags</text:p>
          </table:table-cell>
          <table:table-cell table:style-name="ce99" office:value-type="float" office:value="0.388888888888889" calcext:value-type="float">
            <text:p>0.389</text:p>
          </table:table-cell>
          <table:table-cell/>
          <table:table-cell table:style-name="Default" table:number-columns-repeated="16366"/>
        </table:table-row>
        <table:table-row table:style-name="ro5">
          <table:table-cell office:value-type="float" office:value="95" calcext:value-type="float">
            <text:p>95</text:p>
          </table:table-cell>
          <table:table-cell office:value-type="string" calcext:value-type="string">
            <text:p>0c142574-4014-488f-9eb9-7fc052c03be0</text:p>
          </table:table-cell>
          <table:table-cell office:value-type="string" calcext:value-type="string">
            <text:p>graffiti</text:p>
          </table:table-cell>
          <table:table-cell office:value-type="string" calcext:value-type="string">
            <text:p>graffiti,spray paint,wall,concrete,cityworks</text:p>
          </table:table-cell>
          <table:table-cell office:value-type="string" calcext:value-type="string">
            <text:p><text:s/>Links extremes Graffiti-EW Betonwerk der Stadtwerke. Am 22.11.2024 wurde gemeldet, dass die Schmierereien bereits entfernt wurden. Leider stimmt das nicht. Das Graffiti wurde nicht entfernt. Aufnahme 25.11.2024.</text:p>
          </table:table-cell>
          <table:table-cell office:value-type="string" calcext:value-type="string">
            <text:p>linksextremes Graffiti EW Betonwerk der Stadtwerke</text:p>
          </table:table-cell>
          <table:table-cell table:style-name="ce79" office:value-type="string" calcext:value-type="string">
            <text:p>Am 22.11.24 wurde gemeldet, dass die Schmierereien bereits entfernt wurde. Leider stimmt das nicht. Das Graffiti wurde nicht entfernt. Aufnahme vom 25.11.24</text:p>
          </table:table-cell>
          <table:table-cell table:style-name="ce79" office:value-type="string" calcext:value-type="string">
            <text:p>a graffiti</text:p>
          </table:table-cell>
          <table:table-cell table:style-name="ce88" table:formula="of:=[.F96]&amp;&quot; &quot;&amp;[.G96]" office:value-type="string" office:string-value="linksextremes Graffiti EW Betonwerk der Stadtwerke Am 22.11.24 wurde gemeldet, dass die Schmierereien bereits entfernt wurde. Leider stimmt das nicht. Das Graffiti wurde nicht entfernt. Aufnahme vom 25.11.24" calcext:value-type="string">
            <text:p>linksextremes Graffiti EW Betonwerk der Stadtwerke Am 22.11.24 wurde gemeldet, dass die Schmierereien bereits entfernt wurde. Leider stimmt das nicht. Das Graffiti wurde nicht entfernt. Aufnahme vom 25.11.24</text:p>
          </table:table-cell>
          <table:table-cell table:number-columns-repeated="4"/>
          <table:table-cell office:value-type="string" calcext:value-type="string">
            <text:p>x</text:p>
          </table:table-cell>
          <table:table-cell office:value-type="float" office:value="84" calcext:value-type="float">
            <text:p>84</text:p>
          </table:table-cell>
          <table:table-cell office:value-type="string" calcext:value-type="string">
            <text:p>Graffiti / Tags</text:p>
          </table:table-cell>
          <table:table-cell table:style-name="ce99" office:value-type="float" office:value="0.285714285714286" calcext:value-type="float">
            <text:p>0.286</text:p>
          </table:table-cell>
          <table:table-cell/>
          <table:table-cell table:style-name="Default" table:number-columns-repeated="16366"/>
        </table:table-row>
        <table:table-row table:style-name="ro19">
          <table:table-cell table:style-name="ce71" office:value-type="float" office:value="96" calcext:value-type="float">
            <text:p>96</text:p>
          </table:table-cell>
          <table:table-cell table:style-name="ce78" office:value-type="string" calcext:value-type="string">
            <text:p>28aa611c-c5a2-46ba-a5e6-0dc208954ff0 </text:p>
          </table:table-cell>
          <table:table-cell table:style-name="ce71" office:value-type="string" calcext:value-type="string">
            <text:p>spray</text:p>
          </table:table-cell>
          <table:table-cell table:style-name="ce71" office:value-type="string" calcext:value-type="string">
            <text:p>spray,sprayings,wall surfaces,retaining wall,panoramic path</text:p>
          </table:table-cell>
          <table:table-cell table:style-name="ce80" office:value-type="string" calcext:value-type="string">
            <text:p><text:s/>Spray-Sprayereien auf Mauerflächen entlang Panoramaweg. Dutzende Meter der Stützmauer entlang des Panoramawegs sind von Sprayereien verunstaltet.</text:p>
          </table:table-cell>
          <table:table-cell table:style-name="ce71" office:value-type="string" calcext:value-type="string">
            <text:p>Sprayerei auf Mauerfläche ebtlang Panoranaweg</text:p>
          </table:table-cell>
          <table:table-cell table:style-name="ce80" office:value-type="string" calcext:value-type="string">
            <text:p>Dutzende Meter der Stützmauer – entlang des Panoramawegs – sind von Sprayereien verunstaltet.</text:p>
          </table:table-cell>
          <table:table-cell table:style-name="ce80" office:value-type="string" calcext:value-type="string">
            <text:p>a wall surfaces</text:p>
          </table:table-cell>
          <table:table-cell table:style-name="ce89" table:formula="of:=[.F97]&amp;&quot; &quot;&amp;[.G97]" office:value-type="string" office:string-value="Sprayerei auf Mauerfläche ebtlang Panoranaweg Dutzende Meter der Stützmauer – entlang des Panoramawegs – sind von Sprayereien verunstaltet." calcext:value-type="string">
            <text:p>Sprayerei auf Mauerfläche ebtlang Panoranaweg Dutzende Meter der Stützmauer – entlang des Panoramawegs – sind von Sprayereien verunstaltet.</text:p>
          </table:table-cell>
          <table:table-cell table:style-name="ce71" table:number-columns-repeated="4"/>
          <table:table-cell table:style-name="ce71" office:value-type="string" calcext:value-type="string">
            <text:p>x</text:p>
          </table:table-cell>
          <table:table-cell table:style-name="ce71" office:value-type="float" office:value="491" calcext:value-type="float">
            <text:p>491</text:p>
          </table:table-cell>
          <table:table-cell office:value-type="string" calcext:value-type="string">
            <text:p>Graffiti / Tags</text:p>
          </table:table-cell>
          <table:table-cell table:style-name="ce30" office:value-type="float" office:value="0.333333333333333" calcext:value-type="float">
            <text:p>0.333</text:p>
          </table:table-cell>
          <table:table-cell/>
          <table:table-cell table:style-name="ce71" table:number-columns-repeated="16366"/>
        </table:table-row>
        <table:table-row table:style-name="ro10">
          <table:table-cell office:value-type="float" office:value="97" calcext:value-type="float">
            <text:p>97</text:p>
          </table:table-cell>
          <table:table-cell office:value-type="string" calcext:value-type="string">
            <text:p>f0231cd0-5875-4130-b266-fc99057d32c1</text:p>
          </table:table-cell>
          <table:table-cell office:value-type="string" calcext:value-type="string">
            <text:p>platform</text:p>
          </table:table-cell>
          <table:table-cell office:value-type="string" calcext:value-type="string">
            <text:p>platform,retaining wall,platform,wall</text:p>
          </table:table-cell>
          <table:table-cell office:value-type="string" calcext:value-type="string">
            <text:p><text:s/>Haltestelle Flurhof Stützmauer verspreit maßlich am vergangenen Wochenende wurde an der Haltestelle Flurhof die Stützmauer verspreit.</text:p>
          </table:table-cell>
          <table:table-cell office:value-type="string" calcext:value-type="string">
            <text:p>Haltestelle Flurhof: Stützmauer versprayt</text:p>
          </table:table-cell>
          <table:table-cell table:style-name="ce79" office:value-type="string" calcext:value-type="string">
            <text:p>Mutmasslich am vergangenem Wochenende wurde an der Bushaltestelle Flurhof die Stützmauer versprayt.</text:p>
          </table:table-cell>
          <table:table-cell table:style-name="ce79" office:value-type="string" calcext:value-type="string">
            <text:p>a retaining wall</text:p>
          </table:table-cell>
          <table:table-cell table:style-name="ce88" table:formula="of:=[.F98]&amp;&quot; &quot;&amp;[.G98]" office:value-type="string" office:string-value="Haltestelle Flurhof: Stützmauer versprayt Mutmasslich am vergangenem Wochenende wurde an der Bushaltestelle Flurhof die Stützmauer versprayt." calcext:value-type="string">
            <text:p>Haltestelle Flurhof: Stützmauer versprayt Mutmasslich am vergangenem Wochenende wurde an der Bushaltestelle Flurhof die Stützmauer versprayt.</text:p>
          </table:table-cell>
          <table:table-cell table:number-columns-repeated="4"/>
          <table:table-cell office:value-type="string" calcext:value-type="string">
            <text:p>x</text:p>
          </table:table-cell>
          <table:table-cell office:value-type="float" office:value="351" calcext:value-type="float">
            <text:p>351</text:p>
          </table:table-cell>
          <table:table-cell office:value-type="string" calcext:value-type="string">
            <text:p>Graffiti / Tags</text:p>
          </table:table-cell>
          <table:table-cell table:style-name="ce99" office:value-type="float" office:value="0.375" calcext:value-type="float">
            <text:p>0.375</text:p>
          </table:table-cell>
          <table:table-cell/>
          <table:table-cell table:style-name="Default" table:number-columns-repeated="16366"/>
        </table:table-row>
        <table:table-row table:style-name="ro30">
          <table:table-cell office:value-type="float" office:value="98" calcext:value-type="float">
            <text:p>98</text:p>
          </table:table-cell>
          <table:table-cell office:value-type="string" calcext:value-type="string">
            <text:p>8c86f8ad-629a-419b-bc27-c4ddfa95a2d1</text:p>
          </table:table-cell>
          <table:table-cell office:value-type="string" calcext:value-type="string">
            <text:p>Rondele</text:p>
          </table:table-cell>
          <table:table-cell office:value-type="string" calcext:value-type="string">
            <text:p>Rondele,Kreuzung,Kolumban,Kolosseumstraße,Heimatstraße</text:p>
          </table:table-cell>
          <table:table-cell table:style-name="Default" office:value-type="string" calcext:value-type="string">
            <text:p><text:s/>Rondele, Kreuzung, Kolumban, Kolosseumstraße, Heimatstraße. Wert den Anfängen war längere Zeit ohne Schmiererei.</text:p>
          </table:table-cell>
          <table:table-cell office:value-type="string" calcext:value-type="string">
            <text:p>Rondelle, Kreuzung Kolumban-/Kolosseumstrasse//Heimatstrasse</text:p>
          </table:table-cell>
          <table:table-cell table:style-name="ce79" office:value-type="string" calcext:value-type="string">
            <text:p>Wehret den Anfängen. War längere Zeit ohne Schmiererei.</text:p>
          </table:table-cell>
          <table:table-cell table:style-name="ce79" office:value-type="string" calcext:value-type="string">
            <text:p>null</text:p>
          </table:table-cell>
          <table:table-cell table:style-name="ce88" table:formula="of:=[.F99]&amp;&quot; &quot;&amp;[.G99]" office:value-type="string" office:string-value="Rondelle, Kreuzung Kolumban-/Kolosseumstrasse//Heimatstrasse Wehret den Anfängen. War längere Zeit ohne Schmiererei." calcext:value-type="string">
            <text:p>Rondelle, Kreuzung Kolumban-/Kolosseumstrasse//Heimatstrasse Wehret den Anfängen. War längere Zeit ohne Schmiererei.</text:p>
          </table:table-cell>
          <table:table-cell table:number-columns-repeated="2"/>
          <table:table-cell office:value-type="string" calcext:value-type="string">
            <text:p>x</text:p>
          </table:table-cell>
          <table:table-cell table:number-columns-repeated="2"/>
          <table:table-cell office:value-type="float" office:value="68" calcext:value-type="float">
            <text:p>68</text:p>
          </table:table-cell>
          <table:table-cell office:value-type="string" calcext:value-type="string">
            <text:p>Graffiti / Tags</text:p>
          </table:table-cell>
          <table:table-cell table:style-name="ce99" office:value-type="float" office:value="0.727272727272727" calcext:value-type="float">
            <text:p>0.727</text:p>
          </table:table-cell>
          <table:table-cell/>
          <table:table-cell table:style-name="Default" table:number-columns-repeated="16366"/>
        </table:table-row>
        <table:table-row table:style-name="ro6">
          <table:table-cell office:value-type="float" office:value="99" calcext:value-type="float">
            <text:p>99</text:p>
          </table:table-cell>
          <table:table-cell office:value-type="string" calcext:value-type="string">
            <text:p>b56ad86d-dbbc-4c58-8980-20cd9310a863</text:p>
          </table:table-cell>
          <table:table-cell office:value-type="string" calcext:value-type="string">
            <text:p>graffiti</text:p>
          </table:table-cell>
          <table:table-cell office:value-type="string" calcext:value-type="string">
            <text:p>graffiti,sign,board,VBSG</text:p>
          </table:table-cell>
          <table:table-cell office:value-type="string" calcext:value-type="string">
            <text:p><text:s/>Schmierereien Anzeigetafel VBSG verschmiert</text:p>
          </table:table-cell>
          <table:table-cell office:value-type="string" calcext:value-type="string">
            <text:p>Schmierereien</text:p>
          </table:table-cell>
          <table:table-cell table:style-name="ce79" office:value-type="string" calcext:value-type="string">
            <text:p>Anzeigetafel VBSG verschmiert</text:p>
          </table:table-cell>
          <table:table-cell table:style-name="ce79" office:value-type="string" calcext:value-type="string">
            <text:p>a graffiti</text:p>
          </table:table-cell>
          <table:table-cell table:style-name="ce88" table:formula="of:=[.F100]&amp;&quot; &quot;&amp;[.G100]" office:value-type="string" office:string-value="Schmierereien Anzeigetafel VBSG verschmiert" calcext:value-type="string">
            <text:p>Schmierereien Anzeigetafel VBSG verschmiert</text:p>
          </table:table-cell>
          <table:table-cell office:value-type="string" calcext:value-type="string">
            <text:p>x</text:p>
          </table:table-cell>
          <table:table-cell table:number-columns-repeated="4"/>
          <table:table-cell office:value-type="float" office:value="183" calcext:value-type="float">
            <text:p>183</text:p>
          </table:table-cell>
          <table:table-cell office:value-type="string" calcext:value-type="string">
            <text:p>Graffiti / Tags</text:p>
          </table:table-cell>
          <table:table-cell table:style-name="ce99" office:value-type="float" office:value="0" calcext:value-type="float">
            <text:p>0.000</text:p>
          </table:table-cell>
          <table:table-cell/>
          <table:table-cell table:style-name="Default" table:number-columns-repeated="16366"/>
        </table:table-row>
        <table:table-row table:style-name="ro9">
          <table:table-cell office:value-type="float" office:value="100" calcext:value-type="float">
            <text:p>100</text:p>
          </table:table-cell>
          <table:table-cell office:value-type="string" calcext:value-type="string">
            <text:p>b4671399-74b4-42c8-b721-fd5958e533ac</text:p>
          </table:table-cell>
          <table:table-cell office:value-type="string" calcext:value-type="string">
            <text:p>graffiti</text:p>
          </table:table-cell>
          <table:table-cell office:value-type="string" calcext:value-type="string">
            <text:p>graffiti,markings,street sign,sign</text:p>
          </table:table-cell>
          <table:table-cell office:value-type="string" calcext:value-type="string">
            <text:p><text:s/>Schmierereien auf dem Strassenschild.</text:p>
          </table:table-cell>
          <table:table-cell office:value-type="string" calcext:value-type="string">
            <text:p>Schmiererei auf dem Strassenschild</text:p>
          </table:table-cell>
          <table:table-cell table:style-name="ce79" office:value-type="string" calcext:value-type="string">
            <text:p>Schmiererei auf dem Strassenschild</text:p>
          </table:table-cell>
          <table:table-cell table:style-name="ce79" office:value-type="string" calcext:value-type="string">
            <text:p>a graffiti</text:p>
          </table:table-cell>
          <table:table-cell table:style-name="ce88" table:formula="of:=[.F101]&amp;&quot; &quot;&amp;[.G101]" office:value-type="string" office:string-value="Schmiererei auf dem Strassenschild Schmiererei auf dem Strassenschild" calcext:value-type="string">
            <text:p>Schmiererei auf dem Strassenschild Schmiererei auf dem Strassenschild</text:p>
          </table:table-cell>
          <table:table-cell office:value-type="string" calcext:value-type="string">
            <text:p>x</text:p>
          </table:table-cell>
          <table:table-cell table:number-columns-repeated="4"/>
          <table:table-cell office:value-type="float" office:value="176" calcext:value-type="float">
            <text:p>176</text:p>
          </table:table-cell>
          <table:table-cell office:value-type="string" calcext:value-type="string">
            <text:p>Graffiti / Tags</text:p>
          </table:table-cell>
          <table:table-cell table:style-name="ce99" office:value-type="float" office:value="0.75" calcext:value-type="float">
            <text:p>0.750</text:p>
          </table:table-cell>
          <table:table-cell/>
          <table:table-cell table:style-name="Default" table:number-columns-repeated="16366"/>
        </table:table-row>
        <table:table-row table:style-name="ro14">
          <table:table-cell table:style-name="ce72" office:value-type="float" office:value="101" calcext:value-type="float">
            <text:p>101</text:p>
          </table:table-cell>
          <table:table-cell table:style-name="ce72" office:value-type="string" calcext:value-type="string">
            <text:p>558e87aa-79c7-489f-a272-32babe43df90</text:p>
          </table:table-cell>
          <table:table-cell table:style-name="ce72" office:value-type="string" calcext:value-type="string">
            <text:p>pedestrian safety</text:p>
          </table:table-cell>
          <table:table-cell table:style-name="ce72" office:value-type="string" calcext:value-type="string">
            <text:p>pedestrian safety,sidewalk,pedestrian strip,sidewalk,street</text:p>
          </table:table-cell>
          <table:table-cell table:style-name="ce81" office:value-type="string" calcext:value-type="string">
            <text:p><text:s/>Fussgänger Sicherheit. Guten Tag, warum hat es zur Walenbüchelstraße keinen Fussgängerstreifen oder ein durchgehendes Trottoir auf beiden Seiten? Freundliche Grüße.</text:p>
          </table:table-cell>
          <table:table-cell table:style-name="ce72" office:value-type="string" calcext:value-type="string">
            <text:p>Füssfanger sicherheit</text:p>
          </table:table-cell>
          <table:table-cell table:style-name="ce81" office:value-type="string" calcext:value-type="string">
            <text:p>Guten Tag Warum hat es zur walenbüchelstrasse keinen Fussgänger Streifen oder ein durchgehendes Trottoir auf beiden Seiten? Freundliche Grüsse</text:p>
          </table:table-cell>
          <table:table-cell table:style-name="ce81" office:value-type="string" calcext:value-type="string">
            <text:p>a street</text:p>
          </table:table-cell>
          <table:table-cell table:style-name="ce90" table:formula="of:=[.F102]&amp;&quot; &quot;&amp;[.G102]" office:value-type="string" office:string-value="Füssfanger sicherheit Guten Tag Warum hat es zur walenbüchelstrasse keinen Fussgänger Streifen oder ein durchgehendes Trottoir auf beiden Seiten? Freundliche Grüsse" calcext:value-type="string">
            <text:p>Füssfanger sicherheit Guten Tag Warum hat es zur walenbüchelstrasse keinen Fussgänger Streifen oder ein durchgehendes Trottoir auf beiden Seiten? Freundliche Grüsse</text:p>
          </table:table-cell>
          <table:table-cell table:style-name="ce72" office:value-type="string" calcext:value-type="string">
            <text:p>x</text:p>
          </table:table-cell>
          <table:table-cell table:style-name="ce72" table:number-columns-repeated="4"/>
          <table:table-cell table:style-name="ce72" office:value-type="float" office:value="248" calcext:value-type="float">
            <text:p>248</text:p>
          </table:table-cell>
          <table:table-cell office:value-type="string" calcext:value-type="string">
            <text:p>Signalisation</text:p>
          </table:table-cell>
          <table:table-cell table:style-name="ce32" office:value-type="float" office:value="0.380952380952381" calcext:value-type="float">
            <text:p>0.381</text:p>
          </table:table-cell>
          <table:table-cell/>
          <table:table-cell table:style-name="ce72" table:number-columns-repeated="16366"/>
        </table:table-row>
        <table:table-row table:style-name="ro31">
          <table:table-cell office:value-type="float" office:value="102" calcext:value-type="float">
            <text:p>102</text:p>
          </table:table-cell>
          <table:table-cell office:value-type="string" calcext:value-type="string">
            <text:p>e4e5fc09-260a-4147-afac-91c22879b0c9</text:p>
          </table:table-cell>
          <table:table-cell office:value-type="string" calcext:value-type="string">
            <text:p>orange distribution box</text:p>
          </table:table-cell>
          <table:table-cell office:value-type="string" calcext:value-type="string">
            <text:p>orange distribution box,electrical box,power box,box,sight obstruction</text:p>
          </table:table-cell>
          <table:table-cell office:value-type="string" calcext:value-type="string">
            <text:p><text:s/>Gefährliche Sichtbehinderung durch Orange-Verteilkasten. Der Stromkasten für die Baustelle der BAWQ-Unternehmen Stutz behindert die Sicht für alle, die aus dem Nruckwaldpark in die Bruckwaldstraße einfahren müssen. Das sind viele. Das muss verschriftswidrig sein. Man erkennt nicht, ob sich Fahrzeug aus Richtung Obwita nähert. Schon zwei oder dreimal wurde der Kasten aufgrund von Beanstandungen umplatziert. Jetzt wurde verschlimmbessert. Er gehört aus dem Sichtbereich entfernt. Bürgerfreundlich. Liebe Stadt St. Gallen. Danke und Gruß.</text:p>
          </table:table-cell>
          <table:table-cell office:value-type="string" calcext:value-type="string">
            <text:p>Gefährliche Sichtbehinderung durch orangen Vertteilkasten</text:p>
          </table:table-cell>
          <table:table-cell table:style-name="ce79" office:value-type="string" calcext:value-type="string">
            <text:p>Der Stromverteilkasten für die Baustelle der BAWO, Unternehmen Stutz, behindert die Sicht für alle,die aus dem Nruggwaldpaark in die Bruggwaldstrasse einfahren müssen, und das sind viele. Das muss vorschriftswidrig sein, man erkennt nicht, ob sich Fahrzeug aus Richtung obvita naht. Schon zwei oder dreimal wurde der Kasten aufgrund vonBeanstandungen umpöatziert. Jetzt wurde verschlimmbessert. Er gehört aus dem Sichtbereich entfernt. Bürgerfreundlich, liebe Stadt St. Gallen. Dank und Gruss </text:p>
          </table:table-cell>
          <table:table-cell table:style-name="ce79" office:value-type="string" calcext:value-type="string">
            <text:p>a orange distribution box</text:p>
          </table:table-cell>
          <table:table-cell table:style-name="ce88" table:formula="of:=[.F103]&amp;&quot; &quot;&amp;[.G103]" office:value-type="string" office:string-value="Gefährliche Sichtbehinderung durch orangen Vertteilkasten Der Stromverteilkasten für die Baustelle der BAWO, Unternehmen Stutz, behindert die Sicht für alle,die aus dem Nruggwaldpaark in die Bruggwaldstrasse einfahren müssen, und das sind viele. Das muss vorschriftswidrig sein, man erkennt nicht, ob sich Fahrzeug aus Richtung obvita naht. Schon zwei oder dreimal wurde der Kasten aufgrund vonBeanstandungen umpöatziert. Jetzt wurde verschlimmbessert. Er gehört aus dem Sichtbereich entfernt. Bürgerfreundlich, liebe Stadt St. Gallen. Dank und Gruss " calcext:value-type="string">
            <text:p>Gefährliche Sichtbehinderung durch orangen Vertteilkasten Der Stromverteilkasten für die Baustelle der BAWO, Unternehmen Stutz, behindert die Sicht für alle,die aus dem Nruggwaldpaark in die Bruggwaldstrasse einfahren müssen, und das sind viele. Das muss vorschriftswidrig sein, man erkennt nicht, ob sich Fahrzeug aus Richtung obvita naht. Schon zwei oder dreimal wurde der Kasten aufgrund vonBeanstandungen umpöatziert. Jetzt wurde verschlimmbessert. Er gehört aus dem Sichtbereich entfernt. Bürgerfreundlich, liebe Stadt St. Gallen. Dank und Gruss </text:p>
          </table:table-cell>
          <table:table-cell office:value-type="string" calcext:value-type="string">
            <text:p>x</text:p>
          </table:table-cell>
          <table:table-cell table:number-columns-repeated="4"/>
          <table:table-cell office:value-type="float" office:value="235" calcext:value-type="float">
            <text:p>235</text:p>
          </table:table-cell>
          <table:table-cell office:value-type="string" calcext:value-type="string">
            <text:p>Signalisation</text:p>
          </table:table-cell>
          <table:table-cell table:style-name="ce99" office:value-type="float" office:value="0.347222222222222" calcext:value-type="float">
            <text:p>0.347</text:p>
          </table:table-cell>
          <table:table-cell/>
          <table:table-cell table:style-name="Default" table:number-columns-repeated="16366"/>
        </table:table-row>
        <table:table-row table:style-name="ro9">
          <table:table-cell office:value-type="float" office:value="103" calcext:value-type="float">
            <text:p>103</text:p>
          </table:table-cell>
          <table:table-cell office:value-type="string" calcext:value-type="string">
            <text:p>d9fbfc07-7c2a-4564-871c-fdf5733146ff</text:p>
          </table:table-cell>
          <table:table-cell office:value-type="string" calcext:value-type="string">
            <text:p>warning sign</text:p>
          </table:table-cell>
          <table:table-cell office:value-type="string" calcext:value-type="string">
            <text:p>warning sign,sign,construction site,sign</text:p>
          </table:table-cell>
          <table:table-cell office:value-type="string" calcext:value-type="string">
            <text:p><text:s/>Warn-Tafel vergessen. Die Baustelle ist beendet. Schild noch da.</text:p>
          </table:table-cell>
          <table:table-cell office:value-type="string" calcext:value-type="string">
            <text:p>Warntafel vergessen</text:p>
          </table:table-cell>
          <table:table-cell table:style-name="ce79" office:value-type="string" calcext:value-type="string">
            <text:p>Die Baustelle ist beendet, Schild ist noch da.</text:p>
          </table:table-cell>
          <table:table-cell table:style-name="ce79" office:value-type="string" calcext:value-type="string">
            <text:p>a warning sign</text:p>
          </table:table-cell>
          <table:table-cell table:style-name="ce88" table:formula="of:=[.F104]&amp;&quot; &quot;&amp;[.G104]" office:value-type="string" office:string-value="Warntafel vergessen Die Baustelle ist beendet, Schild ist noch da." calcext:value-type="string">
            <text:p>Warntafel vergessen Die Baustelle ist beendet, Schild ist noch da.</text:p>
          </table:table-cell>
          <table:table-cell office:value-type="string" calcext:value-type="string">
            <text:p>x</text:p>
          </table:table-cell>
          <table:table-cell table:number-columns-repeated="4"/>
          <table:table-cell office:value-type="float" office:value="143" calcext:value-type="float">
            <text:p>143</text:p>
          </table:table-cell>
          <table:table-cell office:value-type="string" calcext:value-type="string">
            <text:p>Signalisation</text:p>
          </table:table-cell>
          <table:table-cell table:style-name="ce99" office:value-type="float" office:value="0.4" calcext:value-type="float">
            <text:p>0.400</text:p>
          </table:table-cell>
          <table:table-cell/>
          <table:table-cell table:style-name="Default" table:number-columns-repeated="16366"/>
        </table:table-row>
        <table:table-row table:style-name="ro19">
          <table:table-cell office:value-type="float" office:value="104" calcext:value-type="float">
            <text:p>104</text:p>
          </table:table-cell>
          <table:table-cell office:value-type="string" calcext:value-type="string">
            <text:p>ea4a4c4b-0858-4501-8b9f-dc62313c88fe</text:p>
          </table:table-cell>
          <table:table-cell office:value-type="string" calcext:value-type="string">
            <text:p>signage board</text:p>
          </table:table-cell>
          <table:table-cell office:value-type="string" calcext:value-type="string">
            <text:p>signage board,sign,panel,traffic sign</text:p>
          </table:table-cell>
          <table:table-cell office:value-type="string" calcext:value-type="string">
            <text:p><text:s/>Signalisationstafel um 90° drehen. Aufgrund der Baustelle wurde die Tafel zur Seite geschwenkt und nach Beendigung nicht wieder korrekt gedreht.</text:p>
          </table:table-cell>
          <table:table-cell office:value-type="string" calcext:value-type="string">
            <text:p>Signalisationstafel um 90 Grad drehen.</text:p>
          </table:table-cell>
          <table:table-cell table:style-name="ce79" office:value-type="string" calcext:value-type="string">
            <text:p>Aufgrund der Baustelle wurde die Tafel zur Seite geschwenkt und nach dem Beendigen nicht wieder korrekt gedreht.</text:p>
          </table:table-cell>
          <table:table-cell table:style-name="ce79" office:value-type="string" calcext:value-type="string">
            <text:p>a signage board</text:p>
          </table:table-cell>
          <table:table-cell table:style-name="ce88" table:formula="of:=[.F105]&amp;&quot; &quot;&amp;[.G105]" office:value-type="string" office:string-value="Signalisationstafel um 90 Grad drehen. Aufgrund der Baustelle wurde die Tafel zur Seite geschwenkt und nach dem Beendigen nicht wieder korrekt gedreht." calcext:value-type="string">
            <text:p>Signalisationstafel um 90 Grad drehen. Aufgrund der Baustelle wurde die Tafel zur Seite geschwenkt und nach dem Beendigen nicht wieder korrekt gedreht.</text:p>
          </table:table-cell>
          <table:table-cell office:value-type="string" calcext:value-type="string">
            <text:p>x</text:p>
          </table:table-cell>
          <table:table-cell table:number-columns-repeated="4"/>
          <table:table-cell office:value-type="float" office:value="214" calcext:value-type="float">
            <text:p>214</text:p>
          </table:table-cell>
          <table:table-cell office:value-type="string" calcext:value-type="string">
            <text:p>Signalisation</text:p>
          </table:table-cell>
          <table:table-cell table:style-name="ce99" office:value-type="float" office:value="0.181818181818182" calcext:value-type="float">
            <text:p>0.182</text:p>
          </table:table-cell>
          <table:table-cell/>
          <table:table-cell table:style-name="Default" table:number-columns-repeated="16366"/>
        </table:table-row>
        <table:table-row table:style-name="ro19">
          <table:table-cell office:value-type="float" office:value="105" calcext:value-type="float">
            <text:p>105</text:p>
          </table:table-cell>
          <table:table-cell office:value-type="string" calcext:value-type="string">
            <text:p>bc42b84f-5f88-4302-bd72-fd71e0e92162</text:p>
          </table:table-cell>
          <table:table-cell office:value-type="string" calcext:value-type="string">
            <text:p>parking prohibition sign</text:p>
          </table:table-cell>
          <table:table-cell office:value-type="string" calcext:value-type="string">
            <text:p>parking prohibition sign,sign,board,signpost</text:p>
          </table:table-cell>
          <table:table-cell office:value-type="string" calcext:value-type="string">
            <text:p><text:s/>Parkverbotstafel, guten Tag, diese Tafel steht seit geraumer Zeit und dürfte keine Gültigkeit mehr haben. Danke fürs Entfernen, beste Grüße.</text:p>
          </table:table-cell>
          <table:table-cell office:value-type="string" calcext:value-type="string">
            <text:p>Parkverbotstafel</text:p>
          </table:table-cell>
          <table:table-cell table:style-name="ce79" office:value-type="string" calcext:value-type="string">
            <text:p>Guten Tag Diese Tafel steht seit geraumer Zeit und dürfte keine Gültigkeit mehr haben. Danke fürs entfernen. Beste Grüsse</text:p>
          </table:table-cell>
          <table:table-cell table:style-name="ce79" office:value-type="string" calcext:value-type="string">
            <text:p>a parking prohibition sign</text:p>
          </table:table-cell>
          <table:table-cell table:style-name="ce88" table:formula="of:=[.F106]&amp;&quot; &quot;&amp;[.G106]" office:value-type="string" office:string-value="Parkverbotstafel Guten Tag Diese Tafel steht seit geraumer Zeit und dürfte keine Gültigkeit mehr haben. Danke fürs entfernen. Beste Grüsse" calcext:value-type="string">
            <text:p>Parkverbotstafel Guten Tag Diese Tafel steht seit geraumer Zeit und dürfte keine Gültigkeit mehr haben. Danke fürs entfernen. Beste Grüsse</text:p>
          </table:table-cell>
          <table:table-cell office:value-type="string" calcext:value-type="string">
            <text:p>x</text:p>
          </table:table-cell>
          <table:table-cell table:number-columns-repeated="4"/>
          <table:table-cell office:value-type="float" office:value="217" calcext:value-type="float">
            <text:p>217</text:p>
          </table:table-cell>
          <table:table-cell office:value-type="string" calcext:value-type="string">
            <text:p>Signalisation</text:p>
          </table:table-cell>
          <table:table-cell table:style-name="ce99" office:value-type="float" office:value="0.35" calcext:value-type="float">
            <text:p>0.350</text:p>
          </table:table-cell>
          <table:table-cell/>
          <table:table-cell table:style-name="Default" table:number-columns-repeated="16366"/>
        </table:table-row>
        <table:table-row table:style-name="ro10">
          <table:table-cell office:value-type="float" office:value="106" calcext:value-type="float">
            <text:p>106</text:p>
          </table:table-cell>
          <table:table-cell office:value-type="string" calcext:value-type="string">
            <text:p>b432ae06-1463-42c7-8f5a-c454f932b2fd</text:p>
          </table:table-cell>
          <table:table-cell office:value-type="string" calcext:value-type="string">
            <text:p>signage boards</text:p>
          </table:table-cell>
          <table:table-cell office:value-type="string" calcext:value-type="string">
            <text:p>signage boards,signalization,signs,boards,grass</text:p>
          </table:table-cell>
          <table:table-cell office:value-type="string" calcext:value-type="string">
            <text:p><text:s/>Signaltafeln. Bitte die Signalisation wieder ordnungsgemäss herstellen. Seit Monaten liegen sie in der angrenzenden Wiese.</text:p>
          </table:table-cell>
          <table:table-cell office:value-type="string" calcext:value-type="string">
            <text:p>Signaltafeln</text:p>
          </table:table-cell>
          <table:table-cell table:style-name="ce79" office:value-type="string" calcext:value-type="string">
            <text:p>Bitte die Signalisation wieder ordnungsgemäss herstellen. Seit Monaten liegen Sie in der angrenzenden Wiese.</text:p>
          </table:table-cell>
          <table:table-cell table:style-name="ce79" office:value-type="string" calcext:value-type="string">
            <text:p>a signalization</text:p>
          </table:table-cell>
          <table:table-cell table:style-name="ce88" table:formula="of:=[.F107]&amp;&quot; &quot;&amp;[.G107]" office:value-type="string" office:string-value="Signaltafeln Bitte die Signalisation wieder ordnungsgemäss herstellen. Seit Monaten liegen Sie in der angrenzenden Wiese." calcext:value-type="string">
            <text:p>Signaltafeln Bitte die Signalisation wieder ordnungsgemäss herstellen. Seit Monaten liegen Sie in der angrenzenden Wiese.</text:p>
          </table:table-cell>
          <table:table-cell office:value-type="string" calcext:value-type="string">
            <text:p>x</text:p>
          </table:table-cell>
          <table:table-cell table:number-columns-repeated="4"/>
          <table:table-cell office:value-type="float" office:value="201" calcext:value-type="float">
            <text:p>201</text:p>
          </table:table-cell>
          <table:table-cell office:value-type="string" calcext:value-type="string">
            <text:p>Signalisation</text:p>
          </table:table-cell>
          <table:table-cell table:style-name="ce99" office:value-type="float" office:value="0.133333333333333" calcext:value-type="float">
            <text:p>0.133</text:p>
          </table:table-cell>
          <table:table-cell/>
          <table:table-cell table:style-name="Default" table:number-columns-repeated="16366"/>
        </table:table-row>
        <table:table-row table:style-name="ro32">
          <table:table-cell table:style-name="ce72" office:value-type="float" office:value="107" calcext:value-type="float">
            <text:p>107</text:p>
          </table:table-cell>
          <table:table-cell table:style-name="ce72" office:value-type="string" calcext:value-type="string">
            <text:p>898f47c5-01fb-44c4-9d81-b1cc02b241a7</text:p>
          </table:table-cell>
          <table:table-cell table:style-name="ce72" office:value-type="string" calcext:value-type="string">
            <text:p>sidewalk lane</text:p>
          </table:table-cell>
          <table:table-cell table:style-name="ce72" office:value-type="string" calcext:value-type="string">
            <text:p>sidewalk lane,moss,kindergartens,bus,bus stop,light signal,median</text:p>
          </table:table-cell>
          <table:table-cell table:style-name="ce81" office:value-type="string" calcext:value-type="string">
            <text:p><text:s/>Fußgängerstreifen sichern. Im Moos gibt es zwei Kindergärten. Viele Kinder müssen den Fußgängerstreifen über die Hakenstraße passieren. Die Situation ist gefährlich, insbesondere wenn Busse auf den Haltestellen unmittelbar vor und nach dem Streifen die Sicht versperren. Mit einem Lichtsignal könnte Klarheit geschaffen werden, allerdings könnte eine Mittelinsel schon etwas verbessern. Es sollte eine kindervorwinterliche Lösung geschaffen werden, bevor etwas passiert. Vielen Dank.</text:p>
          </table:table-cell>
          <table:table-cell table:style-name="ce72" office:value-type="string" calcext:value-type="string">
            <text:p>Fussgängerstreifen sichern</text:p>
          </table:table-cell>
          <table:table-cell table:style-name="ce81" office:value-type="string" calcext:value-type="string">
            <text:p>Im Moos gibt es zwei Kindergärten. Viele Kinder müssen den Fussgängerstreifen über die Haggenstrasse passieren. Die Situation ist gefährlich, insbesondere wenn Busse auf den Haltestellen unmittelbar vor oder nach dem Streifen die Sicht versperren. Mit einem Lichtsignal könnte Klarheit geschaffen werden. Allenfalls könnte eine Mittelinsel schon etwas verbessern. Es sollte eine kinderfreundliche Lösung geschaffen werden, BEVOR etwas passiert. Vielen Dank.</text:p>
          </table:table-cell>
          <table:table-cell table:style-name="ce81" office:value-type="string" calcext:value-type="string">
            <text:p>null</text:p>
          </table:table-cell>
          <table:table-cell table:style-name="ce90" table:formula="of:=[.F108]&amp;&quot; &quot;&amp;[.G108]" office:value-type="string" office:string-value="Fussgängerstreifen sichern Im Moos gibt es zwei Kindergärten. Viele Kinder müssen den Fussgängerstreifen über die Haggenstrasse passieren. Die Situation ist gefährlich, insbesondere wenn Busse auf den Haltestellen unmittelbar vor oder nach dem Streifen die Sicht versperren. Mit einem Lichtsignal könnte Klarheit geschaffen werden. Allenfalls könnte eine Mittelinsel schon etwas verbessern. Es sollte eine kinderfreundliche Lösung geschaffen werden, BEVOR etwas passiert. Vielen Dank." calcext:value-type="string">
            <text:p>Fussgängerstreifen sichern Im Moos gibt es zwei Kindergärten. Viele Kinder müssen den Fussgängerstreifen über die Haggenstrasse passieren. Die Situation ist gefährlich, insbesondere wenn Busse auf den Haltestellen unmittelbar vor oder nach dem Streifen die Sicht versperren. Mit einem Lichtsignal könnte Klarheit geschaffen werden. Allenfalls könnte eine Mittelinsel schon etwas verbessern. Es sollte eine kinderfreundliche Lösung geschaffen werden, BEVOR etwas passiert. Vielen Dank.</text:p>
          </table:table-cell>
          <table:table-cell table:style-name="ce72" table:number-columns-repeated="4"/>
          <table:table-cell table:style-name="ce72" office:value-type="string" calcext:value-type="string">
            <text:p>x</text:p>
          </table:table-cell>
          <table:table-cell table:style-name="ce72" office:value-type="float" office:value="120" calcext:value-type="float">
            <text:p>120</text:p>
          </table:table-cell>
          <table:table-cell office:value-type="string" calcext:value-type="string">
            <text:p>Signalisation</text:p>
          </table:table-cell>
          <table:table-cell table:style-name="ce32" office:value-type="float" office:value="0.145161290322581" calcext:value-type="float">
            <text:p>0.145</text:p>
          </table:table-cell>
          <table:table-cell/>
          <table:table-cell table:style-name="ce72" table:number-columns-repeated="16366"/>
        </table:table-row>
        <table:table-row table:style-name="ro10">
          <table:table-cell table:style-name="ce73" office:value-type="float" office:value="108" calcext:value-type="float">
            <text:p>108</text:p>
          </table:table-cell>
          <table:table-cell table:style-name="ce73" office:value-type="string" calcext:value-type="string">
            <text:p>ab024d8a-6b37-4cba-b2ab-39345e88dd3f</text:p>
          </table:table-cell>
          <table:table-cell table:style-name="ce73" office:value-type="string" calcext:value-type="string">
            <text:p>dirty sign</text:p>
          </table:table-cell>
          <table:table-cell table:style-name="ce73" office:value-type="string" calcext:value-type="string">
            <text:p>dirty sign,traffic sign,prohibition sign,sign,visibility</text:p>
          </table:table-cell>
          <table:table-cell table:style-name="ce82" office:value-type="string" calcext:value-type="string">
            <text:p><text:s/>Verschmutztes Schild. Das Fahrverbotsschild wird oft ignoriert, allenfalls aufgrund der schlechten Sichtbarkeit.</text:p>
          </table:table-cell>
          <table:table-cell table:style-name="ce73" office:value-type="string" calcext:value-type="string">
            <text:p>Verschmutztes Schild</text:p>
          </table:table-cell>
          <table:table-cell table:style-name="ce82" office:value-type="string" calcext:value-type="string">
            <text:p>Das Fahrverbotsschild wird oft ignoriert, allenfalls auch aufgrund der schlechten Sichtbarkeit.</text:p>
          </table:table-cell>
          <table:table-cell table:style-name="ce82" office:value-type="string" calcext:value-type="string">
            <text:p>a traffic sign</text:p>
          </table:table-cell>
          <table:table-cell table:style-name="ce91" table:formula="of:=[.F109]&amp;&quot; &quot;&amp;[.G109]" office:value-type="string" office:string-value="Verschmutztes Schild Das Fahrverbotsschild wird oft ignoriert, allenfalls auch aufgrund der schlechten Sichtbarkeit." calcext:value-type="string">
            <text:p>Verschmutztes Schild Das Fahrverbotsschild wird oft ignoriert, allenfalls auch aufgrund der schlechten Sichtbarkeit.</text:p>
          </table:table-cell>
          <table:table-cell table:style-name="ce73" office:value-type="string" calcext:value-type="string">
            <text:p>x</text:p>
          </table:table-cell>
          <table:table-cell table:style-name="ce73" table:number-columns-repeated="4"/>
          <table:table-cell table:style-name="ce73" office:value-type="float" office:value="204" calcext:value-type="float">
            <text:p>204</text:p>
          </table:table-cell>
          <table:table-cell office:value-type="string" calcext:value-type="string">
            <text:p>Signalisation</text:p>
          </table:table-cell>
          <table:table-cell table:style-name="ce34" office:value-type="float" office:value="0.153846153846154" calcext:value-type="float">
            <text:p>0.154</text:p>
          </table:table-cell>
          <table:table-cell/>
          <table:table-cell table:style-name="ce73" table:number-columns-repeated="16366"/>
        </table:table-row>
        <table:table-row table:style-name="ro9">
          <table:table-cell table:style-name="ce73" office:value-type="float" office:value="109" calcext:value-type="float">
            <text:p>109</text:p>
          </table:table-cell>
          <table:table-cell table:style-name="ce73" office:value-type="string" calcext:value-type="string">
            <text:p>69e6946b-7cb6-40a1-a046-2240369f5f49</text:p>
          </table:table-cell>
          <table:table-cell table:style-name="ce73" office:value-type="string" calcext:value-type="string">
            <text:p>sign</text:p>
          </table:table-cell>
          <table:table-cell table:style-name="ce73" office:value-type="string" calcext:value-type="string">
            <text:p>sign,new sign,sign</text:p>
          </table:table-cell>
          <table:table-cell table:style-name="ce82" office:value-type="string" calcext:value-type="string">
            <text:p><text:s/>Neues Schild. Besten Dank für die schnelle Erledigung mit dem neuen Schild.</text:p>
          </table:table-cell>
          <table:table-cell table:style-name="ce73" office:value-type="string" calcext:value-type="string">
            <text:p>Neues Schild</text:p>
          </table:table-cell>
          <table:table-cell table:style-name="ce82" office:value-type="string" calcext:value-type="string">
            <text:p>Besten Dank für die schnelle Erledigung mit dem neuen Schild. 😊</text:p>
          </table:table-cell>
          <table:table-cell table:style-name="ce82"/>
          <table:table-cell table:style-name="ce91" table:formula="of:=[.F110]&amp;&quot; &quot;&amp;[.G110]" office:value-type="string" office:string-value="Neues Schild Besten Dank für die schnelle Erledigung mit dem neuen Schild. 😊" calcext:value-type="string">
            <text:p>Neues Schild Besten Dank für die schnelle Erledigung mit dem neuen Schild. 😊</text:p>
          </table:table-cell>
          <table:table-cell table:style-name="ce73" office:value-type="string" calcext:value-type="string">
            <text:p>x</text:p>
          </table:table-cell>
          <table:table-cell table:style-name="ce73" table:number-columns-repeated="4"/>
          <table:table-cell table:style-name="ce73" office:value-type="float" office:value="213" calcext:value-type="float">
            <text:p>213</text:p>
          </table:table-cell>
          <table:table-cell office:value-type="string" calcext:value-type="string">
            <text:p>Signalisation</text:p>
          </table:table-cell>
          <table:table-cell table:style-name="ce34" office:value-type="float" office:value="0.153846153846154" calcext:value-type="float">
            <text:p>0.154</text:p>
          </table:table-cell>
          <table:table-cell/>
          <table:table-cell table:style-name="ce73" table:number-columns-repeated="16366"/>
        </table:table-row>
        <table:table-row table:style-name="ro19">
          <table:table-cell office:value-type="float" office:value="110" calcext:value-type="float">
            <text:p>110</text:p>
          </table:table-cell>
          <table:table-cell office:value-type="string" calcext:value-type="string">
            <text:p>83a5338b-0834-4428-8e5e-8baf1c861a35</text:p>
          </table:table-cell>
          <table:table-cell office:value-type="string" calcext:value-type="string">
            <text:p>traffic sign</text:p>
          </table:table-cell>
          <table:table-cell office:value-type="string" calcext:value-type="string">
            <text:p>traffic sign,sign,date</text:p>
          </table:table-cell>
          <table:table-cell office:value-type="string" calcext:value-type="string">
            <text:p><text:s/>Schuld vergessen. Könnte es sein, dass dieses Verkehrsschild vergessen wurde. Falls nicht, müsste wohl das Datum aktualisiert werden.</text:p>
          </table:table-cell>
          <table:table-cell office:value-type="string" calcext:value-type="string">
            <text:p>Schuld vergessen?</text:p>
          </table:table-cell>
          <table:table-cell table:style-name="ce79" office:value-type="string" calcext:value-type="string">
            <text:p>Könnte es sein, dass dieses Verkehrsschild vergessen wurde? Falls nicht, müsste wohl das Datum aktualisiert werden.</text:p>
          </table:table-cell>
          <table:table-cell table:style-name="ce79" office:value-type="string" calcext:value-type="string">
            <text:p>a traffic sign</text:p>
          </table:table-cell>
          <table:table-cell table:style-name="ce88" table:formula="of:=[.F111]&amp;&quot; &quot;&amp;[.G111]" office:value-type="string" office:string-value="Schuld vergessen? Könnte es sein, dass dieses Verkehrsschild vergessen wurde? Falls nicht, müsste wohl das Datum aktualisiert werden." calcext:value-type="string">
            <text:p>Schuld vergessen? Könnte es sein, dass dieses Verkehrsschild vergessen wurde? Falls nicht, müsste wohl das Datum aktualisiert werden.</text:p>
          </table:table-cell>
          <table:table-cell office:value-type="string" calcext:value-type="string">
            <text:p>x</text:p>
          </table:table-cell>
          <table:table-cell table:number-columns-repeated="4"/>
          <table:table-cell office:value-type="float" office:value="225" calcext:value-type="float">
            <text:p>225</text:p>
          </table:table-cell>
          <table:table-cell office:value-type="string" calcext:value-type="string">
            <text:p>Signalisation</text:p>
          </table:table-cell>
          <table:table-cell table:style-name="ce99" office:value-type="float" office:value="0.111111111111111" calcext:value-type="float">
            <text:p>0.111</text:p>
          </table:table-cell>
          <table:table-cell/>
          <table:table-cell table:style-name="Default" table:number-columns-repeated="16366"/>
        </table:table-row>
        <table:table-row table:style-name="ro8">
          <table:table-cell office:value-type="float" office:value="111" calcext:value-type="float">
            <text:p>111</text:p>
          </table:table-cell>
          <table:table-cell office:value-type="string" calcext:value-type="string">
            <text:p>61dda925-f231-4371-a70c-c8d73c973634</text:p>
          </table:table-cell>
          <table:table-cell office:value-type="string" calcext:value-type="string">
            <text:p>signage</text:p>
          </table:table-cell>
          <table:table-cell office:value-type="string" calcext:value-type="string">
            <text:p>signage,signalisation,bicycle path,sidewalk,green light,red marking</text:p>
          </table:table-cell>
          <table:table-cell office:value-type="string" calcext:value-type="string">
            <text:p><text:s/>Gefährliche Signalisation beim unteren Graben. Die neue Signalisation des Velowegs beim unteren Graben Richtung West führt zu gefährlichen Situationen. Die Fußgänger warten regelmäßig auf den Veloweg aufs grüne Licht bzw. könnte hier eine klare bzw. rote Markierung des Velowegs wie an anderen Orten auch würde hier Abhilfe schaffen.</text:p>
          </table:table-cell>
          <table:table-cell office:value-type="string" calcext:value-type="string">
            <text:p>Gefährliche Signalisation beim unteren Graben</text:p>
          </table:table-cell>
          <table:table-cell table:style-name="ce79" office:value-type="string" calcext:value-type="string">
            <text:p>Die neue Signalisation des Veloweges beim unteren Graben in Richtung West führt zu gefährlichen Situationen. Die Fussgänger warten regelmässig auf dem Veloweg aufs grüne Licht. Bspw. könnte hier eine klarere, bspw. rote Markierung des Veloweges (wie an anderen Orten auch) würde hier Abhilfe schaffen.</text:p>
          </table:table-cell>
          <table:table-cell table:style-name="ce79" office:value-type="string" calcext:value-type="string">
            <text:p>a sidewalk</text:p>
          </table:table-cell>
          <table:table-cell table:style-name="ce88" table:formula="of:=[.F112]&amp;&quot; &quot;&amp;[.G112]" office:value-type="string" office:string-value="Gefährliche Signalisation beim unteren Graben Die neue Signalisation des Veloweges beim unteren Graben in Richtung West führt zu gefährlichen Situationen. Die Fussgänger warten regelmässig auf dem Veloweg aufs grüne Licht. Bspw. könnte hier eine klarere, bspw. rote Markierung des Veloweges (wie an anderen Orten auch) würde hier Abhilfe schaffen." calcext:value-type="string">
            <text:p>Gefährliche Signalisation beim unteren Graben Die neue Signalisation des Veloweges beim unteren Graben in Richtung West führt zu gefährlichen Situationen. Die Fussgänger warten regelmässig auf dem Veloweg aufs grüne Licht. Bspw. könnte hier eine klarere, bspw. rote Markierung des Veloweges (wie an anderen Orten auch) würde hier Abhilfe schaffen.</text:p>
          </table:table-cell>
          <table:table-cell office:value-type="string" calcext:value-type="string">
            <text:p>x</text:p>
          </table:table-cell>
          <table:table-cell table:number-columns-repeated="4"/>
          <table:table-cell office:value-type="float" office:value="246" calcext:value-type="float">
            <text:p>246</text:p>
          </table:table-cell>
          <table:table-cell office:value-type="string" calcext:value-type="string">
            <text:p>Signalisation</text:p>
          </table:table-cell>
          <table:table-cell table:style-name="ce99" office:value-type="float" office:value="0.26530612244898" calcext:value-type="float">
            <text:p>0.265</text:p>
          </table:table-cell>
          <table:table-cell/>
          <table:table-cell table:style-name="Default" table:number-columns-repeated="16366"/>
        </table:table-row>
        <table:table-row table:style-name="ro10">
          <table:table-cell table:style-name="ce74" office:value-type="float" office:value="112" calcext:value-type="float">
            <text:p>112</text:p>
          </table:table-cell>
          <table:table-cell table:style-name="ce74" office:value-type="string" calcext:value-type="string">
            <text:p>8f0ced27-2089-4d52-96d1-7132004a4895</text:p>
          </table:table-cell>
          <table:table-cell table:style-name="ce74" office:value-type="string" calcext:value-type="string">
            <text:p>tax money waste</text:p>
          </table:table-cell>
          <table:table-cell table:style-name="ce74" office:value-type="string" calcext:value-type="string">
            <text:p>tax money waste,traffic sign,location,bicycle</text:p>
          </table:table-cell>
          <table:table-cell table:style-name="ce83" office:value-type="string" calcext:value-type="string">
            <text:p><text:s/>Steuergeldverschwendung. Was für einen Sinn macht diese Verkehrstafel an diesem unwegsamen Ort, wo man kaum mit dem Velo durchfahren kann?</text:p>
          </table:table-cell>
          <table:table-cell table:style-name="ce74" office:value-type="string" calcext:value-type="string">
            <text:p>Steuergeldverschleuderung</text:p>
          </table:table-cell>
          <table:table-cell table:style-name="ce83" office:value-type="string" calcext:value-type="string">
            <text:p>Was für einen Sinn macht diese Verkehrstafel an diesem unwegsamen Ort, wo man kaum mit dem Velo durchfahren kann…</text:p>
          </table:table-cell>
          <table:table-cell table:style-name="ce83" office:value-type="string" calcext:value-type="string">
            <text:p>a traffic sign</text:p>
          </table:table-cell>
          <table:table-cell table:style-name="ce92" table:formula="of:=[.F113]&amp;&quot; &quot;&amp;[.G113]" office:value-type="string" office:string-value="Steuergeldverschleuderung Was für einen Sinn macht diese Verkehrstafel an diesem unwegsamen Ort, wo man kaum mit dem Velo durchfahren kann…" calcext:value-type="string">
            <text:p>Steuergeldverschleuderung Was für einen Sinn macht diese Verkehrstafel an diesem unwegsamen Ort, wo man kaum mit dem Velo durchfahren kann…</text:p>
          </table:table-cell>
          <table:table-cell table:style-name="ce74" office:value-type="string" calcext:value-type="string">
            <text:p>x</text:p>
          </table:table-cell>
          <table:table-cell table:style-name="ce74" table:number-columns-repeated="4"/>
          <table:table-cell table:style-name="ce74" office:value-type="float" office:value="227" calcext:value-type="float">
            <text:p>227</text:p>
          </table:table-cell>
          <table:table-cell office:value-type="string" calcext:value-type="string">
            <text:p>Signalisation</text:p>
          </table:table-cell>
          <table:table-cell table:style-name="ce36" office:value-type="float" office:value="0.1" calcext:value-type="float">
            <text:p>0.100</text:p>
          </table:table-cell>
          <table:table-cell/>
          <table:table-cell table:style-name="ce74" table:number-columns-repeated="16366"/>
        </table:table-row>
        <table:table-row table:style-name="ro13">
          <table:table-cell table:style-name="ce75" office:value-type="float" office:value="113" calcext:value-type="float">
            <text:p>113</text:p>
          </table:table-cell>
          <table:table-cell table:style-name="ce75" office:value-type="string" calcext:value-type="string">
            <text:p>e9013eaf-b4c0-43bb-81c1-2b4556e77db8</text:p>
          </table:table-cell>
          <table:table-cell table:style-name="ce75" office:value-type="string" calcext:value-type="string">
            <text:p>pedestrian lane</text:p>
          </table:table-cell>
          <table:table-cell table:style-name="ce75" office:value-type="string" calcext:value-type="string">
            <text:p>pedestrian lane,crosswalk,road marking,bus stop,street</text:p>
          </table:table-cell>
          <table:table-cell table:style-name="ce84" office:value-type="string" calcext:value-type="string">
            <text:p><text:s/>Fußgängerstreifen weg. An der Kreuzung Hagenbuchstraße, Flurhofstraße wurde neue Bodenmarkierung gemacht und gleichzeitig der Fußgängerstreifen an der Flurhofstraße entfernt. Jetzt ist nicht da und die Autofahrer, jetzt ohne zu schauen, dort ist ja nur schon wegen der Bushaltestelle viele Leute, die dort die Strasse überqueren, kommt da nochmals ein Fußgängerstreifen hin.</text:p>
          </table:table-cell>
          <table:table-cell table:style-name="ce75" office:value-type="string" calcext:value-type="string">
            <text:p>Fussgängerstreifen weg</text:p>
          </table:table-cell>
          <table:table-cell table:style-name="ce84" office:value-type="string" calcext:value-type="string">
            <text:p>An der Kreuzung Hagenbuchstrasse/Flurhofstrasse wurde neue Bodenmarkierung gemscht und gleichzeitig der Fussgängerstreifen an der Flurhohsrrasse entfernt. Jetzt ist nicht da und die Auto fahren jetzt ohne zu schauen, dort ist ja nur schon wegen der Bushaltestelle viele Leute, die dort die Steasse überqueren. Kommt da nochmals ein Fussgängerstreifen hin?</text:p>
          </table:table-cell>
          <table:table-cell table:style-name="ce84" office:value-type="string" calcext:value-type="string">
            <text:p>a road marking</text:p>
          </table:table-cell>
          <table:table-cell table:style-name="ce93" table:formula="of:=[.F114]&amp;&quot; &quot;&amp;[.G114]" office:value-type="string" office:string-value="Fussgängerstreifen weg An der Kreuzung Hagenbuchstrasse/Flurhofstrasse wurde neue Bodenmarkierung gemscht und gleichzeitig der Fussgängerstreifen an der Flurhohsrrasse entfernt. Jetzt ist nicht da und die Auto fahren jetzt ohne zu schauen, dort ist ja nur schon wegen der Bushaltestelle viele Leute, die dort die Steasse überqueren. Kommt da nochmals ein Fussgängerstreifen hin?" calcext:value-type="string">
            <text:p>Fussgängerstreifen weg An der Kreuzung Hagenbuchstrasse/Flurhofstrasse wurde neue Bodenmarkierung gemscht und gleichzeitig der Fussgängerstreifen an der Flurhohsrrasse entfernt. Jetzt ist nicht da und die Auto fahren jetzt ohne zu schauen, dort ist ja nur schon wegen der Bushaltestelle viele Leute, die dort die Steasse überqueren. Kommt da nochmals ein Fussgängerstreifen hin?</text:p>
          </table:table-cell>
          <table:table-cell table:style-name="ce75" office:value-type="string" calcext:value-type="string">
            <text:p>x</text:p>
          </table:table-cell>
          <table:table-cell table:style-name="ce75" table:number-columns-repeated="4"/>
          <table:table-cell table:style-name="ce95" office:value-type="float" office:value="119.969498872757" calcext:value-type="float">
            <text:p>120</text:p>
          </table:table-cell>
          <table:table-cell office:value-type="string" calcext:value-type="string">
            <text:p>Signalisation</text:p>
          </table:table-cell>
          <table:table-cell table:style-name="ce104" office:value-type="float" office:value="0.274509803921569" calcext:value-type="float">
            <text:p>0.275</text:p>
          </table:table-cell>
          <table:table-cell/>
          <table:table-cell table:style-name="ce75" table:number-columns-repeated="16366"/>
        </table:table-row>
        <table:table-row table:style-name="ro30">
          <table:table-cell office:value-type="float" office:value="114" calcext:value-type="float">
            <text:p>114</text:p>
          </table:table-cell>
          <table:table-cell office:value-type="string" calcext:value-type="string">
            <text:p>90d9d54d-af05-4ec5-b9a9-ecb5f0dfbe8c</text:p>
          </table:table-cell>
          <table:table-cell office:value-type="string" calcext:value-type="string">
            <text:p>signage</text:p>
          </table:table-cell>
          <table:table-cell office:value-type="string" calcext:value-type="string">
            <text:p>signage,sign,board,work,church</text:p>
          </table:table-cell>
          <table:table-cell office:value-type="string" calcext:value-type="string">
            <text:p><text:s/>Signalisation, nachdem die Arbeiten bei der Linsenbühlkirche fertig sind, sollte die Tafel wieder richtig gedreht werden.</text:p>
          </table:table-cell>
          <table:table-cell office:value-type="string" calcext:value-type="string">
            <text:p>Signalisation</text:p>
          </table:table-cell>
          <table:table-cell table:style-name="ce79" office:value-type="string" calcext:value-type="string">
            <text:p>Nachdem die Arbeiten bei der Linsebühlkirche fertig sind, sollte diese Tafel wieder richtig gedreht werden.</text:p>
          </table:table-cell>
          <table:table-cell table:style-name="ce79" office:value-type="string" calcext:value-type="string">
            <text:p>a sign</text:p>
          </table:table-cell>
          <table:table-cell table:style-name="ce88" table:formula="of:=[.F115]&amp;&quot; &quot;&amp;[.G115]" office:value-type="string" office:string-value="Signalisation Nachdem die Arbeiten bei der Linsebühlkirche fertig sind, sollte diese Tafel wieder richtig gedreht werden." calcext:value-type="string">
            <text:p>Signalisation Nachdem die Arbeiten bei der Linsebühlkirche fertig sind, sollte diese Tafel wieder richtig gedreht werden.</text:p>
          </table:table-cell>
          <table:table-cell office:value-type="string" calcext:value-type="string">
            <text:p>x</text:p>
          </table:table-cell>
          <table:table-cell table:number-columns-repeated="4"/>
          <table:table-cell table:style-name="ce96" office:value-type="float" office:value="175.129301548004" calcext:value-type="float">
            <text:p>175</text:p>
          </table:table-cell>
          <table:table-cell office:value-type="string" calcext:value-type="string">
            <text:p>Signalisation</text:p>
          </table:table-cell>
          <table:table-cell table:style-name="ce99" office:value-type="float" office:value="0.25" calcext:value-type="float">
            <text:p>0.250</text:p>
          </table:table-cell>
          <table:table-cell/>
          <table:table-cell table:style-name="Default" table:number-columns-repeated="16366"/>
        </table:table-row>
        <table:table-row table:style-name="ro6">
          <table:table-cell office:value-type="float" office:value="115" calcext:value-type="float">
            <text:p>115</text:p>
          </table:table-cell>
          <table:table-cell office:value-type="string" calcext:value-type="string">
            <text:p>210b0cec-01eb-4364-9202-88d9a0a8ec8f</text:p>
          </table:table-cell>
          <table:table-cell office:value-type="string" calcext:value-type="string">
            <text:p>construction site sign</text:p>
          </table:table-cell>
          <table:table-cell office:value-type="string" calcext:value-type="string">
            <text:p>construction site sign,construction site,sign,construction</text:p>
          </table:table-cell>
          <table:table-cell office:value-type="string" calcext:value-type="string">
            <text:p><text:s/>Baustellentafel – Wo ist die signalisierte Baustelle?</text:p>
          </table:table-cell>
          <table:table-cell office:value-type="string" calcext:value-type="string">
            <text:p>Baustellentafel</text:p>
          </table:table-cell>
          <table:table-cell table:style-name="ce79" office:value-type="string" calcext:value-type="string">
            <text:p>Wo ist die signalisierte Baustelle?</text:p>
          </table:table-cell>
          <table:table-cell table:style-name="ce79" office:value-type="string" calcext:value-type="string">
            <text:p>a sign</text:p>
          </table:table-cell>
          <table:table-cell table:style-name="ce88" table:formula="of:=[.F116]&amp;&quot; &quot;&amp;[.G116]" office:value-type="string" office:string-value="Baustellentafel Wo ist die signalisierte Baustelle?" calcext:value-type="string">
            <text:p>Baustellentafel Wo ist die signalisierte Baustelle?</text:p>
          </table:table-cell>
          <table:table-cell office:value-type="string" calcext:value-type="string">
            <text:p>x</text:p>
          </table:table-cell>
          <table:table-cell table:number-columns-repeated="4"/>
          <table:table-cell table:style-name="ce96" office:value-type="float" office:value="167.865872383118" calcext:value-type="float">
            <text:p>168</text:p>
          </table:table-cell>
          <table:table-cell office:value-type="string" calcext:value-type="string">
            <text:p>Signalisation</text:p>
          </table:table-cell>
          <table:table-cell table:style-name="ce99" office:value-type="float" office:value="0.166666666666667" calcext:value-type="float">
            <text:p>0.167</text:p>
          </table:table-cell>
          <table:table-cell/>
          <table:table-cell table:style-name="Default" table:number-columns-repeated="16366"/>
        </table:table-row>
        <table:table-row table:style-name="ro9">
          <table:table-cell office:value-type="float" office:value="116" calcext:value-type="float">
            <text:p>116</text:p>
          </table:table-cell>
          <table:table-cell office:value-type="string" calcext:value-type="string">
            <text:p>1d65eb76-0c62-4d63-af01-c23a9919804c</text:p>
          </table:table-cell>
          <table:table-cell office:value-type="string" calcext:value-type="string">
            <text:p>table</text:p>
          </table:table-cell>
          <table:table-cell office:value-type="string" calcext:value-type="string">
            <text:p>table,board,surface,cleaning</text:p>
          </table:table-cell>
          <table:table-cell office:value-type="string" calcext:value-type="string">
            <text:p><text:s/>Tafel stark verschmutzt. Es wäre schön, wenn Sie diese Tafel reinigen könnten. Danke.</text:p>
          </table:table-cell>
          <table:table-cell office:value-type="string" calcext:value-type="string">
            <text:p>Tafeln stark verschmutzt</text:p>
          </table:table-cell>
          <table:table-cell table:style-name="ce79" office:value-type="string" calcext:value-type="string">
            <text:p>Es wäre schön, wenn Sie diese Tafeln reinigen könnten. Danke!</text:p>
          </table:table-cell>
          <table:table-cell table:style-name="ce79" office:value-type="string" calcext:value-type="string">
            <text:p>null</text:p>
          </table:table-cell>
          <table:table-cell table:style-name="ce88" table:formula="of:=[.F117]&amp;&quot; &quot;&amp;[.G117]" office:value-type="string" office:string-value="Tafeln stark verschmutzt Es wäre schön, wenn Sie diese Tafeln reinigen könnten. Danke!" calcext:value-type="string">
            <text:p>Tafeln stark verschmutzt Es wäre schön, wenn Sie diese Tafeln reinigen könnten. Danke!</text:p>
          </table:table-cell>
          <table:table-cell table:number-columns-repeated="2"/>
          <table:table-cell office:value-type="string" calcext:value-type="string">
            <text:p>x</text:p>
          </table:table-cell>
          <table:table-cell table:number-columns-repeated="2"/>
          <table:table-cell table:style-name="ce96" office:value-type="float" office:value="90" calcext:value-type="float">
            <text:p>90</text:p>
          </table:table-cell>
          <table:table-cell office:value-type="string" calcext:value-type="string">
            <text:p>Signalisation</text:p>
          </table:table-cell>
          <table:table-cell table:style-name="ce99" office:value-type="float" office:value="0.307692307692308" calcext:value-type="float">
            <text:p>0.308</text:p>
          </table:table-cell>
          <table:table-cell/>
          <table:table-cell table:style-name="Default" table:number-columns-repeated="16366"/>
        </table:table-row>
        <table:table-row table:style-name="ro28">
          <table:table-cell office:value-type="float" office:value="117" calcext:value-type="float">
            <text:p>117</text:p>
          </table:table-cell>
          <table:table-cell office:value-type="string" calcext:value-type="string">
            <text:p>0c0ec06e-824d-4656-a697-df5cb7c737f9</text:p>
          </table:table-cell>
          <table:table-cell office:value-type="string" calcext:value-type="string">
            <text:p>sign</text:p>
          </table:table-cell>
          <table:table-cell office:value-type="string" calcext:value-type="string">
            <text:p>sign,street sign,money,government,road</text:p>
          </table:table-cell>
          <table:table-cell table:style-name="ce85" office:value-type="string" calcext:value-type="string">
            <text:p><text:s/>Warum wird in einer reinen Fussgängerzone ein solches Schild neu aufgestellt? Darf ich nicht schneller als 30 km pro Stunde laufen? Zwinker. Auf der Rückseite steht 20 km für bergab. Uns düngt das unsinnige Steuergeldverschwendung.</text:p>
          </table:table-cell>
          <table:table-cell office:value-type="string" calcext:value-type="string">
            <text:p>Schilder-Verwirrung</text:p>
          </table:table-cell>
          <table:table-cell table:style-name="ce79" office:value-type="string" calcext:value-type="string">
            <text:p>Warum wird in einer reinen Fussgänger-Zone ein solches Schilder neu aufgestellt?? Darf ich nicht schneller als 30km/h laufen? Zwinker! Auf der Rückseite steht 20km/h für bergab… Uns dünkt das unsinnige Steuergeldverschwendung.</text:p>
          </table:table-cell>
          <table:table-cell table:style-name="ce79" office:value-type="string" calcext:value-type="string">
            <text:p>a sign</text:p>
          </table:table-cell>
          <table:table-cell table:style-name="ce88" table:formula="of:=[.F118]&amp;&quot; &quot;&amp;[.G118]" office:value-type="string" office:string-value="Schilder-Verwirrung Warum wird in einer reinen Fussgänger-Zone ein solches Schilder neu aufgestellt?? Darf ich nicht schneller als 30km/h laufen? Zwinker! Auf der Rückseite steht 20km/h für bergab… Uns dünkt das unsinnige Steuergeldverschwendung." calcext:value-type="string">
            <text:p>Schilder-Verwirrung Warum wird in einer reinen Fussgänger-Zone ein solches Schilder neu aufgestellt?? Darf ich nicht schneller als 30km/h laufen? Zwinker! Auf der Rückseite steht 20km/h für bergab… Uns dünkt das unsinnige Steuergeldverschwendung.</text:p>
          </table:table-cell>
          <table:table-cell office:value-type="string" calcext:value-type="string">
            <text:p>x</text:p>
          </table:table-cell>
          <table:table-cell table:number-columns-repeated="4"/>
          <table:table-cell table:style-name="ce96" office:value-type="float" office:value="208" calcext:value-type="float">
            <text:p>208</text:p>
          </table:table-cell>
          <table:table-cell office:value-type="string" calcext:value-type="string">
            <text:p>Signalisation</text:p>
          </table:table-cell>
          <table:table-cell table:style-name="ce99" office:value-type="float" office:value="0.40625" calcext:value-type="float">
            <text:p>0.406</text:p>
          </table:table-cell>
          <table:table-cell/>
          <table:table-cell table:style-name="Default" table:number-columns-repeated="16366"/>
        </table:table-row>
        <table:table-row table:style-name="ro7">
          <table:table-cell office:value-type="float" office:value="118" calcext:value-type="float">
            <text:p>118</text:p>
          </table:table-cell>
          <table:table-cell office:value-type="string" calcext:value-type="string">
            <text:p>07c52067-b125-416a-9af6-478a40cd6670</text:p>
          </table:table-cell>
          <table:table-cell office:value-type="string" calcext:value-type="string">
            <text:p>signs</text:p>
          </table:table-cell>
          <table:table-cell office:value-type="string" calcext:value-type="string">
            <text:p>signs,diversion signal,street,pedestrian,construction signal,light fixture</text:p>
          </table:table-cell>
          <table:table-cell office:value-type="string" calcext:value-type="string">
            <text:p><text:s/>Überflüssige Signale, Abzweigung, Neststraße, Demutstraße, welche Bedeutung haben das Umleitsignal für Fußgänger, das verblichene Bauarbeitensignal beim Beleuchtungskandelaber.</text:p>
          </table:table-cell>
          <table:table-cell office:value-type="string" calcext:value-type="string">
            <text:p>überflüssige Signale?</text:p>
          </table:table-cell>
          <table:table-cell table:style-name="ce79" office:value-type="string" calcext:value-type="string">
            <text:p>Abzweigung Neststrasse/Demutstrasse, welche Bedeutung haben: - das Umleitungssignal für Fussgänger - das verblichene Bauarbeiten-Signal beim Beleuchtungskandelaber</text:p>
          </table:table-cell>
          <table:table-cell table:style-name="ce79" office:value-type="string" calcext:value-type="string">
            <text:p>a signs</text:p>
          </table:table-cell>
          <table:table-cell table:style-name="ce88" table:formula="of:=[.F119]&amp;&quot; &quot;&amp;[.G119]" office:value-type="string" office:string-value="überflüssige Signale? Abzweigung Neststrasse/Demutstrasse, welche Bedeutung haben: - das Umleitungssignal für Fussgänger - das verblichene Bauarbeiten-Signal beim Beleuchtungskandelaber" calcext:value-type="string">
            <text:p>überflüssige Signale? Abzweigung Neststrasse/Demutstrasse, welche Bedeutung haben: - das Umleitungssignal für Fussgänger - das verblichene Bauarbeiten-Signal beim Beleuchtungskandelaber</text:p>
          </table:table-cell>
          <table:table-cell office:value-type="string" calcext:value-type="string">
            <text:p>x</text:p>
          </table:table-cell>
          <table:table-cell table:number-columns-repeated="4"/>
          <table:table-cell table:style-name="ce96" office:value-type="float" office:value="242" calcext:value-type="float">
            <text:p>242</text:p>
          </table:table-cell>
          <table:table-cell office:value-type="string" calcext:value-type="string">
            <text:p>Signalisation</text:p>
          </table:table-cell>
          <table:table-cell table:style-name="ce99" office:value-type="float" office:value="0.666666666666667" calcext:value-type="float">
            <text:p>0.667</text:p>
          </table:table-cell>
          <table:table-cell/>
          <table:table-cell table:style-name="Default" table:number-columns-repeated="16366"/>
        </table:table-row>
        <table:table-row table:style-name="ro14">
          <table:table-cell office:value-type="float" office:value="119" calcext:value-type="float">
            <text:p>119</text:p>
          </table:table-cell>
          <table:table-cell office:value-type="string" calcext:value-type="string">
            <text:p>ef74e33a-68f3-4012-b635-9c1b8a3c56cc</text:p>
          </table:table-cell>
          <table:table-cell office:value-type="string" calcext:value-type="string">
            <text:p>grid</text:p>
          </table:table-cell>
          <table:table-cell office:value-type="string" calcext:value-type="string">
            <text:p>grid,board,fence,sign,bicycle path</text:p>
          </table:table-cell>
          <table:table-cell office:value-type="string" calcext:value-type="string">
            <text:p><text:s/>Gitter und Tafel entfernen. Die Offer ist schon wieder längst passé. Bitte das Gitter und Tafel entfernen. Somit kann man wieder normal diesen Veloweg benutzen.</text:p>
          </table:table-cell>
          <table:table-cell office:value-type="string" calcext:value-type="string">
            <text:p>Gitter und Tafel entfernen</text:p>
          </table:table-cell>
          <table:table-cell table:style-name="ce79" office:value-type="string" calcext:value-type="string">
            <text:p>Die OFFA ist schon wieder längst passé. Bitte das Gitter und Tafel entfernen. Somit kann man wieder normal diesen Veloweg benutzen.</text:p>
          </table:table-cell>
          <table:table-cell table:style-name="ce79" office:value-type="string" calcext:value-type="string">
            <text:p>a grid</text:p>
          </table:table-cell>
          <table:table-cell table:style-name="ce88" table:formula="of:=[.F120]&amp;&quot; &quot;&amp;[.G120]" office:value-type="string" office:string-value="Gitter und Tafel entfernen Die OFFA ist schon wieder längst passé. Bitte das Gitter und Tafel entfernen. Somit kann man wieder normal diesen Veloweg benutzen." calcext:value-type="string">
            <text:p>Gitter und Tafel entfernen Die OFFA ist schon wieder längst passé. Bitte das Gitter und Tafel entfernen. Somit kann man wieder normal diesen Veloweg benutzen.</text:p>
          </table:table-cell>
          <table:table-cell table:number-columns-repeated="3"/>
          <table:table-cell office:value-type="string" calcext:value-type="string">
            <text:p>x</text:p>
          </table:table-cell>
          <table:table-cell/>
          <table:table-cell table:style-name="ce96" office:value-type="float" office:value="220" calcext:value-type="float">
            <text:p>220</text:p>
          </table:table-cell>
          <table:table-cell office:value-type="string" calcext:value-type="string">
            <text:p>Signalisation</text:p>
          </table:table-cell>
          <table:table-cell table:style-name="ce99" office:value-type="float" office:value="0.08" calcext:value-type="float">
            <text:p>0.080</text:p>
          </table:table-cell>
          <table:table-cell/>
          <table:table-cell table:style-name="Default" table:number-columns-repeated="16366"/>
        </table:table-row>
        <table:table-row table:style-name="ro19">
          <table:table-cell office:value-type="float" office:value="120" calcext:value-type="float">
            <text:p>120</text:p>
          </table:table-cell>
          <table:table-cell office:value-type="string" calcext:value-type="string">
            <text:p>a04017d1-388b-4d7b-a203-db8875c09b49</text:p>
          </table:table-cell>
          <table:table-cell office:value-type="string" calcext:value-type="string">
            <text:p>plastic post</text:p>
          </table:table-cell>
          <table:table-cell office:value-type="string" calcext:value-type="string">
            <text:p>plastic post,posts,lamppost,ladder</text:p>
          </table:table-cell>
          <table:table-cell office:value-type="string" calcext:value-type="string">
            <text:p><text:s/>Plastikpfosten. Zwei herausgerissene Pfosten, eventuell von einer Bushaltestelle, liegen an der Schlössltreppe Lampe Nummer 21.</text:p>
          </table:table-cell>
          <table:table-cell office:value-type="string" calcext:value-type="string">
            <text:p>Plastikpfosten</text:p>
          </table:table-cell>
          <table:table-cell table:style-name="ce79" office:value-type="string" calcext:value-type="string">
            <text:p>2 herausgerissene Pfosten, evtl. von einer Bushaltestelle, liegen an der Schlösslitreppe, Lampe Nr. 21.</text:p>
          </table:table-cell>
          <table:table-cell table:style-name="ce79" office:value-type="string" calcext:value-type="string">
            <text:p>a posts</text:p>
          </table:table-cell>
          <table:table-cell table:style-name="ce88" table:formula="of:=[.F121]&amp;&quot; &quot;&amp;[.G121]" office:value-type="string" office:string-value="Plastikpfosten 2 herausgerissene Pfosten, evtl. von einer Bushaltestelle, liegen an der Schlösslitreppe, Lampe Nr. 21." calcext:value-type="string">
            <text:p>Plastikpfosten 2 herausgerissene Pfosten, evtl. von einer Bushaltestelle, liegen an der Schlösslitreppe, Lampe Nr. 21.</text:p>
          </table:table-cell>
          <table:table-cell table:number-columns-repeated="4"/>
          <table:table-cell office:value-type="string" calcext:value-type="string">
            <text:p>x</text:p>
          </table:table-cell>
          <table:table-cell table:style-name="ce96" office:value-type="float" office:value="379" calcext:value-type="float">
            <text:p>379</text:p>
          </table:table-cell>
          <table:table-cell office:value-type="string" calcext:value-type="string">
            <text:p>Signalisation</text:p>
          </table:table-cell>
          <table:table-cell table:style-name="ce99" office:value-type="float" office:value="0.333333333333333" calcext:value-type="float">
            <text:p>0.333</text:p>
          </table:table-cell>
          <table:table-cell/>
          <table:table-cell table:style-name="Default" table:number-columns-repeated="16366"/>
        </table:table-row>
        <table:table-row table:style-name="ro29">
          <table:table-cell office:value-type="float" office:value="121" calcext:value-type="float">
            <text:p>121</text:p>
          </table:table-cell>
          <table:table-cell office:value-type="string" calcext:value-type="string">
            <text:p>0c8d0317-9585-4909-83c1-05159a61737c</text:p>
          </table:table-cell>
          <table:table-cell office:value-type="string" calcext:value-type="string">
            <text:p>signage</text:p>
          </table:table-cell>
          <table:table-cell office:value-type="string" calcext:value-type="string">
            <text:p>signage,sign,board,staircase</text:p>
          </table:table-cell>
          <table:table-cell office:value-type="string" calcext:value-type="string">
            <text:p><text:s/>Spezielle Signalisation. Was hat es sich mit dieser speziellen Tafel auf sich bei einer Treppe?</text:p>
          </table:table-cell>
          <table:table-cell office:value-type="string" calcext:value-type="string">
            <text:p>Spezielle Signalisation</text:p>
          </table:table-cell>
          <table:table-cell table:style-name="ce79" office:value-type="string" calcext:value-type="string">
            <text:p>Was hat es mit dieser speziellen Tafel auf sich? Bei einer Treppe!?</text:p>
          </table:table-cell>
          <table:table-cell table:style-name="ce79" office:value-type="string" calcext:value-type="string">
            <text:p>a signage</text:p>
          </table:table-cell>
          <table:table-cell table:style-name="ce88" table:formula="of:=[.F122]&amp;&quot; &quot;&amp;[.G122]" office:value-type="string" office:string-value="Spezielle Signalisation Was hat es mit dieser speziellen Tafel auf sich? Bei einer Treppe!?" calcext:value-type="string">
            <text:p>Spezielle Signalisation Was hat es mit dieser speziellen Tafel auf sich? Bei einer Treppe!?</text:p>
          </table:table-cell>
          <table:table-cell office:value-type="string" calcext:value-type="string">
            <text:p>x</text:p>
          </table:table-cell>
          <table:table-cell table:number-columns-repeated="4"/>
          <table:table-cell table:style-name="ce96" office:value-type="float" office:value="202" calcext:value-type="float">
            <text:p>202</text:p>
          </table:table-cell>
          <table:table-cell office:value-type="string" calcext:value-type="string">
            <text:p>Signalisation</text:p>
          </table:table-cell>
          <table:table-cell table:style-name="ce99" office:value-type="float" office:value="0.357142857142857" calcext:value-type="float">
            <text:p>0.357</text:p>
          </table:table-cell>
          <table:table-cell/>
          <table:table-cell table:style-name="Default" table:number-columns-repeated="16366"/>
        </table:table-row>
        <table:table-row table:style-name="ro6">
          <table:table-cell office:value-type="float" office:value="122" calcext:value-type="float">
            <text:p>122</text:p>
          </table:table-cell>
          <table:table-cell office:value-type="string" calcext:value-type="string">
            <text:p>a003aafa-5ff3-438a-9668-c5f37a9f300b</text:p>
          </table:table-cell>
          <table:table-cell office:value-type="string" calcext:value-type="string">
            <text:p>table</text:p>
          </table:table-cell>
          <table:table-cell office:value-type="string" calcext:value-type="string">
            <text:p>table,sign,plate,airplane,car</text:p>
          </table:table-cell>
          <table:table-cell office:value-type="string" calcext:value-type="string">
            <text:p><text:s/>30 Tafel für fliegende Autos. Diese Tafel sieht kein Autofahrer.</text:p>
          </table:table-cell>
          <table:table-cell office:value-type="string" calcext:value-type="string">
            <text:p>30 Tafel für fliegende Autos?</text:p>
          </table:table-cell>
          <table:table-cell table:style-name="ce79" office:value-type="string" calcext:value-type="string">
            <text:p>Diese Tafel sieht kein Autofahrer!!</text:p>
          </table:table-cell>
          <table:table-cell table:style-name="ce79" office:value-type="string" calcext:value-type="string">
            <text:p>a sign</text:p>
          </table:table-cell>
          <table:table-cell table:style-name="ce88" table:formula="of:=[.F123]&amp;&quot; &quot;&amp;[.G123]" office:value-type="string" office:string-value="30 Tafel für fliegende Autos? Diese Tafel sieht kein Autofahrer!!" calcext:value-type="string">
            <text:p>30 Tafel für fliegende Autos? Diese Tafel sieht kein Autofahrer!!</text:p>
          </table:table-cell>
          <table:table-cell office:value-type="string" calcext:value-type="string">
            <text:p>x</text:p>
          </table:table-cell>
          <table:table-cell table:number-columns-repeated="4"/>
          <table:table-cell table:style-name="ce96" office:value-type="float" office:value="490" calcext:value-type="float">
            <text:p>490</text:p>
          </table:table-cell>
          <table:table-cell office:value-type="string" calcext:value-type="string">
            <text:p>Signalisation</text:p>
          </table:table-cell>
          <table:table-cell table:style-name="ce99" office:value-type="float" office:value="0.2" calcext:value-type="float">
            <text:p>0.200</text:p>
          </table:table-cell>
          <table:table-cell/>
          <table:table-cell table:style-name="Default" table:number-columns-repeated="16366"/>
        </table:table-row>
        <table:table-row table:style-name="ro19">
          <table:table-cell office:value-type="float" office:value="123" calcext:value-type="float">
            <text:p>123</text:p>
          </table:table-cell>
          <table:table-cell office:value-type="string" calcext:value-type="string">
            <text:p>b3591288-7f74-4dad-a5da-604699f7c54d</text:p>
          </table:table-cell>
          <table:table-cell office:value-type="string" calcext:value-type="string">
            <text:p>steering knob</text:p>
          </table:table-cell>
          <table:table-cell office:value-type="string" calcext:value-type="string">
            <text:p>steering knob,control knob,handle,puddles,wheelchair</text:p>
          </table:table-cell>
          <table:table-cell office:value-type="string" calcext:value-type="string">
            <text:p><text:s/>Halteknopf bedienerunfreundlich. Der Halteknopf kann nur sehr schwer bedient werden. Vorne drei Dreckpfütze und dann noch ein Haag für Rollstuhlfahrende absolut nicht bedienbar.</text:p>
          </table:table-cell>
          <table:table-cell office:value-type="string" calcext:value-type="string">
            <text:p>Halteknopf bedienerunfreundlich</text:p>
          </table:table-cell>
          <table:table-cell table:style-name="ce79" office:value-type="string" calcext:value-type="string">
            <text:p>Der Halteknopf kann nur schwer bedient werden, vorne Dreckpfütze und dann noch ein Hag. Für Rollstuhlfahrende absolut nicht bedienbar.</text:p>
          </table:table-cell>
          <table:table-cell table:style-name="ce79" office:value-type="string" calcext:value-type="string">
            <text:p>a handle</text:p>
          </table:table-cell>
          <table:table-cell table:style-name="ce88" table:formula="of:=[.F124]&amp;&quot; &quot;&amp;[.G124]" office:value-type="string" office:string-value="Halteknopf bedienerunfreundlich Der Halteknopf kann nur schwer bedient werden, vorne Dreckpfütze und dann noch ein Hag. Für Rollstuhlfahrende absolut nicht bedienbar." calcext:value-type="string">
            <text:p>Halteknopf bedienerunfreundlich Der Halteknopf kann nur schwer bedient werden, vorne Dreckpfütze und dann noch ein Hag. Für Rollstuhlfahrende absolut nicht bedienbar.</text:p>
          </table:table-cell>
          <table:table-cell table:number-columns-repeated="4"/>
          <table:table-cell office:value-type="string" calcext:value-type="string">
            <text:p>x</text:p>
          </table:table-cell>
          <table:table-cell table:style-name="ce96" office:value-type="float" office:value="298" calcext:value-type="float">
            <text:p>298</text:p>
          </table:table-cell>
          <table:table-cell office:value-type="string" calcext:value-type="string">
            <text:p>Signalisation</text:p>
          </table:table-cell>
          <table:table-cell table:style-name="ce99" office:value-type="float" office:value="0.333333333333333" calcext:value-type="float">
            <text:p>0.333</text:p>
          </table:table-cell>
          <table:table-cell/>
          <table:table-cell table:style-name="Default" table:number-columns-repeated="16366"/>
        </table:table-row>
        <table:table-row table:style-name="ro6">
          <table:table-cell office:value-type="float" office:value="124" calcext:value-type="float">
            <text:p>124</text:p>
          </table:table-cell>
          <table:table-cell office:value-type="string" calcext:value-type="string">
            <text:p>c3798702-eb72-4b51-82e0-4346c7a102a4</text:p>
          </table:table-cell>
          <table:table-cell office:value-type="string" calcext:value-type="string">
            <text:p>signpost</text:p>
          </table:table-cell>
          <table:table-cell office:value-type="string" calcext:value-type="string">
            <text:p>signpost,pole,post</text:p>
          </table:table-cell>
          <table:table-cell office:value-type="string" calcext:value-type="string">
            <text:p><text:s/>Signalisierungspfosten umgefahren.</text:p>
          </table:table-cell>
          <table:table-cell office:value-type="string" calcext:value-type="string">
            <text:p>Signalisierungspfosten umgefahren</text:p>
          </table:table-cell>
          <table:table-cell table:style-name="ce79"/>
          <table:table-cell table:style-name="ce79" office:value-type="string" calcext:value-type="string">
            <text:p>a signpost</text:p>
          </table:table-cell>
          <table:table-cell table:style-name="ce88" table:formula="of:=[.F125]&amp;&quot; &quot;&amp;[.G125]" office:value-type="string" office:string-value="Signalisierungspfosten umgefahren " calcext:value-type="string">
            <text:p>Signalisierungspfosten umgefahren </text:p>
          </table:table-cell>
          <table:table-cell table:number-columns-repeated="4"/>
          <table:table-cell office:value-type="string" calcext:value-type="string">
            <text:p>x</text:p>
          </table:table-cell>
          <table:table-cell table:style-name="ce96" office:value-type="float" office:value="154" calcext:value-type="float">
            <text:p>154</text:p>
          </table:table-cell>
          <table:table-cell office:value-type="string" calcext:value-type="string">
            <text:p>Signalisation</text:p>
          </table:table-cell>
          <table:table-cell table:style-name="ce99" office:value-type="float" office:value="0.5" calcext:value-type="float">
            <text:p>0.500</text:p>
          </table:table-cell>
          <table:table-cell/>
          <table:table-cell table:style-name="Default" table:number-columns-repeated="16366"/>
        </table:table-row>
        <table:table-row table:style-name="ro10">
          <table:table-cell office:value-type="float" office:value="125" calcext:value-type="float">
            <text:p>125</text:p>
          </table:table-cell>
          <table:table-cell office:value-type="string" calcext:value-type="string">
            <text:p>dbbee80b-029a-4774-b03f-8d583110fb78</text:p>
          </table:table-cell>
          <table:table-cell office:value-type="string" calcext:value-type="string">
            <text:p>no parking sign</text:p>
          </table:table-cell>
          <table:table-cell office:value-type="string" calcext:value-type="string">
            <text:p>no parking sign,parking sign,sign,sidewalk,stroller</text:p>
          </table:table-cell>
          <table:table-cell office:value-type="string" calcext:value-type="string">
            <text:p><text:s/>Parkverbotstafel. Zwei Parkverbotstafel stehen auf dem Trottoir. Mit einem Kinderwagen oder Rollstuhl ist kaum daran vorbeizukommen.</text:p>
          </table:table-cell>
          <table:table-cell office:value-type="string" calcext:value-type="string">
            <text:p>Parkverbottafeln</text:p>
          </table:table-cell>
          <table:table-cell table:style-name="ce79" office:value-type="string" calcext:value-type="string">
            <text:p>2 Parkverbottafel stehen auf dem Trottoir. Mit einem Kinderwagen oder einem Rollstuhl ist kaum daran vorbei zu kommen!</text:p>
          </table:table-cell>
          <table:table-cell table:style-name="ce79" office:value-type="string" calcext:value-type="string">
            <text:p>a sign</text:p>
          </table:table-cell>
          <table:table-cell table:style-name="ce88" table:formula="of:=[.F126]&amp;&quot; &quot;&amp;[.G126]" office:value-type="string" office:string-value="Parkverbottafeln 2 Parkverbottafel stehen auf dem Trottoir. Mit einem Kinderwagen oder einem Rollstuhl ist kaum daran vorbei zu kommen!" calcext:value-type="string">
            <text:p>Parkverbottafeln 2 Parkverbottafel stehen auf dem Trottoir. Mit einem Kinderwagen oder einem Rollstuhl ist kaum daran vorbei zu kommen!</text:p>
          </table:table-cell>
          <table:table-cell office:value-type="string" calcext:value-type="string">
            <text:p>x</text:p>
          </table:table-cell>
          <table:table-cell table:number-columns-repeated="4"/>
          <table:table-cell table:style-name="ce96" office:value-type="float" office:value="268" calcext:value-type="float">
            <text:p>268</text:p>
          </table:table-cell>
          <table:table-cell office:value-type="string" calcext:value-type="string">
            <text:p>Signalisation</text:p>
          </table:table-cell>
          <table:table-cell table:style-name="ce99" office:value-type="float" office:value="0.368421052631579" calcext:value-type="float">
            <text:p>0.368</text:p>
          </table:table-cell>
          <table:table-cell/>
          <table:table-cell table:style-name="Default" table:number-columns-repeated="16366"/>
        </table:table-row>
        <table:table-row table:style-name="ro6">
          <table:table-cell office:value-type="float" office:value="126" calcext:value-type="float">
            <text:p>126</text:p>
          </table:table-cell>
          <table:table-cell office:value-type="string" calcext:value-type="string">
            <text:p>1155d6c5-432b-4015-82fb-e5d787b55091</text:p>
          </table:table-cell>
          <table:table-cell office:value-type="string" calcext:value-type="string">
            <text:p>street</text:p>
          </table:table-cell>
          <table:table-cell office:value-type="string" calcext:value-type="string">
            <text:p>street,intersection,light,number three</text:p>
          </table:table-cell>
          <table:table-cell office:value-type="string" calcext:value-type="string">
            <text:p><text:s/>Achsensteinstraße Leuchtstelle Nummer 3 brennt nicht.</text:p>
          </table:table-cell>
          <table:table-cell office:value-type="string" calcext:value-type="string">
            <text:p>Axensteinstrasse, Leuchtstelle Nr 3</text:p>
          </table:table-cell>
          <table:table-cell table:style-name="ce79" office:value-type="string" calcext:value-type="string">
            <text:p>brennt nicht</text:p>
          </table:table-cell>
          <table:table-cell table:style-name="ce79" office:value-type="string" calcext:value-type="string">
            <text:p>a street</text:p>
          </table:table-cell>
          <table:table-cell table:style-name="ce88" table:formula="of:=[.F127]&amp;&quot; &quot;&amp;[.G127]" office:value-type="string" office:string-value="Axensteinstrasse, Leuchtstelle Nr 3 brennt nicht" calcext:value-type="string">
            <text:p>Axensteinstrasse, Leuchtstelle Nr 3 brennt nicht</text:p>
          </table:table-cell>
          <table:table-cell table:number-columns-repeated="2"/>
          <table:table-cell office:value-type="string" calcext:value-type="string">
            <text:p>x</text:p>
          </table:table-cell>
          <table:table-cell table:number-columns-repeated="2"/>
          <table:table-cell table:style-name="ce96" office:value-type="float" office:value="129" calcext:value-type="float">
            <text:p>129</text:p>
          </table:table-cell>
          <table:table-cell office:value-type="string" calcext:value-type="string">
            <text:p>Strassenbeleuchtung</text:p>
          </table:table-cell>
          <table:table-cell table:style-name="ce99" office:value-type="float" office:value="0.5" calcext:value-type="float">
            <text:p>0.500</text:p>
          </table:table-cell>
          <table:table-cell/>
          <table:table-cell table:style-name="Default" table:number-columns-repeated="16366"/>
        </table:table-row>
        <table:table-row table:style-name="ro6">
          <table:table-cell office:value-type="float" office:value="127" calcext:value-type="float">
            <text:p>127</text:p>
          </table:table-cell>
          <table:table-cell office:value-type="string" calcext:value-type="string">
            <text:p>1248823f-728e-4459-ad9e-8cd303a18890</text:p>
          </table:table-cell>
          <table:table-cell office:value-type="string" calcext:value-type="string">
            <text:p>Bieserhofstraße</text:p>
          </table:table-cell>
          <table:table-cell office:value-type="string" calcext:value-type="string">
            <text:p>Bieserhofstraße,Leuchtstelle,number 27,fire</text:p>
          </table:table-cell>
          <table:table-cell office:value-type="string" calcext:value-type="string">
            <text:p><text:s/>Bieserhofstraße Leuchtstelle Nummer 27 brennt teilweise.</text:p>
          </table:table-cell>
          <table:table-cell office:value-type="string" calcext:value-type="string">
            <text:p>Biserhofstrasse, Leuchtstelle Nr 27</text:p>
          </table:table-cell>
          <table:table-cell table:style-name="ce79" office:value-type="string" calcext:value-type="string">
            <text:p>brennt teilweise</text:p>
          </table:table-cell>
          <table:table-cell table:style-name="ce79" office:value-type="string" calcext:value-type="string">
            <text:p>null</text:p>
          </table:table-cell>
          <table:table-cell table:style-name="ce88" table:formula="of:=[.F128]&amp;&quot; &quot;&amp;[.G128]" office:value-type="string" office:string-value="Biserhofstrasse, Leuchtstelle Nr 27 brennt teilweise" calcext:value-type="string">
            <text:p>Biserhofstrasse, Leuchtstelle Nr 27 brennt teilweise</text:p>
          </table:table-cell>
          <table:table-cell table:number-columns-repeated="2"/>
          <table:table-cell office:value-type="string" calcext:value-type="string">
            <text:p>x</text:p>
          </table:table-cell>
          <table:table-cell table:number-columns-repeated="2"/>
          <table:table-cell table:style-name="ce96" office:value-type="float" office:value="89" calcext:value-type="float">
            <text:p>89</text:p>
          </table:table-cell>
          <table:table-cell office:value-type="string" calcext:value-type="string">
            <text:p>Strassenbeleuchtung</text:p>
          </table:table-cell>
          <table:table-cell table:style-name="ce99" office:value-type="float" office:value="0.5" calcext:value-type="float">
            <text:p>0.500</text:p>
          </table:table-cell>
          <table:table-cell/>
          <table:table-cell table:style-name="Default" table:number-columns-repeated="16366"/>
        </table:table-row>
        <table:table-row table:style-name="ro6">
          <table:table-cell office:value-type="float" office:value="128" calcext:value-type="float">
            <text:p>128</text:p>
          </table:table-cell>
          <table:table-cell office:value-type="string" calcext:value-type="string">
            <text:p>d605aa5d-9942-4e05-a5f3-eb39bb70aaec</text:p>
          </table:table-cell>
          <table:table-cell office:value-type="string" calcext:value-type="string">
            <text:p>street</text:p>
          </table:table-cell>
          <table:table-cell office:value-type="string" calcext:value-type="string">
            <text:p>street,light,number one,flame</text:p>
          </table:table-cell>
          <table:table-cell office:value-type="string" calcext:value-type="string">
            <text:p><text:s/>Duft hoch, Straße, Leuchtstelle Nummer 1 brennt nicht.</text:p>
          </table:table-cell>
          <table:table-cell office:value-type="string" calcext:value-type="string">
            <text:p>Dufourstrasse, Leuchtstelle Nr 1</text:p>
          </table:table-cell>
          <table:table-cell table:style-name="ce79" office:value-type="string" calcext:value-type="string">
            <text:p>brennt nicht</text:p>
          </table:table-cell>
          <table:table-cell table:style-name="ce79" office:value-type="string" calcext:value-type="string">
            <text:p>a street</text:p>
          </table:table-cell>
          <table:table-cell table:style-name="ce88" table:formula="of:=[.F129]&amp;&quot; &quot;&amp;[.G129]" office:value-type="string" office:string-value="Dufourstrasse, Leuchtstelle Nr 1 brennt nicht" calcext:value-type="string">
            <text:p>Dufourstrasse, Leuchtstelle Nr 1 brennt nicht</text:p>
          </table:table-cell>
          <table:table-cell table:number-columns-repeated="3"/>
          <table:table-cell office:value-type="string" calcext:value-type="string">
            <text:p>x</text:p>
          </table:table-cell>
          <table:table-cell/>
          <table:table-cell table:style-name="ce96" office:value-type="float" office:value="139" calcext:value-type="float">
            <text:p>139</text:p>
          </table:table-cell>
          <table:table-cell office:value-type="string" calcext:value-type="string">
            <text:p>Strassenbeleuchtung</text:p>
          </table:table-cell>
          <table:table-cell table:style-name="ce99" office:value-type="float" office:value="0.833333333333333" calcext:value-type="float">
            <text:p>0.833</text:p>
          </table:table-cell>
          <table:table-cell/>
          <table:table-cell table:style-name="Default" table:number-columns-repeated="16366"/>
        </table:table-row>
        <table:table-row table:style-name="ro6">
          <table:table-cell office:value-type="float" office:value="129" calcext:value-type="float">
            <text:p>129</text:p>
          </table:table-cell>
          <table:table-cell office:value-type="string" calcext:value-type="string">
            <text:p>94218569-032a-4e76-90a0-e90ce8e826bc</text:p>
          </table:table-cell>
          <table:table-cell office:value-type="string" calcext:value-type="string">
            <text:p>Lindenstraße</text:p>
          </table:table-cell>
          <table:table-cell office:value-type="string" calcext:value-type="string">
            <text:p>Lindenstraße,light station,number 50</text:p>
          </table:table-cell>
          <table:table-cell office:value-type="string" calcext:value-type="string">
            <text:p><text:s/>Lindenstraße Leuchtstelle Nummer 50 brennt nicht.</text:p>
          </table:table-cell>
          <table:table-cell office:value-type="string" calcext:value-type="string">
            <text:p>Lindenstrasse, Leuchtstelle Nr 50</text:p>
          </table:table-cell>
          <table:table-cell table:style-name="ce79" office:value-type="string" calcext:value-type="string">
            <text:p>brennt nicht</text:p>
          </table:table-cell>
          <table:table-cell table:style-name="ce79" office:value-type="string" calcext:value-type="string">
            <text:p>null</text:p>
          </table:table-cell>
          <table:table-cell table:style-name="ce88" table:formula="of:=[.F130]&amp;&quot; &quot;&amp;[.G130]" office:value-type="string" office:string-value="Lindenstrasse, Leuchtstelle Nr 50 brennt nicht" calcext:value-type="string">
            <text:p>Lindenstrasse, Leuchtstelle Nr 50 brennt nicht</text:p>
          </table:table-cell>
          <table:table-cell table:number-columns-repeated="2"/>
          <table:table-cell office:value-type="string" calcext:value-type="string">
            <text:p>x</text:p>
          </table:table-cell>
          <table:table-cell table:number-columns-repeated="2"/>
          <table:table-cell table:style-name="ce96" office:value-type="float" office:value="83" calcext:value-type="float">
            <text:p>83</text:p>
          </table:table-cell>
          <table:table-cell office:value-type="string" calcext:value-type="string">
            <text:p>Strassenbeleuchtung</text:p>
          </table:table-cell>
          <table:table-cell table:style-name="ce99" office:value-type="float" office:value="0.5" calcext:value-type="float">
            <text:p>0.500</text:p>
          </table:table-cell>
          <table:table-cell/>
          <table:table-cell table:style-name="Default" table:number-columns-repeated="16366"/>
        </table:table-row>
        <table:table-row table:style-name="ro14">
          <table:table-cell office:value-type="float" office:value="130" calcext:value-type="float">
            <text:p>130</text:p>
          </table:table-cell>
          <table:table-cell office:value-type="string" calcext:value-type="string">
            <text:p>d6eacaa4-b507-4304-9795-8818dd072b4b</text:p>
          </table:table-cell>
          <table:table-cell office:value-type="string" calcext:value-type="string">
            <text:p>lamp</text:p>
          </table:table-cell>
          <table:table-cell office:value-type="string" calcext:value-type="string">
            <text:p>lamp,light,ivy,edgebergweg,signal</text:p>
          </table:table-cell>
          <table:table-cell office:value-type="string" calcext:value-type="string">
            <text:p><text:s/>Edgebergweg Leuchtstelle Nummer 4 Sonstige Störung Lampe ist immer noch mit Efeu umhüllt Strahlkraft Minim Obwohl im Stadtmelder als erledigt angegeben Danke für uns entfernen</text:p>
          </table:table-cell>
          <table:table-cell office:value-type="string" calcext:value-type="string">
            <text:p>Aetschbergweg, Leuchtstelle Nr 4</text:p>
          </table:table-cell>
          <table:table-cell table:style-name="ce79" office:value-type="string" calcext:value-type="string">
            <text:p>sonstige Störung Lampe ist immernoch mit Efeu eingehüllt = Strahlkraft minim. Obwohl im Stadtmelder als erledigt angegeben. Danke fürs Entfernen. </text:p>
          </table:table-cell>
          <table:table-cell table:style-name="ce79" office:value-type="string" calcext:value-type="string">
            <text:p>a lamp</text:p>
          </table:table-cell>
          <table:table-cell table:style-name="ce88" table:formula="of:=[.F131]&amp;&quot; &quot;&amp;[.G131]" office:value-type="string" office:string-value="Aetschbergweg, Leuchtstelle Nr 4 sonstige Störung Lampe ist immernoch mit Efeu eingehüllt = Strahlkraft minim. Obwohl im Stadtmelder als erledigt angegeben. Danke fürs Entfernen. " calcext:value-type="string">
            <text:p>Aetschbergweg, Leuchtstelle Nr 4 sonstige Störung Lampe ist immernoch mit Efeu eingehüllt = Strahlkraft minim. Obwohl im Stadtmelder als erledigt angegeben. Danke fürs Entfernen. </text:p>
          </table:table-cell>
          <table:table-cell table:number-columns-repeated="3"/>
          <table:table-cell office:value-type="string" calcext:value-type="string">
            <text:p>x</text:p>
          </table:table-cell>
          <table:table-cell/>
          <table:table-cell table:style-name="ce96" office:value-type="float" office:value="183" calcext:value-type="float">
            <text:p>183</text:p>
          </table:table-cell>
          <table:table-cell office:value-type="string" calcext:value-type="string">
            <text:p>Strassenbeleuchtung</text:p>
          </table:table-cell>
          <table:table-cell table:style-name="ce99" office:value-type="float" office:value="0.5" calcext:value-type="float">
            <text:p>0.500</text:p>
          </table:table-cell>
          <table:table-cell/>
          <table:table-cell table:style-name="Default" table:number-columns-repeated="16366"/>
        </table:table-row>
        <table:table-row table:style-name="ro6">
          <table:table-cell office:value-type="float" office:value="131" calcext:value-type="float">
            <text:p>131</text:p>
          </table:table-cell>
          <table:table-cell office:value-type="string" calcext:value-type="string">
            <text:p>32b1ad22-819c-46dc-8335-61324bd09b60</text:p>
          </table:table-cell>
          <table:table-cell office:value-type="string" calcext:value-type="string">
            <text:p>Kesselhaldenstraße</text:p>
          </table:table-cell>
          <table:table-cell office:value-type="string" calcext:value-type="string">
            <text:p>Kesselhaldenstraße,fire station,number 14,fire</text:p>
          </table:table-cell>
          <table:table-cell office:value-type="string" calcext:value-type="string">
            <text:p><text:s/>Kesselhaldenstraße Leuchtstelle Nummer 14 brennt teilweise.</text:p>
          </table:table-cell>
          <table:table-cell office:value-type="string" calcext:value-type="string">
            <text:p>Kesselhaldenstrasse, Leuchtstelle Nr 14</text:p>
          </table:table-cell>
          <table:table-cell table:style-name="ce79" office:value-type="string" calcext:value-type="string">
            <text:p>brennt teilweise</text:p>
          </table:table-cell>
          <table:table-cell table:style-name="ce79" office:value-type="string" calcext:value-type="string">
            <text:p>null</text:p>
          </table:table-cell>
          <table:table-cell table:style-name="ce88" table:formula="of:=[.F132]&amp;&quot; &quot;&amp;[.G132]" office:value-type="string" office:string-value="Kesselhaldenstrasse, Leuchtstelle Nr 14 brennt teilweise" calcext:value-type="string">
            <text:p>Kesselhaldenstrasse, Leuchtstelle Nr 14 brennt teilweise</text:p>
          </table:table-cell>
          <table:table-cell table:number-columns-repeated="2"/>
          <table:table-cell office:value-type="string" calcext:value-type="string">
            <text:p>x</text:p>
          </table:table-cell>
          <table:table-cell table:number-columns-repeated="2"/>
          <table:table-cell table:style-name="ce96" office:value-type="float" office:value="86" calcext:value-type="float">
            <text:p>86</text:p>
          </table:table-cell>
          <table:table-cell office:value-type="string" calcext:value-type="string">
            <text:p>Strassenbeleuchtung</text:p>
          </table:table-cell>
          <table:table-cell table:style-name="ce99" office:value-type="float" office:value="0.5" calcext:value-type="float">
            <text:p>0.500</text:p>
          </table:table-cell>
          <table:table-cell/>
          <table:table-cell table:style-name="Default" table:number-columns-repeated="16366"/>
        </table:table-row>
        <table:table-row table:style-name="ro6">
          <table:table-cell office:value-type="float" office:value="132" calcext:value-type="float">
            <text:p>132</text:p>
          </table:table-cell>
          <table:table-cell office:value-type="string" calcext:value-type="string">
            <text:p>879cf1dd-9a07-43b0-b1e5-803c11f9d9c0</text:p>
          </table:table-cell>
          <table:table-cell office:value-type="string" calcext:value-type="string">
            <text:p>Ottmarstrasse</text:p>
          </table:table-cell>
          <table:table-cell office:value-type="string" calcext:value-type="string">
            <text:p>Ottmarstrasse,light pole,number 1,street light</text:p>
          </table:table-cell>
          <table:table-cell office:value-type="string" calcext:value-type="string">
            <text:p><text:s/>Ottmarstrasse Leuchtstelle Nummer 1 brennt nicht.</text:p>
          </table:table-cell>
          <table:table-cell office:value-type="string" calcext:value-type="string">
            <text:p>Otmarstrasse, Leuchtstelle Nr 1</text:p>
          </table:table-cell>
          <table:table-cell table:style-name="ce79" office:value-type="string" calcext:value-type="string">
            <text:p>brennt nicht</text:p>
          </table:table-cell>
          <table:table-cell table:style-name="ce79" office:value-type="string" calcext:value-type="string">
            <text:p>a light pole</text:p>
          </table:table-cell>
          <table:table-cell table:style-name="ce88" table:formula="of:=[.F133]&amp;&quot; &quot;&amp;[.G133]" office:value-type="string" office:string-value="Otmarstrasse, Leuchtstelle Nr 1 brennt nicht" calcext:value-type="string">
            <text:p>Otmarstrasse, Leuchtstelle Nr 1 brennt nicht</text:p>
          </table:table-cell>
          <table:table-cell office:value-type="string" calcext:value-type="string">
            <text:p>x</text:p>
          </table:table-cell>
          <table:table-cell table:number-columns-repeated="4"/>
          <table:table-cell table:style-name="ce96" office:value-type="float" office:value="122" calcext:value-type="float">
            <text:p>122</text:p>
          </table:table-cell>
          <table:table-cell office:value-type="string" calcext:value-type="string">
            <text:p>Strassenbeleuchtung</text:p>
          </table:table-cell>
          <table:table-cell table:style-name="ce99" office:value-type="float" office:value="0.5" calcext:value-type="float">
            <text:p>0.500</text:p>
          </table:table-cell>
          <table:table-cell/>
          <table:table-cell table:style-name="Default" table:number-columns-repeated="16366"/>
        </table:table-row>
        <table:table-row table:style-name="ro12">
          <table:table-cell office:value-type="float" office:value="133" calcext:value-type="float">
            <text:p>133</text:p>
          </table:table-cell>
          <table:table-cell office:value-type="string" calcext:value-type="string">
            <text:p>39af3f44-2bc4-452f-88f3-f1d3cb907074</text:p>
          </table:table-cell>
          <table:table-cell office:value-type="string" calcext:value-type="string">
            <text:p>light post</text:p>
          </table:table-cell>
          <table:table-cell office:value-type="string" calcext:value-type="string">
            <text:p>light post,light pole,staircase,sidewalk,building</text:p>
          </table:table-cell>
          <table:table-cell office:value-type="string" calcext:value-type="string">
            <text:p><text:s/>Mattenweg Leuchtstelle Nummer 2 brennt nicht. Es betrifft die Leuchtstelle bei der Treppe auf dem Lachenweg neben dem Wohnblock Turnerstraße 33 90.000 St. Gallen. Dieser ist wenige Meter entfernt von der Leuchtstelle Nummer 2 am Mattenweg.</text:p>
          </table:table-cell>
          <table:table-cell office:value-type="string" calcext:value-type="string">
            <text:p>Mattenweg, Leuchtstelle Nr 2</text:p>
          </table:table-cell>
          <table:table-cell table:style-name="ce79" office:value-type="string" calcext:value-type="string">
            <text:p>brennt nicht Es betrifft die Leuchtstelle bei der Treppe auf dem Lachenweg neben dem Wohnblock Turnerstrasse 33, 9000 St. Gallen. Diese ist wenige Meter entfernt von der Leuchtstelle Nr. 2 am Mattenweg. </text:p>
          </table:table-cell>
          <table:table-cell table:style-name="ce79" office:value-type="string" calcext:value-type="string">
            <text:p>a light post</text:p>
          </table:table-cell>
          <table:table-cell table:style-name="ce88" table:formula="of:=[.F134]&amp;&quot; &quot;&amp;[.G134]" office:value-type="string" office:string-value="Mattenweg, Leuchtstelle Nr 2 brennt nicht Es betrifft die Leuchtstelle bei der Treppe auf dem Lachenweg neben dem Wohnblock Turnerstrasse 33, 9000 St. Gallen. Diese ist wenige Meter entfernt von der Leuchtstelle Nr. 2 am Mattenweg. " calcext:value-type="string">
            <text:p>Mattenweg, Leuchtstelle Nr 2 brennt nicht Es betrifft die Leuchtstelle bei der Treppe auf dem Lachenweg neben dem Wohnblock Turnerstrasse 33, 9000 St. Gallen. Diese ist wenige Meter entfernt von der Leuchtstelle Nr. 2 am Mattenweg. </text:p>
          </table:table-cell>
          <table:table-cell office:value-type="string" calcext:value-type="string">
            <text:p>x</text:p>
          </table:table-cell>
          <table:table-cell table:number-columns-repeated="4"/>
          <table:table-cell table:style-name="ce96" office:value-type="float" office:value="208" calcext:value-type="float">
            <text:p>208</text:p>
          </table:table-cell>
          <table:table-cell office:value-type="string" calcext:value-type="string">
            <text:p>Strassenbeleuchtung</text:p>
          </table:table-cell>
          <table:table-cell table:style-name="ce99" office:value-type="float" office:value="0.222222222222222" calcext:value-type="float">
            <text:p>0.222</text:p>
          </table:table-cell>
          <table:table-cell/>
          <table:table-cell table:style-name="Default" table:number-columns-repeated="16366"/>
        </table:table-row>
        <table:table-row table:style-name="ro26">
          <table:table-cell office:value-type="float" office:value="134" calcext:value-type="float">
            <text:p>134</text:p>
          </table:table-cell>
          <table:table-cell office:value-type="string" calcext:value-type="string">
            <text:p>235ed281-5d42-49a1-b561-6467af53a00f</text:p>
          </table:table-cell>
          <table:table-cell office:value-type="string" calcext:value-type="string">
            <text:p>roomway</text:p>
          </table:table-cell>
          <table:table-cell office:value-type="string" calcext:value-type="string">
            <text:p>roomway,light point number 1,other disturbance,water,candle</text:p>
          </table:table-cell>
          <table:table-cell office:value-type="string" calcext:value-type="string">
            <text:p><text:s/>Zimmerweg, Leuchtstelle Nummer 1, sonstige Störung, Wasser strömt aus dem Kandellaber.</text:p>
          </table:table-cell>
          <table:table-cell office:value-type="string" calcext:value-type="string">
            <text:p>Zimmerweg, Leuchtstelle Nr 1</text:p>
          </table:table-cell>
          <table:table-cell table:style-name="ce86" office:value-type="string" calcext:value-type="string">
            <text:p>sonstige Störung Wasser strömt aus dem Kandelaber</text:p>
            <text:p/>
          </table:table-cell>
          <table:table-cell table:style-name="ce86" office:value-type="string" calcext:value-type="string">
            <text:p>null</text:p>
          </table:table-cell>
          <table:table-cell table:style-name="ce88" table:formula="of:=[.F135]&amp;&quot; &quot;&amp;[.G135]" office:value-type="string" office:string-value="Zimmerweg, Leuchtstelle Nr 1 sonstige Störung Wasser strömt aus dem Kandelaber&#10;" calcext:value-type="string">
            <text:p>Zimmerweg, Leuchtstelle Nr 1 sonstige Störung Wasser strömt aus dem Kandelaber</text:p>
            <text:p/>
          </table:table-cell>
          <table:table-cell table:number-columns-repeated="2"/>
          <table:table-cell office:value-type="string" calcext:value-type="string">
            <text:p>x</text:p>
          </table:table-cell>
          <table:table-cell table:number-columns-repeated="2"/>
          <table:table-cell table:style-name="ce96" office:value-type="float" office:value="92" calcext:value-type="float">
            <text:p>92</text:p>
          </table:table-cell>
          <table:table-cell office:value-type="string" calcext:value-type="string">
            <text:p>Strassenbeleuchtung</text:p>
          </table:table-cell>
          <table:table-cell table:style-name="ce99" office:value-type="float" office:value="0.363636363636364" calcext:value-type="float">
            <text:p>0.364</text:p>
          </table:table-cell>
          <table:table-cell/>
          <table:table-cell table:style-name="Default" table:number-columns-repeated="16366"/>
        </table:table-row>
        <table:table-row table:style-name="ro6">
          <table:table-cell office:value-type="float" office:value="135" calcext:value-type="float">
            <text:p>135</text:p>
          </table:table-cell>
          <table:table-cell office:value-type="string" calcext:value-type="string">
            <text:p>637968d4-8938-4a3f-afb8-6d4b64445f5b</text:p>
          </table:table-cell>
          <table:table-cell office:value-type="string" calcext:value-type="string">
            <text:p>light station number 8</text:p>
          </table:table-cell>
          <table:table-cell office:value-type="string" calcext:value-type="string">
            <text:p>light station number 8,light station,number 8</text:p>
          </table:table-cell>
          <table:table-cell office:value-type="string" calcext:value-type="string">
            <text:p><text:s/>Guisanweg Leuchtstelle Nummer 8 brennt nicht.</text:p>
          </table:table-cell>
          <table:table-cell office:value-type="string" calcext:value-type="string">
            <text:p>Guisanweg, Leuchtstelle Nr 8</text:p>
          </table:table-cell>
          <table:table-cell table:style-name="ce79" office:value-type="string" calcext:value-type="string">
            <text:p>brennt nicht</text:p>
          </table:table-cell>
          <table:table-cell table:style-name="ce79" office:value-type="string" calcext:value-type="string">
            <text:p>null</text:p>
          </table:table-cell>
          <table:table-cell table:style-name="ce88" table:formula="of:=[.F136]&amp;&quot; &quot;&amp;[.G136]" office:value-type="string" office:string-value="Guisanweg, Leuchtstelle Nr 8 brennt nicht" calcext:value-type="string">
            <text:p>Guisanweg, Leuchtstelle Nr 8 brennt nicht</text:p>
          </table:table-cell>
          <table:table-cell table:number-columns-repeated="2"/>
          <table:table-cell office:value-type="string" calcext:value-type="string">
            <text:p>x</text:p>
          </table:table-cell>
          <table:table-cell table:number-columns-repeated="2"/>
          <table:table-cell table:style-name="ce96" office:value-type="float" office:value="89" calcext:value-type="float">
            <text:p>89</text:p>
          </table:table-cell>
          <table:table-cell office:value-type="string" calcext:value-type="string">
            <text:p>Strassenbeleuchtung</text:p>
          </table:table-cell>
          <table:table-cell table:style-name="ce99" office:value-type="float" office:value="0.5" calcext:value-type="float">
            <text:p>0.500</text:p>
          </table:table-cell>
          <table:table-cell/>
          <table:table-cell table:style-name="Default" table:number-columns-repeated="16366"/>
        </table:table-row>
        <table:table-row table:style-name="ro6">
          <table:table-cell office:value-type="float" office:value="136" calcext:value-type="float">
            <text:p>136</text:p>
          </table:table-cell>
          <table:table-cell office:value-type="string" calcext:value-type="string">
            <text:p>e4a278c7-d986-4d39-ba4e-d0c2c0d108a0</text:p>
          </table:table-cell>
          <table:table-cell office:value-type="string" calcext:value-type="string">
            <text:p>Guizhan Wegleuchtstelle</text:p>
          </table:table-cell>
          <table:table-cell office:value-type="string" calcext:value-type="string">
            <text:p>Guizhan Wegleuchtstelle,light pole,number 9</text:p>
          </table:table-cell>
          <table:table-cell office:value-type="string" calcext:value-type="string">
            <text:p><text:s/>Guizhan Wegleuchtstelle Nummer 9 brennt nicht.</text:p>
          </table:table-cell>
          <table:table-cell office:value-type="string" calcext:value-type="string">
            <text:p>Guisanweg, Leuchtstelle Nr 9</text:p>
          </table:table-cell>
          <table:table-cell table:style-name="ce79" office:value-type="string" calcext:value-type="string">
            <text:p>brennt nicht</text:p>
          </table:table-cell>
          <table:table-cell table:style-name="ce79" office:value-type="string" calcext:value-type="string">
            <text:p>a light pole</text:p>
          </table:table-cell>
          <table:table-cell table:style-name="ce88" table:formula="of:=[.F137]&amp;&quot; &quot;&amp;[.G137]" office:value-type="string" office:string-value="Guisanweg, Leuchtstelle Nr 9 brennt nicht" calcext:value-type="string">
            <text:p>Guisanweg, Leuchtstelle Nr 9 brennt nicht</text:p>
          </table:table-cell>
          <table:table-cell office:value-type="string" calcext:value-type="string">
            <text:p>x</text:p>
          </table:table-cell>
          <table:table-cell table:number-columns-repeated="4"/>
          <table:table-cell table:style-name="ce96" office:value-type="float" office:value="137" calcext:value-type="float">
            <text:p>137</text:p>
          </table:table-cell>
          <table:table-cell office:value-type="string" calcext:value-type="string">
            <text:p>Strassenbeleuchtung</text:p>
          </table:table-cell>
          <table:table-cell table:style-name="ce99" office:value-type="float" office:value="0.666666666666667" calcext:value-type="float">
            <text:p>0.667</text:p>
          </table:table-cell>
          <table:table-cell/>
          <table:table-cell table:style-name="Default" table:number-columns-repeated="16366"/>
        </table:table-row>
        <table:table-row table:style-name="ro29">
          <table:table-cell office:value-type="float" office:value="137" calcext:value-type="float">
            <text:p>137</text:p>
          </table:table-cell>
          <table:table-cell office:value-type="string" calcext:value-type="string">
            <text:p>72b7e378-b2c8-47d3-bb7d-94a176ce3b92</text:p>
          </table:table-cell>
          <table:table-cell office:value-type="string" calcext:value-type="string">
            <text:p>field</text:p>
          </table:table-cell>
          <table:table-cell office:value-type="string" calcext:value-type="string">
            <text:p>field,light station number 3,door field</text:p>
          </table:table-cell>
          <table:table-cell office:value-type="string" calcext:value-type="string">
            <text:p><text:s/>Im Feld Leuchtstelle Nummer 3. Türchenfeld ist offen.</text:p>
          </table:table-cell>
          <table:table-cell office:value-type="string" calcext:value-type="string">
            <text:p>Im Feld, Leuchtstelle Nr 3</text:p>
          </table:table-cell>
          <table:table-cell table:style-name="ce79" office:value-type="string" calcext:value-type="string">
            <text:p>Türchen fehlt Ist offen</text:p>
            <text:p/>
          </table:table-cell>
          <table:table-cell table:style-name="ce79" office:value-type="string" calcext:value-type="string">
            <text:p>a light station number 3</text:p>
          </table:table-cell>
          <table:table-cell table:style-name="ce88" table:formula="of:=[.F138]&amp;&quot; &quot;&amp;[.G138]" office:value-type="string" office:string-value="Im Feld, Leuchtstelle Nr 3 Türchen fehlt Ist offen&#10;" calcext:value-type="string">
            <text:p>Im Feld, Leuchtstelle Nr 3 Türchen fehlt Ist offen</text:p>
            <text:p/>
          </table:table-cell>
          <table:table-cell office:value-type="string" calcext:value-type="string">
            <text:p>x</text:p>
          </table:table-cell>
          <table:table-cell table:number-columns-repeated="4"/>
          <table:table-cell table:style-name="ce96" office:value-type="float" office:value="189" calcext:value-type="float">
            <text:p>189</text:p>
          </table:table-cell>
          <table:table-cell office:value-type="string" calcext:value-type="string">
            <text:p>Strassenbeleuchtung</text:p>
          </table:table-cell>
          <table:table-cell table:style-name="ce99" office:value-type="float" office:value="0.777777777777778" calcext:value-type="float">
            <text:p>0.778</text:p>
          </table:table-cell>
          <table:table-cell/>
          <table:table-cell table:style-name="Default" table:number-columns-repeated="16366"/>
        </table:table-row>
        <table:table-row table:style-name="ro26">
          <table:table-cell office:value-type="float" office:value="138" calcext:value-type="float">
            <text:p>138</text:p>
          </table:table-cell>
          <table:table-cell office:value-type="string" calcext:value-type="string">
            <text:p>bb2e8c1e-bbe6-470a-ad0c-92be3154b403</text:p>
          </table:table-cell>
          <table:table-cell office:value-type="string" calcext:value-type="string">
            <text:p>street</text:p>
          </table:table-cell>
          <table:table-cell office:value-type="string" calcext:value-type="string">
            <text:p>street,light,number 2,disturbance</text:p>
          </table:table-cell>
          <table:table-cell office:value-type="string" calcext:value-type="string">
            <text:p><text:s/>Parkstraße Leuchtstelle Nummer 2. Sonstige Störung geht an und aus. Macht was Sie will.</text:p>
          </table:table-cell>
          <table:table-cell office:value-type="string" calcext:value-type="string">
            <text:p>Parkstrasse, Leuchtstelle Nr 2</text:p>
          </table:table-cell>
          <table:table-cell table:style-name="ce79" office:value-type="string" calcext:value-type="string">
            <text:p>sonstige Störung Geht an und aus macht was sie will</text:p>
            <text:p/>
          </table:table-cell>
          <table:table-cell table:style-name="ce79" office:value-type="string" calcext:value-type="string">
            <text:p>a light</text:p>
          </table:table-cell>
          <table:table-cell table:style-name="ce88" table:formula="of:=[.F139]&amp;&quot; &quot;&amp;[.G139]" office:value-type="string" office:string-value="Parkstrasse, Leuchtstelle Nr 2 sonstige Störung Geht an und aus macht was sie will&#10;" calcext:value-type="string">
            <text:p>Parkstrasse, Leuchtstelle Nr 2 sonstige Störung Geht an und aus macht was sie will</text:p>
            <text:p/>
          </table:table-cell>
          <table:table-cell office:value-type="string" calcext:value-type="string">
            <text:p>x</text:p>
          </table:table-cell>
          <table:table-cell table:number-columns-repeated="4"/>
          <table:table-cell table:style-name="ce96" office:value-type="float" office:value="240" calcext:value-type="float">
            <text:p>240</text:p>
          </table:table-cell>
          <table:table-cell office:value-type="string" calcext:value-type="string">
            <text:p>Strassenbeleuchtung</text:p>
          </table:table-cell>
          <table:table-cell table:style-name="ce99" office:value-type="float" office:value="0.642857142857143" calcext:value-type="float">
            <text:p>0.643</text:p>
          </table:table-cell>
          <table:table-cell/>
          <table:table-cell table:style-name="Default" table:number-columns-repeated="16366"/>
        </table:table-row>
        <table:table-row table:style-name="ro14">
          <table:table-cell table:style-name="ce71" office:value-type="float" office:value="139" calcext:value-type="float">
            <text:p>139</text:p>
          </table:table-cell>
          <table:table-cell table:style-name="ce71" office:value-type="string" calcext:value-type="string">
            <text:p>010efc15-7f71-4393-9c6a-c25a319d0b88</text:p>
          </table:table-cell>
          <table:table-cell table:style-name="ce71" office:value-type="string" calcext:value-type="string">
            <text:p>street light number 35</text:p>
          </table:table-cell>
          <table:table-cell table:style-name="ce71" office:value-type="string" calcext:value-type="string">
            <text:p>street light number 35,street intersection,street,light,intersection</text:p>
          </table:table-cell>
          <table:table-cell table:style-name="ce80" office:value-type="string" calcext:value-type="string">
            <text:p><text:s/>Fürstenlandstraße Leuchtestelle Nummer 35 brennt nicht, Abkreuzung Moosstraße leuchtet bis beinahe Haltestelle Waldacker an der Fürstenlandstraße gar nicht mehr.</text:p>
          </table:table-cell>
          <table:table-cell table:style-name="ce71" office:value-type="string" calcext:value-type="string">
            <text:p>Fürstenlandstrasse, Leuchtstelle Nr 35</text:p>
          </table:table-cell>
          <table:table-cell table:style-name="ce80" office:value-type="string" calcext:value-type="string">
            <text:p>brennt nicht Ab Kreuzung Moosstrasse leuchtet bis beinahe Haltestelle Waldacker an der Fürstenlandstrasse gar nicht mehr.</text:p>
            <text:p/>
          </table:table-cell>
          <table:table-cell table:style-name="ce80" office:value-type="string" calcext:value-type="string">
            <text:p>a street</text:p>
          </table:table-cell>
          <table:table-cell table:style-name="ce89" table:formula="of:=[.F140]&amp;&quot; &quot;&amp;[.G140]" office:value-type="string" office:string-value="Fürstenlandstrasse, Leuchtstelle Nr 35 brennt nicht Ab Kreuzung Moosstrasse leuchtet bis beinahe Haltestelle Waldacker an der Fürstenlandstrasse gar nicht mehr.&#10;" calcext:value-type="string">
            <text:p>Fürstenlandstrasse, Leuchtstelle Nr 35 brennt nicht Ab Kreuzung Moosstrasse leuchtet bis beinahe Haltestelle Waldacker an der Fürstenlandstrasse gar nicht mehr.</text:p>
            <text:p/>
          </table:table-cell>
          <table:table-cell table:style-name="ce71" table:number-columns-repeated="3"/>
          <table:table-cell table:style-name="ce71" office:value-type="string" calcext:value-type="string">
            <text:p>x</text:p>
          </table:table-cell>
          <table:table-cell table:style-name="ce71"/>
          <table:table-cell table:style-name="ce97" office:value-type="float" office:value="414" calcext:value-type="float">
            <text:p>414</text:p>
          </table:table-cell>
          <table:table-cell office:value-type="string" calcext:value-type="string">
            <text:p>Strassenbeleuchtung</text:p>
          </table:table-cell>
          <table:table-cell table:style-name="ce30" office:value-type="float" office:value="0.4" calcext:value-type="float">
            <text:p>0.400</text:p>
          </table:table-cell>
          <table:table-cell/>
          <table:table-cell table:style-name="ce71" table:number-columns-repeated="16366"/>
        </table:table-row>
        <table:table-row table:style-name="ro19">
          <table:table-cell office:value-type="float" office:value="140" calcext:value-type="float">
            <text:p>140</text:p>
          </table:table-cell>
          <table:table-cell office:value-type="string" calcext:value-type="string">
            <text:p>2ea6ea0f-312f-4148-96d4-66a411c01866</text:p>
          </table:table-cell>
          <table:table-cell office:value-type="string" calcext:value-type="string">
            <text:p>light</text:p>
          </table:table-cell>
          <table:table-cell office:value-type="string" calcext:value-type="string">
            <text:p>light,glass,light fixture,glass,storm</text:p>
          </table:table-cell>
          <table:table-cell office:value-type="string" calcext:value-type="string">
            <text:p><text:s/>Von Wildstraße Leuchtstelle Nummer 9. Leuchte Glas zerstört. Soeben ist das Glas während dem heftigen Sturm zur Hälfte abgebrochen und droht herunterzufallen.</text:p>
          </table:table-cell>
          <table:table-cell office:value-type="string" calcext:value-type="string">
            <text:p>Vonwilstrasse, Leuchtstelle Nr 9</text:p>
          </table:table-cell>
          <table:table-cell table:style-name="ce79" office:value-type="string" calcext:value-type="string">
            <text:p>Leuchte/Glas zerstört, fehlt Soeben ist das Glas während dem heftigen Sturm zur Hälfte abgebrochen und droht herunterzufallen</text:p>
          </table:table-cell>
          <table:table-cell table:style-name="ce79" office:value-type="string" calcext:value-type="string">
            <text:p>a light</text:p>
          </table:table-cell>
          <table:table-cell table:style-name="ce88" table:formula="of:=[.F141]&amp;&quot; &quot;&amp;[.G141]" office:value-type="string" office:string-value="Vonwilstrasse, Leuchtstelle Nr 9 Leuchte/Glas zerstört, fehlt Soeben ist das Glas während dem heftigen Sturm zur Hälfte abgebrochen und droht herunterzufallen" calcext:value-type="string">
            <text:p>Vonwilstrasse, Leuchtstelle Nr 9 Leuchte/Glas zerstört, fehlt Soeben ist das Glas während dem heftigen Sturm zur Hälfte abgebrochen und droht herunterzufallen</text:p>
          </table:table-cell>
          <table:table-cell office:value-type="string" calcext:value-type="string">
            <text:p>x</text:p>
          </table:table-cell>
          <table:table-cell table:number-columns-repeated="4"/>
          <table:table-cell table:style-name="ce96" office:value-type="float" office:value="348" calcext:value-type="float">
            <text:p>348</text:p>
          </table:table-cell>
          <table:table-cell office:value-type="string" calcext:value-type="string">
            <text:p>Strassenbeleuchtung</text:p>
          </table:table-cell>
          <table:table-cell table:style-name="ce99" office:value-type="float" office:value="0.380952380952381" calcext:value-type="float">
            <text:p>0.381</text:p>
          </table:table-cell>
          <table:table-cell/>
          <table:table-cell table:style-name="Default" table:number-columns-repeated="16366"/>
        </table:table-row>
        <table:table-row table:style-name="ro6">
          <table:table-cell office:value-type="float" office:value="141" calcext:value-type="float">
            <text:p>141</text:p>
          </table:table-cell>
          <table:table-cell office:value-type="string" calcext:value-type="string">
            <text:p>61f740a3-0fb4-49ba-b8c0-61023ceeea11</text:p>
          </table:table-cell>
          <table:table-cell office:value-type="string" calcext:value-type="string">
            <text:p>Stückelbergstrasse</text:p>
          </table:table-cell>
          <table:table-cell office:value-type="string" calcext:value-type="string">
            <text:p>Stückelbergstrasse,Leuchtstelle Nummer 3,street,location</text:p>
          </table:table-cell>
          <table:table-cell office:value-type="string" calcext:value-type="string">
            <text:p><text:s/>Stückelbergstrasse Leuchtstelle Nummer 3 brennt nicht.</text:p>
          </table:table-cell>
          <table:table-cell office:value-type="string" calcext:value-type="string">
            <text:p>Stückelbergstrasse, Leuchtstelle Nr 3</text:p>
          </table:table-cell>
          <table:table-cell table:style-name="ce79" office:value-type="string" calcext:value-type="string">
            <text:p>brennt nicht</text:p>
          </table:table-cell>
          <table:table-cell table:style-name="ce79" office:value-type="string" calcext:value-type="string">
            <text:p>null</text:p>
          </table:table-cell>
          <table:table-cell table:style-name="ce88" table:formula="of:=[.F142]&amp;&quot; &quot;&amp;[.G142]" office:value-type="string" office:string-value="Stückelbergstrasse, Leuchtstelle Nr 3 brennt nicht" calcext:value-type="string">
            <text:p>Stückelbergstrasse, Leuchtstelle Nr 3 brennt nicht</text:p>
          </table:table-cell>
          <table:table-cell table:number-columns-repeated="2"/>
          <table:table-cell office:value-type="string" calcext:value-type="string">
            <text:p>x</text:p>
          </table:table-cell>
          <table:table-cell table:number-columns-repeated="2"/>
          <table:table-cell table:style-name="ce96" office:value-type="float" office:value="89" calcext:value-type="float">
            <text:p>89</text:p>
          </table:table-cell>
          <table:table-cell office:value-type="string" calcext:value-type="string">
            <text:p>Strassenbeleuchtung</text:p>
          </table:table-cell>
          <table:table-cell table:style-name="ce99" office:value-type="float" office:value="0.5" calcext:value-type="float">
            <text:p>0.500</text:p>
          </table:table-cell>
          <table:table-cell/>
          <table:table-cell table:style-name="Default" table:number-columns-repeated="16366"/>
        </table:table-row>
        <table:table-row table:style-name="ro29">
          <table:table-cell office:value-type="float" office:value="142" calcext:value-type="float">
            <text:p>142</text:p>
          </table:table-cell>
          <table:table-cell office:value-type="string" calcext:value-type="string">
            <text:p>67d635c8-37e7-4eaf-b03b-6b7464336ae2</text:p>
          </table:table-cell>
          <table:table-cell office:value-type="string" calcext:value-type="string">
            <text:p>street</text:p>
          </table:table-cell>
          <table:table-cell office:value-type="string" calcext:value-type="string">
            <text:p>street,Huttenwiesstraße,number nine,building</text:p>
          </table:table-cell>
          <table:table-cell office:value-type="string" calcext:value-type="string">
            <text:p><text:s/>Hüttenwiesstraße leuchtet, Stelle Nummer 9, brennt nicht seit ca. 2 Wochen.</text:p>
          </table:table-cell>
          <table:table-cell office:value-type="string" calcext:value-type="string">
            <text:p>Hüttenwiesstrasse, Leuchtstelle Nr 9</text:p>
          </table:table-cell>
          <table:table-cell table:style-name="ce79" office:value-type="string" calcext:value-type="string">
            <text:p>brennt nicht Seit ca. 2 Wochen</text:p>
          </table:table-cell>
          <table:table-cell table:style-name="ce79" office:value-type="string" calcext:value-type="string">
            <text:p>null</text:p>
          </table:table-cell>
          <table:table-cell table:style-name="ce88" table:formula="of:=[.F143]&amp;&quot; &quot;&amp;[.G143]" office:value-type="string" office:string-value="Hüttenwiesstrasse, Leuchtstelle Nr 9 brennt nicht Seit ca. 2 Wochen" calcext:value-type="string">
            <text:p>Hüttenwiesstrasse, Leuchtstelle Nr 9 brennt nicht Seit ca. 2 Wochen</text:p>
          </table:table-cell>
          <table:table-cell table:number-columns-repeated="2"/>
          <table:table-cell office:value-type="string" calcext:value-type="string">
            <text:p>x</text:p>
          </table:table-cell>
          <table:table-cell table:number-columns-repeated="2"/>
          <table:table-cell table:style-name="ce96" office:value-type="float" office:value="98" calcext:value-type="float">
            <text:p>98</text:p>
          </table:table-cell>
          <table:table-cell office:value-type="string" calcext:value-type="string">
            <text:p>Strassenbeleuchtung</text:p>
          </table:table-cell>
          <table:table-cell table:style-name="ce99" office:value-type="float" office:value="0.7" calcext:value-type="float">
            <text:p>0.700</text:p>
          </table:table-cell>
          <table:table-cell/>
          <table:table-cell table:style-name="Default" table:number-columns-repeated="16366"/>
        </table:table-row>
        <table:table-row table:style-name="ro6">
          <table:table-cell office:value-type="float" office:value="143" calcext:value-type="float">
            <text:p>143</text:p>
          </table:table-cell>
          <table:table-cell office:value-type="string" calcext:value-type="string">
            <text:p>20586053-bc78-4c9b-8542-cd2588243e3d</text:p>
          </table:table-cell>
          <table:table-cell office:value-type="string" calcext:value-type="string">
            <text:p>Wadianstraße</text:p>
          </table:table-cell>
          <table:table-cell office:value-type="string" calcext:value-type="string">
            <text:p>Wadianstraße,Leuchtstelle,number 19,Türchenfeld</text:p>
          </table:table-cell>
          <table:table-cell office:value-type="string" calcext:value-type="string">
            <text:p><text:s/>Wadianstraße Leuchtstelle Nummer 19, Türchenfeld.</text:p>
          </table:table-cell>
          <table:table-cell office:value-type="string" calcext:value-type="string">
            <text:p>Vadianstrasse, Leuchtstelle Nr 19</text:p>
          </table:table-cell>
          <table:table-cell table:style-name="ce79" office:value-type="string" calcext:value-type="string">
            <text:p>Türchen fehlt</text:p>
          </table:table-cell>
          <table:table-cell table:style-name="ce79" office:value-type="string" calcext:value-type="string">
            <text:p>null</text:p>
          </table:table-cell>
          <table:table-cell table:style-name="ce88" table:formula="of:=[.F144]&amp;&quot; &quot;&amp;[.G144]" office:value-type="string" office:string-value="Vadianstrasse, Leuchtstelle Nr 19 Türchen fehlt" calcext:value-type="string">
            <text:p>Vadianstrasse, Leuchtstelle Nr 19 Türchen fehlt</text:p>
          </table:table-cell>
          <table:table-cell table:number-columns-repeated="2"/>
          <table:table-cell office:value-type="string" calcext:value-type="string">
            <text:p>x</text:p>
          </table:table-cell>
          <table:table-cell table:number-columns-repeated="2"/>
          <table:table-cell table:style-name="ce96" office:value-type="float" office:value="98" calcext:value-type="float">
            <text:p>98</text:p>
          </table:table-cell>
          <table:table-cell office:value-type="string" calcext:value-type="string">
            <text:p>Strassenbeleuchtung</text:p>
          </table:table-cell>
          <table:table-cell table:style-name="ce99" office:value-type="float" office:value="0.833333333333333" calcext:value-type="float">
            <text:p>0.833</text:p>
          </table:table-cell>
          <table:table-cell/>
          <table:table-cell table:style-name="Default" table:number-columns-repeated="16366"/>
        </table:table-row>
        <table:table-row table:style-name="ro26">
          <table:table-cell office:value-type="float" office:value="144" calcext:value-type="float">
            <text:p>144</text:p>
          </table:table-cell>
          <table:table-cell office:value-type="string" calcext:value-type="string">
            <text:p>6e67368d-063d-435e-b99d-8dc691469393</text:p>
          </table:table-cell>
          <table:table-cell office:value-type="string" calcext:value-type="string">
            <text:p>street light</text:p>
          </table:table-cell>
          <table:table-cell office:value-type="string" calcext:value-type="string">
            <text:p>street light,lamp,light</text:p>
          </table:table-cell>
          <table:table-cell office:value-type="string" calcext:value-type="string">
            <text:p><text:s/>Eschenstraße Leuchtstellen Nummer 1 brennt nicht, die Lampe brennt nicht.</text:p>
          </table:table-cell>
          <table:table-cell office:value-type="string" calcext:value-type="string">
            <text:p>Eschenstrasse, Leuchtstelle Nr 1</text:p>
          </table:table-cell>
          <table:table-cell table:style-name="ce79" office:value-type="string" calcext:value-type="string">
            <text:p>brennt nicht Die Lampe brennt nicht.</text:p>
            <text:p/>
          </table:table-cell>
          <table:table-cell table:style-name="ce79" office:value-type="string" calcext:value-type="string">
            <text:p>a street light</text:p>
          </table:table-cell>
          <table:table-cell table:style-name="ce88" table:formula="of:=[.F145]&amp;&quot; &quot;&amp;[.G145]" office:value-type="string" office:string-value="Eschenstrasse, Leuchtstelle Nr 1 brennt nicht Die Lampe brennt nicht.&#10;" calcext:value-type="string">
            <text:p>Eschenstrasse, Leuchtstelle Nr 1 brennt nicht Die Lampe brennt nicht.</text:p>
            <text:p/>
          </table:table-cell>
          <table:table-cell office:value-type="string" calcext:value-type="string">
            <text:p>x</text:p>
          </table:table-cell>
          <table:table-cell table:number-columns-repeated="4"/>
          <table:table-cell table:style-name="ce96" office:value-type="float" office:value="116" calcext:value-type="float">
            <text:p>116</text:p>
          </table:table-cell>
          <table:table-cell office:value-type="string" calcext:value-type="string">
            <text:p>Strassenbeleuchtung</text:p>
          </table:table-cell>
          <table:table-cell table:style-name="ce99" office:value-type="float" office:value="0.5" calcext:value-type="float">
            <text:p>0.500</text:p>
          </table:table-cell>
          <table:table-cell/>
          <table:table-cell table:style-name="Default" table:number-columns-repeated="16366"/>
        </table:table-row>
        <table:table-row table:style-name="ro30">
          <table:table-cell office:value-type="float" office:value="145" calcext:value-type="float">
            <text:p>145</text:p>
          </table:table-cell>
          <table:table-cell office:value-type="string" calcext:value-type="string">
            <text:p>dfd5cc1d-c1bd-4195-a299-35bd403932b7</text:p>
          </table:table-cell>
          <table:table-cell office:value-type="string" calcext:value-type="string">
            <text:p>street lamp</text:p>
          </table:table-cell>
          <table:table-cell office:value-type="string" calcext:value-type="string">
            <text:p>street lamp,street light,street,light,traffic light</text:p>
          </table:table-cell>
          <table:table-cell office:value-type="string" calcext:value-type="string">
            <text:p><text:s/>Judy-Strasse, Leuchtstelle Nummer 7, brennt nicht. Strassenlampe 6 bis 8 an der Judy-Strasse funktioniert schon wieder nicht.</text:p>
          </table:table-cell>
          <table:table-cell office:value-type="string" calcext:value-type="string">
            <text:p>Tschudistrasse, Leuchtstelle Nr 7</text:p>
          </table:table-cell>
          <table:table-cell table:style-name="ce79" office:value-type="string" calcext:value-type="string">
            <text:p>brennt nicht Strassenlampen Nr. 6 - 8 an der Tschudistrasse funktionieren schon wieder nicht </text:p>
          </table:table-cell>
          <table:table-cell table:style-name="ce79" office:value-type="string" calcext:value-type="string">
            <text:p>a street lamp</text:p>
          </table:table-cell>
          <table:table-cell table:style-name="ce88" table:formula="of:=[.F146]&amp;&quot; &quot;&amp;[.G146]" office:value-type="string" office:string-value="Tschudistrasse, Leuchtstelle Nr 7 brennt nicht Strassenlampen Nr. 6 - 8 an der Tschudistrasse funktionieren schon wieder nicht " calcext:value-type="string">
            <text:p>Tschudistrasse, Leuchtstelle Nr 7 brennt nicht Strassenlampen Nr. 6 - 8 an der Tschudistrasse funktionieren schon wieder nicht </text:p>
          </table:table-cell>
          <table:table-cell office:value-type="string" calcext:value-type="string">
            <text:p>x</text:p>
          </table:table-cell>
          <table:table-cell table:number-columns-repeated="4"/>
          <table:table-cell table:style-name="ce96" office:value-type="float" office:value="177" calcext:value-type="float">
            <text:p>177</text:p>
          </table:table-cell>
          <table:table-cell office:value-type="string" calcext:value-type="string">
            <text:p>Strassenbeleuchtung</text:p>
          </table:table-cell>
          <table:table-cell table:style-name="ce99" office:value-type="float" office:value="0.555555555555556" calcext:value-type="float">
            <text:p>0.556</text:p>
          </table:table-cell>
          <table:table-cell/>
          <table:table-cell table:style-name="Default" table:number-columns-repeated="16366"/>
        </table:table-row>
        <table:table-row table:style-name="ro6">
          <table:table-cell office:value-type="float" office:value="146" calcext:value-type="float">
            <text:p>146</text:p>
          </table:table-cell>
          <table:table-cell office:value-type="string" calcext:value-type="string">
            <text:p>69b23d51-d58a-454e-a80e-40905880a32e</text:p>
          </table:table-cell>
          <table:table-cell office:value-type="string" calcext:value-type="string">
            <text:p>light</text:p>
          </table:table-cell>
          <table:table-cell office:value-type="string" calcext:value-type="string">
            <text:p>light,lamp,glass,light fixture</text:p>
          </table:table-cell>
          <table:table-cell office:value-type="string" calcext:value-type="string">
            <text:p><text:s/>Magni Halden 14 Leuchte Glas zerstört fehlt.</text:p>
          </table:table-cell>
          <table:table-cell office:value-type="string" calcext:value-type="string">
            <text:p>Magnihalden 14</text:p>
          </table:table-cell>
          <table:table-cell table:style-name="ce79" office:value-type="string" calcext:value-type="string">
            <text:p>Leuchte/Glas zerstört, fehlt</text:p>
          </table:table-cell>
          <table:table-cell table:style-name="ce79" office:value-type="string" calcext:value-type="string">
            <text:p>a light</text:p>
          </table:table-cell>
          <table:table-cell table:style-name="ce88" table:formula="of:=[.F147]&amp;&quot; &quot;&amp;[.G147]" office:value-type="string" office:string-value="Magnihalden 14 Leuchte/Glas zerstört, fehlt" calcext:value-type="string">
            <text:p>Magnihalden 14 Leuchte/Glas zerstört, fehlt</text:p>
          </table:table-cell>
          <table:table-cell office:value-type="string" calcext:value-type="string">
            <text:p>x</text:p>
          </table:table-cell>
          <table:table-cell table:number-columns-repeated="4"/>
          <table:table-cell table:style-name="ce96" office:value-type="float" office:value="193" calcext:value-type="float">
            <text:p>193</text:p>
          </table:table-cell>
          <table:table-cell office:value-type="string" calcext:value-type="string">
            <text:p>Strassenbeleuchtung</text:p>
          </table:table-cell>
          <table:table-cell table:style-name="ce99" office:value-type="float" office:value="1.2" calcext:value-type="float">
            <text:p>1.200</text:p>
          </table:table-cell>
          <table:table-cell/>
          <table:table-cell table:style-name="Default" table:number-columns-repeated="16366"/>
        </table:table-row>
        <table:table-row table:style-name="ro26">
          <table:table-cell office:value-type="float" office:value="147" calcext:value-type="float">
            <text:p>147</text:p>
          </table:table-cell>
          <table:table-cell office:value-type="string" calcext:value-type="string">
            <text:p>625427df-9538-405d-92e9-85233d559e97</text:p>
          </table:table-cell>
          <table:table-cell office:value-type="string" calcext:value-type="string">
            <text:p>street</text:p>
          </table:table-cell>
          <table:table-cell office:value-type="string" calcext:value-type="string">
            <text:p>street,St. Josefenstraße,light,light bulb,glass</text:p>
          </table:table-cell>
          <table:table-cell office:value-type="string" calcext:value-type="string">
            <text:p><text:s/>St. Josefenstraße, Leuchtstelle Nummer 40, Leuchteglas zerstört. Sieht gefährlich aus.</text:p>
          </table:table-cell>
          <table:table-cell office:value-type="string" calcext:value-type="string">
            <text:p>St.Josefenstrasse, Leuchtstelle Nr 40</text:p>
          </table:table-cell>
          <table:table-cell table:style-name="ce79" office:value-type="string" calcext:value-type="string">
            <text:p>Leuchte/Glas zerstört, fehlt Sieht gefährlich aus...</text:p>
            <text:p/>
          </table:table-cell>
          <table:table-cell table:style-name="ce79" office:value-type="string" calcext:value-type="string">
            <text:p>a light</text:p>
          </table:table-cell>
          <table:table-cell table:style-name="ce88" table:formula="of:=[.F148]&amp;&quot; &quot;&amp;[.G148]" office:value-type="string" office:string-value="St.Josefenstrasse, Leuchtstelle Nr 40 Leuchte/Glas zerstört, fehlt Sieht gefährlich aus...&#10;" calcext:value-type="string">
            <text:p>St.Josefenstrasse, Leuchtstelle Nr 40 Leuchte/Glas zerstört, fehlt Sieht gefährlich aus...</text:p>
            <text:p/>
          </table:table-cell>
          <table:table-cell office:value-type="string" calcext:value-type="string">
            <text:p>x</text:p>
          </table:table-cell>
          <table:table-cell table:number-columns-repeated="4"/>
          <table:table-cell table:style-name="ce96" office:value-type="float" office:value="365" calcext:value-type="float">
            <text:p>365</text:p>
          </table:table-cell>
          <table:table-cell office:value-type="string" calcext:value-type="string">
            <text:p>Strassenbeleuchtung</text:p>
          </table:table-cell>
          <table:table-cell table:style-name="ce99" office:value-type="float" office:value="0.8" calcext:value-type="float">
            <text:p>0.800</text:p>
          </table:table-cell>
          <table:table-cell/>
          <table:table-cell table:style-name="Default" table:number-columns-repeated="16366"/>
        </table:table-row>
        <table:table-row table:style-name="ro6">
          <table:table-cell office:value-type="float" office:value="148" calcext:value-type="float">
            <text:p>148</text:p>
          </table:table-cell>
          <table:table-cell office:value-type="string" calcext:value-type="string">
            <text:p>312dd9a8-d708-4714-8450-762c8bcd8410</text:p>
          </table:table-cell>
          <table:table-cell office:value-type="string" calcext:value-type="string">
            <text:p>Swanstraße</text:p>
          </table:table-cell>
          <table:table-cell office:value-type="string" calcext:value-type="string">
            <text:p>Swanstraße,light station,number 1</text:p>
          </table:table-cell>
          <table:table-cell office:value-type="string" calcext:value-type="string">
            <text:p><text:s/>Schwanenstraße Leuchtstelle Nummer 1 brennt nicht.</text:p>
          </table:table-cell>
          <table:table-cell office:value-type="string" calcext:value-type="string">
            <text:p>Schwanenstrasse, Leuchtstelle Nr 1</text:p>
          </table:table-cell>
          <table:table-cell table:style-name="ce79" office:value-type="string" calcext:value-type="string">
            <text:p>brennt nicht</text:p>
          </table:table-cell>
          <table:table-cell table:style-name="ce79" office:value-type="string" calcext:value-type="string">
            <text:p>null</text:p>
          </table:table-cell>
          <table:table-cell table:style-name="ce88" table:formula="of:=[.F149]&amp;&quot; &quot;&amp;[.G149]" office:value-type="string" office:string-value="Schwanenstrasse, Leuchtstelle Nr 1 brennt nicht" calcext:value-type="string">
            <text:p>Schwanenstrasse, Leuchtstelle Nr 1 brennt nicht</text:p>
          </table:table-cell>
          <table:table-cell table:number-columns-repeated="2"/>
          <table:table-cell office:value-type="string" calcext:value-type="string">
            <text:p>x</text:p>
          </table:table-cell>
          <table:table-cell table:number-columns-repeated="2"/>
          <table:table-cell table:style-name="ce96" office:value-type="float" office:value="96" calcext:value-type="float">
            <text:p>96</text:p>
          </table:table-cell>
          <table:table-cell office:value-type="string" calcext:value-type="string">
            <text:p>Strassenbeleuchtung</text:p>
          </table:table-cell>
          <table:table-cell table:style-name="ce99" office:value-type="float" office:value="0.5" calcext:value-type="float">
            <text:p>0.500</text:p>
          </table:table-cell>
          <table:table-cell/>
          <table:table-cell table:style-name="Default" table:number-columns-repeated="16366"/>
        </table:table-row>
        <table:table-row table:style-name="ro6">
          <table:table-cell office:value-type="float" office:value="149" calcext:value-type="float">
            <text:p>149</text:p>
          </table:table-cell>
          <table:table-cell office:value-type="string" calcext:value-type="string">
            <text:p>2fd02aa1-ba2f-4bce-a762-be0e6fc4aa5e</text:p>
          </table:table-cell>
          <table:table-cell office:value-type="string" calcext:value-type="string">
            <text:p>city park</text:p>
          </table:table-cell>
          <table:table-cell office:value-type="string" calcext:value-type="string">
            <text:p>city park,light,lamp,light fixture</text:p>
          </table:table-cell>
          <table:table-cell office:value-type="string" calcext:value-type="string">
            <text:p><text:s/>Stadtpark Leuchtstelle Nummer 3 brennt nicht, Lampe defekt.</text:p>
          </table:table-cell>
          <table:table-cell office:value-type="string" calcext:value-type="string">
            <text:p>Stadtpark, Leuchtstelle Nr 3</text:p>
          </table:table-cell>
          <table:table-cell table:style-name="ce79" office:value-type="string" calcext:value-type="string">
            <text:p>brennt nicht Lampe defekt</text:p>
          </table:table-cell>
          <table:table-cell table:style-name="ce79" office:value-type="string" calcext:value-type="string">
            <text:p>a light</text:p>
          </table:table-cell>
          <table:table-cell table:style-name="ce88" table:formula="of:=[.F150]&amp;&quot; &quot;&amp;[.G150]" office:value-type="string" office:string-value="Stadtpark, Leuchtstelle Nr 3 brennt nicht Lampe defekt" calcext:value-type="string">
            <text:p>Stadtpark, Leuchtstelle Nr 3 brennt nicht Lampe defekt</text:p>
          </table:table-cell>
          <table:table-cell office:value-type="string" calcext:value-type="string">
            <text:p>x</text:p>
          </table:table-cell>
          <table:table-cell table:number-columns-repeated="4"/>
          <table:table-cell table:style-name="ce96" office:value-type="float" office:value="226" calcext:value-type="float">
            <text:p>226</text:p>
          </table:table-cell>
          <table:table-cell office:value-type="string" calcext:value-type="string">
            <text:p>Strassenbeleuchtung</text:p>
          </table:table-cell>
          <table:table-cell table:style-name="ce99" office:value-type="float" office:value="0.5" calcext:value-type="float">
            <text:p>0.500</text:p>
          </table:table-cell>
          <table:table-cell/>
          <table:table-cell table:style-name="Default" table:number-columns-repeated="16366"/>
        </table:table-row>
        <table:table-row table:style-name="ro3">
          <table:table-cell office:value-type="float" office:value="150" calcext:value-type="float">
            <text:p>150</text:p>
          </table:table-cell>
          <table:table-cell office:value-type="string" calcext:value-type="string">
            <text:p>d8efd1c6-5344-4598-ad2c-c127dc012bab</text:p>
          </table:table-cell>
          <table:table-cell office:value-type="string" calcext:value-type="string">
            <text:p>street section</text:p>
          </table:table-cell>
          <table:table-cell office:value-type="string" calcext:value-type="string">
            <text:p>street section,lighting,street,traffic light</text:p>
          </table:table-cell>
          <table:table-cell office:value-type="string" calcext:value-type="string">
            <text:p><text:s/>Nordkehrstraße 20 sonstige Störung Beleuchtung des ganzen Straßenabschnitts brennt zu und Zeiten.</text:p>
          </table:table-cell>
          <table:table-cell office:value-type="string" calcext:value-type="string">
            <text:p>Notkerstrasse 20</text:p>
          </table:table-cell>
          <table:table-cell table:style-name="ce79" office:value-type="string" calcext:value-type="string">
            <text:p>sonstige Störung Beleuchtung des ganzen Strassenabschnitts brennt zu Unzeiten.</text:p>
          </table:table-cell>
          <table:table-cell table:style-name="ce79" office:value-type="string" calcext:value-type="string">
            <text:p>a lighting</text:p>
          </table:table-cell>
          <table:table-cell table:style-name="ce88" table:formula="of:=[.F151]&amp;&quot; &quot;&amp;[.G151]" office:value-type="string" office:string-value="Notkerstrasse 20 sonstige Störung Beleuchtung des ganzen Strassenabschnitts brennt zu Unzeiten." calcext:value-type="string">
            <text:p>Notkerstrasse 20 sonstige Störung Beleuchtung des ganzen Strassenabschnitts brennt zu Unzeiten.</text:p>
          </table:table-cell>
          <table:table-cell office:value-type="string" calcext:value-type="string">
            <text:p>x</text:p>
          </table:table-cell>
          <table:table-cell table:number-columns-repeated="4"/>
          <table:table-cell table:style-name="ce96" office:value-type="float" office:value="261" calcext:value-type="float">
            <text:p>261</text:p>
          </table:table-cell>
          <table:table-cell office:value-type="string" calcext:value-type="string">
            <text:p>Strassenbeleuchtung</text:p>
          </table:table-cell>
          <table:table-cell table:style-name="ce99" office:value-type="float" office:value="0.363636363636364" calcext:value-type="float">
            <text:p>0.364</text:p>
          </table:table-cell>
          <table:table-cell/>
          <table:table-cell table:style-name="Default" table:number-columns-repeated="16366"/>
        </table:table-row>
        <table:table-row table:style-name="ro5">
          <table:table-cell office:value-type="float" office:value="151" calcext:value-type="float">
            <text:p>151</text:p>
          </table:table-cell>
          <table:table-cell office:value-type="string" calcext:value-type="string">
            <text:p>3d9b0578-2a0f-418f-b27f-0e2808b009b2</text:p>
          </table:table-cell>
          <table:table-cell office:value-type="string" calcext:value-type="string">
            <text:p>pothole</text:p>
          </table:table-cell>
          <table:table-cell office:value-type="string" calcext:value-type="string">
            <text:p>pothole,street,St. Jürgenstrasse,house number,road</text:p>
          </table:table-cell>
          <table:table-cell office:value-type="string" calcext:value-type="string">
            <text:p><text:s/>Schlagloch St. Jürgenstrasse 100. Sehr geehrte Damen und Herren, Schlagloch St. Jürgenstrasse Höhe, Hausnummer 100, Fahrt Richtung Bach. Vielen Dank fürs Reparieren. Freundliche Grüße.</text:p>
          </table:table-cell>
          <table:table-cell office:value-type="string" calcext:value-type="string">
            <text:p>Schlagloch St.Georgenstrasse 100</text:p>
          </table:table-cell>
          <table:table-cell table:style-name="ce79" office:value-type="string" calcext:value-type="string">
            <text:p>Sehr geehrte Damen und Herren Schlagloch St.Georgenstrasse, Höhe HausNr 100, Fahrtrichtung „Bach“ Vielen Dank fürs Reparieren. Freundliche Grüsse</text:p>
          </table:table-cell>
          <table:table-cell table:style-name="ce79" office:value-type="string" calcext:value-type="string">
            <text:p>a street</text:p>
          </table:table-cell>
          <table:table-cell table:style-name="ce88" table:formula="of:=[.F152]&amp;&quot; &quot;&amp;[.G152]" office:value-type="string" office:string-value="Schlagloch St.Georgenstrasse 100 Sehr geehrte Damen und Herren Schlagloch St.Georgenstrasse, Höhe HausNr 100, Fahrtrichtung „Bach“ Vielen Dank fürs Reparieren. Freundliche Grüsse" calcext:value-type="string">
            <text:p>Schlagloch St.Georgenstrasse 100 Sehr geehrte Damen und Herren Schlagloch St.Georgenstrasse, Höhe HausNr 100, Fahrtrichtung „Bach“ Vielen Dank fürs Reparieren. Freundliche Grüsse</text:p>
          </table:table-cell>
          <table:table-cell table:number-columns-repeated="4"/>
          <table:table-cell office:value-type="string" calcext:value-type="string">
            <text:p>x</text:p>
          </table:table-cell>
          <table:table-cell table:style-name="ce96" office:value-type="float" office:value="244" calcext:value-type="float">
            <text:p>244</text:p>
          </table:table-cell>
          <table:table-cell office:value-type="string" calcext:value-type="string">
            <text:p>Strassenschäden</text:p>
          </table:table-cell>
          <table:table-cell table:style-name="ce99" office:value-type="float" office:value="0.571428571428571" calcext:value-type="float">
            <text:p>0.571</text:p>
          </table:table-cell>
          <table:table-cell/>
          <table:table-cell table:style-name="Default" table:number-columns-repeated="16366"/>
        </table:table-row>
        <table:table-row table:style-name="ro30">
          <table:table-cell office:value-type="float" office:value="152" calcext:value-type="float">
            <text:p>152</text:p>
          </table:table-cell>
          <table:table-cell office:value-type="string" calcext:value-type="string">
            <text:p>0b07ff7e-f45e-413c-8b1d-44f5bdaae92c</text:p>
          </table:table-cell>
          <table:table-cell office:value-type="string" calcext:value-type="string">
            <text:p>road damage</text:p>
          </table:table-cell>
          <table:table-cell office:value-type="string" calcext:value-type="string">
            <text:p>road damage,sidewalk,stroller,part of the road</text:p>
          </table:table-cell>
          <table:table-cell office:value-type="string" calcext:value-type="string">
            <text:p><text:s/>Strassenbeschädigung. Es ist sehr mühsam mit dem Kinderwagen zu fahren, da ein Teil von der Strasse beschädigt ist.</text:p>
          </table:table-cell>
          <table:table-cell office:value-type="string" calcext:value-type="string">
            <text:p>Strassenbeschädigung</text:p>
          </table:table-cell>
          <table:table-cell table:style-name="ce79" office:value-type="string" calcext:value-type="string">
            <text:p>Es ist sehr mühsam mit Kinderwagen zu fahren da ein Teil von der Strasse beschädigt ist</text:p>
          </table:table-cell>
          <table:table-cell table:style-name="ce79" office:value-type="string" calcext:value-type="string">
            <text:p>a sidewalk</text:p>
          </table:table-cell>
          <table:table-cell table:style-name="ce88" table:formula="of:=[.F153]&amp;&quot; &quot;&amp;[.G153]" office:value-type="string" office:string-value="Strassenbeschädigung Es ist sehr mühsam mit Kinderwagen zu fahren da ein Teil von der Strasse beschädigt ist" calcext:value-type="string">
            <text:p>Strassenbeschädigung Es ist sehr mühsam mit Kinderwagen zu fahren da ein Teil von der Strasse beschädigt ist</text:p>
          </table:table-cell>
          <table:table-cell office:value-type="string" calcext:value-type="string">
            <text:p>x</text:p>
          </table:table-cell>
          <table:table-cell table:number-columns-repeated="4"/>
          <table:table-cell table:style-name="ce96" office:value-type="float" office:value="187" calcext:value-type="float">
            <text:p>187</text:p>
          </table:table-cell>
          <table:table-cell office:value-type="string" calcext:value-type="string">
            <text:p>Strassenschäden</text:p>
          </table:table-cell>
          <table:table-cell table:style-name="ce99" office:value-type="float" office:value="0.235294117647059" calcext:value-type="float">
            <text:p>0.235</text:p>
          </table:table-cell>
          <table:table-cell/>
          <table:table-cell table:style-name="Default" table:number-columns-repeated="16366"/>
        </table:table-row>
        <table:table-row table:style-name="ro29">
          <table:table-cell office:value-type="float" office:value="153" calcext:value-type="float">
            <text:p>153</text:p>
          </table:table-cell>
          <table:table-cell office:value-type="string" calcext:value-type="string">
            <text:p>8455cf41-1813-4475-8d0c-72236603da39</text:p>
          </table:table-cell>
          <table:table-cell office:value-type="string" calcext:value-type="string">
            <text:p>wooden step</text:p>
          </table:table-cell>
          <table:table-cell office:value-type="string" calcext:value-type="string">
            <text:p>wooden step,step,staircase,wooden stairs,step</text:p>
          </table:table-cell>
          <table:table-cell office:value-type="string" calcext:value-type="string">
            <text:p><text:s/>Holz tritt ist lose, der elfste oberste Tritt der Waldtreppe ist lose, wackelig und gefährlich.</text:p>
          </table:table-cell>
          <table:table-cell office:value-type="string" calcext:value-type="string">
            <text:p>Holztritt ist lose</text:p>
          </table:table-cell>
          <table:table-cell table:style-name="ce79" office:value-type="string" calcext:value-type="string">
            <text:p>Der 11. oberste Tritt der Walltreppe ist lose, wacklig und gefährlich.</text:p>
          </table:table-cell>
          <table:table-cell table:style-name="ce79" office:value-type="string" calcext:value-type="string">
            <text:p>a wooden step</text:p>
          </table:table-cell>
          <table:table-cell table:style-name="ce88" table:formula="of:=[.F154]&amp;&quot; &quot;&amp;[.G154]" office:value-type="string" office:string-value="Holztritt ist lose Der 11. oberste Tritt der Walltreppe ist lose, wacklig und gefährlich." calcext:value-type="string">
            <text:p>Holztritt ist lose Der 11. oberste Tritt der Walltreppe ist lose, wacklig und gefährlich.</text:p>
          </table:table-cell>
          <table:table-cell office:value-type="string" calcext:value-type="string">
            <text:p>x</text:p>
          </table:table-cell>
          <table:table-cell table:number-columns-repeated="4"/>
          <table:table-cell table:style-name="ce96" office:value-type="float" office:value="225" calcext:value-type="float">
            <text:p>225</text:p>
          </table:table-cell>
          <table:table-cell office:value-type="string" calcext:value-type="string">
            <text:p>Strassenschäden</text:p>
          </table:table-cell>
          <table:table-cell table:style-name="ce99" office:value-type="float" office:value="0.5" calcext:value-type="float">
            <text:p>0.500</text:p>
          </table:table-cell>
          <table:table-cell/>
          <table:table-cell table:style-name="Default" table:number-columns-repeated="16366"/>
        </table:table-row>
        <table:table-row table:style-name="ro19">
          <table:table-cell office:value-type="float" office:value="154" calcext:value-type="float">
            <text:p>154</text:p>
          </table:table-cell>
          <table:table-cell office:value-type="string" calcext:value-type="string">
            <text:p>8f0f1cd5-9ca9-4fe3-a417-6408318f3f53</text:p>
          </table:table-cell>
          <table:table-cell office:value-type="string" calcext:value-type="string">
            <text:p>stairs</text:p>
          </table:table-cell>
          <table:table-cell office:value-type="string" calcext:value-type="string">
            <text:p>stairs,wooden plank,wooden plate,path,street</text:p>
          </table:table-cell>
          <table:table-cell office:value-type="string" calcext:value-type="string">
            <text:p><text:s/>Treppe defekt. Die Treppe vom Fichteweg zur Sonnenbergstraße ist defekt. Eine ganze Holzplatte fehlt und liegt an der Straße.</text:p>
          </table:table-cell>
          <table:table-cell office:value-type="string" calcext:value-type="string">
            <text:p>Treppe defekt</text:p>
          </table:table-cell>
          <table:table-cell table:style-name="ce79" office:value-type="string" calcext:value-type="string">
            <text:p>Die Treppe vom Fichteweg zur Sonnenbergstrasse ist defekt. Eine ganze Holzlatte fehlt und liegt an der Strasse</text:p>
          </table:table-cell>
          <table:table-cell table:style-name="ce79" office:value-type="string" calcext:value-type="string">
            <text:p>a stairs</text:p>
          </table:table-cell>
          <table:table-cell table:style-name="ce88" table:formula="of:=[.F155]&amp;&quot; &quot;&amp;[.G155]" office:value-type="string" office:string-value="Treppe defekt Die Treppe vom Fichteweg zur Sonnenbergstrasse ist defekt. Eine ganze Holzlatte fehlt und liegt an der Strasse" calcext:value-type="string">
            <text:p>Treppe defekt Die Treppe vom Fichteweg zur Sonnenbergstrasse ist defekt. Eine ganze Holzlatte fehlt und liegt an der Strasse</text:p>
          </table:table-cell>
          <table:table-cell office:value-type="string" calcext:value-type="string">
            <text:p>x</text:p>
          </table:table-cell>
          <table:table-cell table:number-columns-repeated="4"/>
          <table:table-cell table:style-name="ce96" office:value-type="float" office:value="201" calcext:value-type="float">
            <text:p>201</text:p>
          </table:table-cell>
          <table:table-cell office:value-type="string" calcext:value-type="string">
            <text:p>Strassenschäden</text:p>
          </table:table-cell>
          <table:table-cell table:style-name="ce99" office:value-type="float" office:value="0.210526315789474" calcext:value-type="float">
            <text:p>0.211</text:p>
          </table:table-cell>
          <table:table-cell/>
          <table:table-cell table:style-name="Default" table:number-columns-repeated="16366"/>
        </table:table-row>
        <table:table-row table:style-name="ro28">
          <table:table-cell office:value-type="float" office:value="155" calcext:value-type="float">
            <text:p>155</text:p>
          </table:table-cell>
          <table:table-cell office:value-type="string" calcext:value-type="string">
            <text:p>7ead8c9d-75c9-4145-afe3-f27ee56dac93</text:p>
          </table:table-cell>
          <table:table-cell office:value-type="string" calcext:value-type="string">
            <text:p>street</text:p>
          </table:table-cell>
          <table:table-cell office:value-type="string" calcext:value-type="string">
            <text:p>street,Hetereweg,Höhenweg,Tigerbergstrasse,road</text:p>
          </table:table-cell>
          <table:table-cell office:value-type="string" calcext:value-type="string">
            <text:p><text:s/>Komplett überfrorene Strasse. Der Hetereweg Nr. 1 bis 7, der Höhenweg Nr. 35 bis 31 sowie die Tigerbergstrasse waren heute Morgen komplett überfroren und aalglatt. Ein Begehen befahren ohne Ausrutschen war kaum möglich. Offenbar hat der Unterhaltungsdienst vergessen zu salzen.</text:p>
          </table:table-cell>
          <table:table-cell office:value-type="string" calcext:value-type="string">
            <text:p>Komplett überfrorene Strassen</text:p>
          </table:table-cell>
          <table:table-cell table:style-name="ce79" office:value-type="string" calcext:value-type="string">
            <text:p>Der Hätterenweg (Nr. 1 - 7), der Höhenweg (Nr. 35 - 31) sowie die Tigerbergstrasse waren heute Morgen komplett überfroren und aalglatt. Ein Begehen / Befahren ohne Ausrutschen war kaum möglich. Offenbar hat der Unterhaltsdienst vergessen, zu salzen.</text:p>
          </table:table-cell>
          <table:table-cell table:style-name="ce79" office:value-type="string" calcext:value-type="string">
            <text:p>null</text:p>
          </table:table-cell>
          <table:table-cell table:style-name="ce88" table:formula="of:=[.F156]&amp;&quot; &quot;&amp;[.G156]" office:value-type="string" office:string-value="Komplett überfrorene Strassen Der Hätterenweg (Nr. 1 - 7), der Höhenweg (Nr. 35 - 31) sowie die Tigerbergstrasse waren heute Morgen komplett überfroren und aalglatt. Ein Begehen / Befahren ohne Ausrutschen war kaum möglich. Offenbar hat der Unterhaltsdienst vergessen, zu salzen." calcext:value-type="string">
            <text:p>Komplett überfrorene Strassen Der Hätterenweg (Nr. 1 - 7), der Höhenweg (Nr. 35 - 31) sowie die Tigerbergstrasse waren heute Morgen komplett überfroren und aalglatt. Ein Begehen / Befahren ohne Ausrutschen war kaum möglich. Offenbar hat der Unterhaltsdienst vergessen, zu salzen.</text:p>
          </table:table-cell>
          <table:table-cell table:number-columns-repeated="2"/>
          <table:table-cell office:value-type="string" calcext:value-type="string">
            <text:p>x</text:p>
          </table:table-cell>
          <table:table-cell table:number-columns-repeated="2"/>
          <table:table-cell table:style-name="ce96" office:value-type="float" office:value="107" calcext:value-type="float">
            <text:p>107</text:p>
          </table:table-cell>
          <table:table-cell office:value-type="string" calcext:value-type="string">
            <text:p>Strassenschäden</text:p>
          </table:table-cell>
          <table:table-cell table:style-name="ce99" office:value-type="float" office:value="0.292682926829268" calcext:value-type="float">
            <text:p>0.293</text:p>
          </table:table-cell>
          <table:table-cell/>
          <table:table-cell table:style-name="Default" table:number-columns-repeated="16366"/>
        </table:table-row>
        <table:table-row table:style-name="ro14">
          <table:table-cell table:style-name="ce71" office:value-type="float" office:value="156" calcext:value-type="float">
            <text:p>156</text:p>
          </table:table-cell>
          <table:table-cell table:style-name="ce71" office:value-type="string" calcext:value-type="string">
            <text:p>93bfd566-9bf7-4a40-853d-3d34a8d2dab8</text:p>
          </table:table-cell>
          <table:table-cell table:style-name="ce71" office:value-type="string" calcext:value-type="string">
            <text:p>sled</text:p>
          </table:table-cell>
          <table:table-cell table:style-name="ce71" office:value-type="string" calcext:value-type="string">
            <text:p>sled,path sled,helper,stones,water stones</text:p>
          </table:table-cell>
          <table:table-cell table:style-name="ce80" office:value-type="string" calcext:value-type="string">
            <text:p><text:s/>Pfadschlitten macht auf unspunnen. Werter Helfer, wir machen Sie auf den einen Pfadschlitten verursachten Schaden an der Wassersteinen aufmerksam. Vielen Dank und beste Grüße.</text:p>
          </table:table-cell>
          <table:table-cell table:style-name="ce71" office:value-type="string" calcext:value-type="string">
            <text:p>Pfadschlitten machte auf Unspunnen</text:p>
          </table:table-cell>
          <table:table-cell table:style-name="ce80" office:value-type="string" calcext:value-type="string">
            <text:p>Werte Helfer Wir machen Sie auf den durch einen Pfadschlitten verursachten Schaden an den Wassersteinen aufmerksam. Vielen Dank und beste Grüsse</text:p>
          </table:table-cell>
          <table:table-cell table:style-name="ce80" office:value-type="string" calcext:value-type="string">
            <text:p>a stones</text:p>
          </table:table-cell>
          <table:table-cell table:style-name="ce89" table:formula="of:=[.F157]&amp;&quot; &quot;&amp;[.G157]" office:value-type="string" office:string-value="Pfadschlitten machte auf Unspunnen Werte Helfer Wir machen Sie auf den durch einen Pfadschlitten verursachten Schaden an den Wassersteinen aufmerksam. Vielen Dank und beste Grüsse" calcext:value-type="string">
            <text:p>Pfadschlitten machte auf Unspunnen Werte Helfer Wir machen Sie auf den durch einen Pfadschlitten verursachten Schaden an den Wassersteinen aufmerksam. Vielen Dank und beste Grüsse</text:p>
          </table:table-cell>
          <table:table-cell table:style-name="ce71" office:value-type="string" calcext:value-type="string">
            <text:p>x</text:p>
          </table:table-cell>
          <table:table-cell table:style-name="ce71" table:number-columns-repeated="4"/>
          <table:table-cell table:style-name="ce96" office:value-type="float" office:value="107" calcext:value-type="float">
            <text:p>107</text:p>
          </table:table-cell>
          <table:table-cell office:value-type="string" calcext:value-type="string">
            <text:p>Strassenschäden</text:p>
          </table:table-cell>
          <table:table-cell table:style-name="ce30" office:value-type="float" office:value="0.32" calcext:value-type="float">
            <text:p>0.320</text:p>
          </table:table-cell>
          <table:table-cell/>
          <table:table-cell table:style-name="ce71" table:number-columns-repeated="16366"/>
        </table:table-row>
        <table:table-row table:style-name="ro7">
          <table:table-cell table:style-name="ce71" office:value-type="float" office:value="157" calcext:value-type="float">
            <text:p>157</text:p>
          </table:table-cell>
          <table:table-cell table:style-name="ce71" office:value-type="string" calcext:value-type="string">
            <text:p>189cd19d-c066-4864-a31b-fccbe87ed723</text:p>
          </table:table-cell>
          <table:table-cell table:style-name="ce71" office:value-type="string" calcext:value-type="string">
            <text:p>stair step</text:p>
          </table:table-cell>
          <table:table-cell table:style-name="ce71" office:value-type="string" calcext:value-type="string">
            <text:p>stair step,wooden beam,staircase,ledge,rock face</text:p>
          </table:table-cell>
          <table:table-cell table:style-name="ce80" office:value-type="string" calcext:value-type="string">
            <text:p><text:s/>Fehlende Treppenstufe auf Mühlektreppe. Bei der drittobersten Treppenabschnitt der Mühlektreppen kurz vor der Felsenstraße fehlt eine Treppenstufe. Der Holzbalken liegt auf der Seite. Sehr grosse Sturzgefahr, wenn man sich nicht achtet.</text:p>
          </table:table-cell>
          <table:table-cell table:style-name="ce71" office:value-type="string" calcext:value-type="string">
            <text:p>Fehlende Treppenstufe auf Mühleggtreppe</text:p>
          </table:table-cell>
          <table:table-cell table:style-name="ce80" office:value-type="string" calcext:value-type="string">
            <text:p>Beim drittobersten Treppenabschnitt der Mühlegg-Treppe (kurz vor Felsenstrasse) fehlt eine Treppenstufe (Holzbalken liegt auf der Seite). Sehr grosse Sturzgefahr wenn man sich nicht achtet!</text:p>
          </table:table-cell>
          <table:table-cell table:style-name="ce80" office:value-type="string" calcext:value-type="string">
            <text:p>a stair step</text:p>
          </table:table-cell>
          <table:table-cell table:style-name="ce89" table:formula="of:=[.F158]&amp;&quot; &quot;&amp;[.G158]" office:value-type="string" office:string-value="Fehlende Treppenstufe auf Mühleggtreppe Beim drittobersten Treppenabschnitt der Mühlegg-Treppe (kurz vor Felsenstrasse) fehlt eine Treppenstufe (Holzbalken liegt auf der Seite). Sehr grosse Sturzgefahr wenn man sich nicht achtet!" calcext:value-type="string">
            <text:p>Fehlende Treppenstufe auf Mühleggtreppe Beim drittobersten Treppenabschnitt der Mühlegg-Treppe (kurz vor Felsenstrasse) fehlt eine Treppenstufe (Holzbalken liegt auf der Seite). Sehr grosse Sturzgefahr wenn man sich nicht achtet!</text:p>
          </table:table-cell>
          <table:table-cell table:style-name="ce71" office:value-type="string" calcext:value-type="string">
            <text:p>x</text:p>
          </table:table-cell>
          <table:table-cell table:style-name="ce71" table:number-columns-repeated="4"/>
          <table:table-cell table:style-name="ce97" office:value-type="float" office:value="108" calcext:value-type="float">
            <text:p>108</text:p>
          </table:table-cell>
          <table:table-cell office:value-type="string" calcext:value-type="string">
            <text:p>Strassenschäden</text:p>
          </table:table-cell>
          <table:table-cell table:style-name="ce30" office:value-type="float" office:value="0.464285714285714" calcext:value-type="float">
            <text:p>0.464</text:p>
          </table:table-cell>
          <table:table-cell/>
          <table:table-cell table:style-name="ce71" table:number-columns-repeated="16366"/>
        </table:table-row>
        <table:table-row table:style-name="ro7">
          <table:table-cell office:value-type="float" office:value="158" calcext:value-type="float">
            <text:p>158</text:p>
          </table:table-cell>
          <table:table-cell office:value-type="string" calcext:value-type="string">
            <text:p>4975356f-2f76-49c1-b1f2-475e6d2bfcb9</text:p>
          </table:table-cell>
          <table:table-cell office:value-type="string" calcext:value-type="string">
            <text:p>dampender Dohlendeckel</text:p>
          </table:table-cell>
          <table:table-cell office:value-type="string" calcext:value-type="string">
            <text:p>dampender Dohlendeckel,cap,lid,defect</text:p>
          </table:table-cell>
          <table:table-cell office:value-type="string" calcext:value-type="string">
            <text:p><text:s/>Dampfender Dohlendeckel. Aufgrund des Schnees ist beim vorbeigehen aufgefallen, dass der untere bei den Deckel dampft und heiß ist. Da ich noch nie zuvor gesehen habe, dachte ich, dass es eventuell ein Defekt vorliegt.</text:p>
          </table:table-cell>
          <table:table-cell office:value-type="string" calcext:value-type="string">
            <text:p>Dampfender Dolendeckel</text:p>
          </table:table-cell>
          <table:table-cell table:style-name="ce79" office:value-type="string" calcext:value-type="string">
            <text:p>Aufgrund des Schnees ist beim Vorbeigehen aufgefallen, dass der untere der beiden Deckel dampft und heiss ist. Da ich das noch nie zuvor gesehen habe, dachte ich, dass da eventuell ein Defekt vorliegt.</text:p>
          </table:table-cell>
          <table:table-cell table:style-name="ce79" office:value-type="string" calcext:value-type="string">
            <text:p>null</text:p>
          </table:table-cell>
          <table:table-cell table:style-name="ce88" table:formula="of:=[.F159]&amp;&quot; &quot;&amp;[.G159]" office:value-type="string" office:string-value="Dampfender Dolendeckel Aufgrund des Schnees ist beim Vorbeigehen aufgefallen, dass der untere der beiden Deckel dampft und heiss ist. Da ich das noch nie zuvor gesehen habe, dachte ich, dass da eventuell ein Defekt vorliegt." calcext:value-type="string">
            <text:p>Dampfender Dolendeckel Aufgrund des Schnees ist beim Vorbeigehen aufgefallen, dass der untere der beiden Deckel dampft und heiss ist. Da ich das noch nie zuvor gesehen habe, dachte ich, dass da eventuell ein Defekt vorliegt.</text:p>
          </table:table-cell>
          <table:table-cell table:number-columns-repeated="4"/>
          <table:table-cell office:value-type="string" calcext:value-type="string">
            <text:p>x</text:p>
          </table:table-cell>
          <table:table-cell table:style-name="ce96" office:value-type="float" office:value="100" calcext:value-type="float">
            <text:p>100</text:p>
          </table:table-cell>
          <table:table-cell office:value-type="string" calcext:value-type="string">
            <text:p>Strassenschäden</text:p>
          </table:table-cell>
          <table:table-cell table:style-name="ce99" office:value-type="float" office:value="0.2" calcext:value-type="float">
            <text:p>0.200</text:p>
          </table:table-cell>
          <table:table-cell/>
          <table:table-cell table:style-name="Default" table:number-columns-repeated="16366"/>
        </table:table-row>
        <table:table-row table:style-name="ro7">
          <table:table-cell office:value-type="float" office:value="159" calcext:value-type="float">
            <text:p>159</text:p>
          </table:table-cell>
          <table:table-cell office:value-type="string" calcext:value-type="string">
            <text:p>a3beafb1-63aa-4be5-bf84-d3d4901c4024</text:p>
          </table:table-cell>
          <table:table-cell office:value-type="string" calcext:value-type="string">
            <text:p>snow removal</text:p>
          </table:table-cell>
          <table:table-cell office:value-type="string" calcext:value-type="string">
            <text:p>snow removal,pedestrian path,bridge,sidewalk,roller chair,stroller</text:p>
          </table:table-cell>
          <table:table-cell office:value-type="string" calcext:value-type="string">
            <text:p><text:s/>Schneeräumung, Fussgängerweg. Auf der Brücke an der Vonnwilstraße sollte der Fussgängerweg unbedingt vom Schnee befreit werden. Der Weg ist rutschig und mit einem Rollator oder Kinderwagen kaum passierbar.</text:p>
          </table:table-cell>
          <table:table-cell office:value-type="string" calcext:value-type="string">
            <text:p>Schneeräumung Fussgängerweg</text:p>
          </table:table-cell>
          <table:table-cell table:style-name="ce79" office:value-type="string" calcext:value-type="string">
            <text:p>Auf der Brücke an der Vonwilstrasse sollte der Fussgängerweg unbedingt vom Schnee befreit werden. Der Weg ist rutschig und mit Rollator oder Kinderwagen kaum pasierbar.</text:p>
          </table:table-cell>
          <table:table-cell table:style-name="ce79" office:value-type="string" calcext:value-type="string">
            <text:p>a snow removal</text:p>
          </table:table-cell>
          <table:table-cell table:style-name="ce88" table:formula="of:=[.F160]&amp;&quot; &quot;&amp;[.G160]" office:value-type="string" office:string-value="Schneeräumung Fussgängerweg Auf der Brücke an der Vonwilstrasse sollte der Fussgängerweg unbedingt vom Schnee befreit werden. Der Weg ist rutschig und mit Rollator oder Kinderwagen kaum pasierbar." calcext:value-type="string">
            <text:p>Schneeräumung Fussgängerweg Auf der Brücke an der Vonwilstrasse sollte der Fussgängerweg unbedingt vom Schnee befreit werden. Der Weg ist rutschig und mit Rollator oder Kinderwagen kaum pasierbar.</text:p>
          </table:table-cell>
          <table:table-cell office:value-type="string" calcext:value-type="string">
            <text:p>x</text:p>
          </table:table-cell>
          <table:table-cell table:number-columns-repeated="4"/>
          <table:table-cell table:style-name="ce96" office:value-type="float" office:value="163" calcext:value-type="float">
            <text:p>163</text:p>
          </table:table-cell>
          <table:table-cell office:value-type="string" calcext:value-type="string">
            <text:p>Strassenschäden</text:p>
          </table:table-cell>
          <table:table-cell table:style-name="ce99" office:value-type="float" office:value="0.185185185185185" calcext:value-type="float">
            <text:p>0.185</text:p>
          </table:table-cell>
          <table:table-cell/>
          <table:table-cell table:style-name="Default" table:number-columns-repeated="16366"/>
        </table:table-row>
        <table:table-row table:style-name="ro19">
          <table:table-cell office:value-type="float" office:value="160" calcext:value-type="float">
            <text:p>160</text:p>
          </table:table-cell>
          <table:table-cell office:value-type="string" calcext:value-type="string">
            <text:p>f753556b-5d17-4d7a-924f-00091d071115</text:p>
          </table:table-cell>
          <table:table-cell office:value-type="string" calcext:value-type="string">
            <text:p>money</text:p>
          </table:table-cell>
          <table:table-cell office:value-type="string" calcext:value-type="string">
            <text:p>money,stations,VBSG,law,work</text:p>
          </table:table-cell>
          <table:table-cell office:value-type="string" calcext:value-type="string">
            <text:p><text:s/>Flickwerk, eine Schande, aber viel Geld für Willowverkehr und dann endlich die Haltestellen der VBSG nach Gesetz fertiggestellt.</text:p>
          </table:table-cell>
          <table:table-cell office:value-type="string" calcext:value-type="string">
            <text:p>Flickwerk</text:p>
          </table:table-cell>
          <table:table-cell table:style-name="ce79" office:value-type="string" calcext:value-type="string">
            <text:p>Eine Schande.Aber viel Geld für Veloverkehr.Und wann werden endlich die Haltestellen der VBSG nach Gesetzt fertig gestellt.</text:p>
          </table:table-cell>
          <table:table-cell table:style-name="ce79" office:value-type="string" calcext:value-type="string">
            <text:p>null</text:p>
          </table:table-cell>
          <table:table-cell table:style-name="ce88" table:formula="of:=[.F161]&amp;&quot; &quot;&amp;[.G161]" office:value-type="string" office:string-value="Flickwerk Eine Schande.Aber viel Geld für Veloverkehr.Und wann werden endlich die Haltestellen der VBSG nach Gesetzt fertig gestellt." calcext:value-type="string">
            <text:p>Flickwerk Eine Schande.Aber viel Geld für Veloverkehr.Und wann werden endlich die Haltestellen der VBSG nach Gesetzt fertig gestellt.</text:p>
          </table:table-cell>
          <table:table-cell table:number-columns-repeated="2"/>
          <table:table-cell office:value-type="string" calcext:value-type="string">
            <text:p>x</text:p>
          </table:table-cell>
          <table:table-cell table:number-columns-repeated="2"/>
          <table:table-cell table:style-name="ce96" office:value-type="float" office:value="98" calcext:value-type="float">
            <text:p>98</text:p>
          </table:table-cell>
          <table:table-cell office:value-type="string" calcext:value-type="string">
            <text:p>Strassenschäden</text:p>
          </table:table-cell>
          <table:table-cell table:style-name="ce99" office:value-type="float" office:value="0.555555555555556" calcext:value-type="float">
            <text:p>0.556</text:p>
          </table:table-cell>
          <table:table-cell/>
          <table:table-cell table:style-name="Default" table:number-columns-repeated="16366"/>
        </table:table-row>
        <table:table-row table:style-name="ro26">
          <table:table-cell office:value-type="float" office:value="161" calcext:value-type="float">
            <text:p>161</text:p>
          </table:table-cell>
          <table:table-cell office:value-type="string" calcext:value-type="string">
            <text:p>9cdd8bee-f902-47f9-af96-bb135be05e3b</text:p>
          </table:table-cell>
          <table:table-cell office:value-type="string" calcext:value-type="string">
            <text:p>hole</text:p>
          </table:table-cell>
          <table:table-cell office:value-type="string" calcext:value-type="string">
            <text:p>hole,gully,hole,danger</text:p>
          </table:table-cell>
          <table:table-cell office:value-type="string" calcext:value-type="string">
            <text:p><text:s/>Loch beim Gully. Das Loch wird immer größer, siehe Bild im Dunkeln, sehr gefährlich, wenn jemand hineintritt.</text:p>
          </table:table-cell>
          <table:table-cell office:value-type="string" calcext:value-type="string">
            <text:p>Loch beim Gulli</text:p>
          </table:table-cell>
          <table:table-cell table:style-name="ce79" office:value-type="string" calcext:value-type="string">
            <text:p>Das Loch wird immer grösser,, siehe Bild. Im Dunkeln sehr gefährlich, wenn jemand hinentritt.</text:p>
          </table:table-cell>
          <table:table-cell table:style-name="ce79" office:value-type="string" calcext:value-type="string">
            <text:p>a hole</text:p>
          </table:table-cell>
          <table:table-cell table:style-name="ce88" table:formula="of:=[.F162]&amp;&quot; &quot;&amp;[.G162]" office:value-type="string" office:string-value="Loch beim Gulli Das Loch wird immer grösser,, siehe Bild. Im Dunkeln sehr gefährlich, wenn jemand hinentritt." calcext:value-type="string">
            <text:p>Loch beim Gulli Das Loch wird immer grösser,, siehe Bild. Im Dunkeln sehr gefährlich, wenn jemand hinentritt.</text:p>
          </table:table-cell>
          <table:table-cell office:value-type="string" calcext:value-type="string">
            <text:p>x</text:p>
          </table:table-cell>
          <table:table-cell table:number-columns-repeated="4"/>
          <table:table-cell table:style-name="ce96" office:value-type="float" office:value="90" calcext:value-type="float">
            <text:p>90</text:p>
          </table:table-cell>
          <table:table-cell office:value-type="string" calcext:value-type="string">
            <text:p>Strassenschäden</text:p>
          </table:table-cell>
          <table:table-cell table:style-name="ce99" office:value-type="float" office:value="0.352941176470588" calcext:value-type="float">
            <text:p>0.353</text:p>
          </table:table-cell>
          <table:table-cell/>
          <table:table-cell table:style-name="Default" table:number-columns-repeated="16366"/>
        </table:table-row>
        <table:table-row table:style-name="ro7">
          <table:table-cell office:value-type="float" office:value="162" calcext:value-type="float">
            <text:p>162</text:p>
          </table:table-cell>
          <table:table-cell office:value-type="string" calcext:value-type="string">
            <text:p>d94f28a6-9097-4de7-853e-89e690455763</text:p>
          </table:table-cell>
          <table:table-cell office:value-type="string" calcext:value-type="string">
            <text:p>sidewalk edge</text:p>
          </table:table-cell>
          <table:table-cell office:value-type="string" calcext:value-type="string">
            <text:p>sidewalk edge,curbstone,joint mortar,paving stone,pavement</text:p>
          </table:table-cell>
          <table:table-cell office:value-type="string" calcext:value-type="string">
            <text:p><text:s/>Randstand vom Trottoir, sehr geehrtes Tiefenamt, wäre es möglich den Randstein zu kontrollieren? Es fehlt der Fugenmörtel, was für ältere Menschen und Rollatorbenutzer zu Unsicherheit führt. Herzlichen Dank für Ihre Bemühungen.</text:p>
          </table:table-cell>
          <table:table-cell office:value-type="string" calcext:value-type="string">
            <text:p>Randstad vom Trotoir</text:p>
          </table:table-cell>
          <table:table-cell table:style-name="ce79" office:value-type="string" calcext:value-type="string">
            <text:p>Sehr geehrtes Tiefbauamt wäre es möglich den Randstein zu kontrollierten, es fehlt der Fugenmörtel was für ältere Leute und Rollator Benützer zu Unsicherheit führt. Herzlichen Dank für Ihre Bemühung</text:p>
          </table:table-cell>
          <table:table-cell table:style-name="ce79" office:value-type="string" calcext:value-type="string">
            <text:p>a curbstone</text:p>
          </table:table-cell>
          <table:table-cell table:style-name="ce88" table:formula="of:=[.F163]&amp;&quot; &quot;&amp;[.G163]" office:value-type="string" office:string-value="Randstad vom Trotoir Sehr geehrtes Tiefbauamt wäre es möglich den Randstein zu kontrollierten, es fehlt der Fugenmörtel was für ältere Leute und Rollator Benützer zu Unsicherheit führt. Herzlichen Dank für Ihre Bemühung" calcext:value-type="string">
            <text:p>Randstad vom Trotoir Sehr geehrtes Tiefbauamt wäre es möglich den Randstein zu kontrollierten, es fehlt der Fugenmörtel was für ältere Leute und Rollator Benützer zu Unsicherheit führt. Herzlichen Dank für Ihre Bemühung</text:p>
          </table:table-cell>
          <table:table-cell office:value-type="string" calcext:value-type="string">
            <text:p>x</text:p>
          </table:table-cell>
          <table:table-cell table:number-columns-repeated="4"/>
          <table:table-cell table:style-name="ce96" office:value-type="float" office:value="103" calcext:value-type="float">
            <text:p>103</text:p>
          </table:table-cell>
          <table:table-cell office:value-type="string" calcext:value-type="string">
            <text:p>Strassenschäden</text:p>
          </table:table-cell>
          <table:table-cell table:style-name="ce99" office:value-type="float" office:value="0.34375" calcext:value-type="float">
            <text:p>0.344</text:p>
          </table:table-cell>
          <table:table-cell/>
          <table:table-cell table:style-name="Default" table:number-columns-repeated="16366"/>
        </table:table-row>
        <table:table-row table:style-name="ro12">
          <table:table-cell office:value-type="float" office:value="163" calcext:value-type="float">
            <text:p>163</text:p>
          </table:table-cell>
          <table:table-cell office:value-type="string" calcext:value-type="string">
            <text:p>59a50e28-3ced-4b9b-8ada-47c0e960f0f3</text:p>
          </table:table-cell>
          <table:table-cell office:value-type="string" calcext:value-type="string">
            <text:p>damaged doll cap</text:p>
          </table:table-cell>
          <table:table-cell office:value-type="string" calcext:value-type="string">
            <text:p>damaged doll cap,doll cap,construction,railway,sidewalk</text:p>
          </table:table-cell>
          <table:table-cell office:value-type="string" calcext:value-type="string">
            <text:p><text:s/>Beschädigter Dollendeckel. Am Burggraben haben die Appenzellerbahn vor einigen Tagen noch gebaut ein Bauweichen. Und dabei offenbar einen Dollendeckel auf dem Trottoir beschädigt. Sehr gefährlich für Sehbehinderte oder alte Menschen.</text:p>
          </table:table-cell>
          <table:table-cell office:value-type="string" calcext:value-type="string">
            <text:p>Beschädigter Dollendeckel</text:p>
          </table:table-cell>
          <table:table-cell table:style-name="ce79" office:value-type="string" calcext:value-type="string">
            <text:p>Am Burggraben haben die Appenzeller Bahnen vor ein paar Tagen noch gebaut (Einbau Weichen) und dabei offenbart einen Dollendeckel auf dem Trottoir beschädigt. Sieht gefährlich aus für sehbehinderte oder alte Menschen.</text:p>
          </table:table-cell>
          <table:table-cell table:style-name="ce79" office:value-type="string" calcext:value-type="string">
            <text:p>a sidewalk</text:p>
          </table:table-cell>
          <table:table-cell table:style-name="ce88" table:formula="of:=[.F164]&amp;&quot; &quot;&amp;[.G164]" office:value-type="string" office:string-value="Beschädigter Dollendeckel Am Burggraben haben die Appenzeller Bahnen vor ein paar Tagen noch gebaut (Einbau Weichen) und dabei offenbart einen Dollendeckel auf dem Trottoir beschädigt. Sieht gefährlich aus für sehbehinderte oder alte Menschen." calcext:value-type="string">
            <text:p>Beschädigter Dollendeckel Am Burggraben haben die Appenzeller Bahnen vor ein paar Tagen noch gebaut (Einbau Weichen) und dabei offenbart einen Dollendeckel auf dem Trottoir beschädigt. Sieht gefährlich aus für sehbehinderte oder alte Menschen.</text:p>
          </table:table-cell>
          <table:table-cell table:number-columns-repeated="2"/>
          <table:table-cell office:value-type="string" calcext:value-type="string">
            <text:p>x</text:p>
          </table:table-cell>
          <table:table-cell table:number-columns-repeated="2"/>
          <table:table-cell table:style-name="ce96" office:value-type="float" office:value="208" calcext:value-type="float">
            <text:p>208</text:p>
          </table:table-cell>
          <table:table-cell office:value-type="string" calcext:value-type="string">
            <text:p>Strassenschäden</text:p>
          </table:table-cell>
          <table:table-cell table:style-name="ce99" office:value-type="float" office:value="0.363636363636364" calcext:value-type="float">
            <text:p>0.364</text:p>
          </table:table-cell>
          <table:table-cell/>
          <table:table-cell table:style-name="Default" table:number-columns-repeated="16366"/>
        </table:table-row>
        <table:table-row table:style-name="ro19">
          <table:table-cell office:value-type="float" office:value="164" calcext:value-type="float">
            <text:p>164</text:p>
          </table:table-cell>
          <table:table-cell office:value-type="string" calcext:value-type="string">
            <text:p>c774abd6-94ae-444f-b13e-e8911a2634a3</text:p>
          </table:table-cell>
          <table:table-cell office:value-type="string" calcext:value-type="string">
            <text:p>pavement damage</text:p>
          </table:table-cell>
          <table:table-cell office:value-type="string" calcext:value-type="string">
            <text:p>pavement damage,pedestrian crossing,Rohrschacherstrasse,Rehbruckstrasse,pavement</text:p>
          </table:table-cell>
          <table:table-cell office:value-type="string" calcext:value-type="string">
            <text:p><text:s/>Belagsschaden bei Fussgängerstreifenverzweigung, Rohrschacherstrasse, Rehbruckstrasse. Dieser Belagsschaden wird immer grösser. Bitte ausbessern.</text:p>
          </table:table-cell>
          <table:table-cell office:value-type="string" calcext:value-type="string">
            <text:p>Belag Schaden beim Fussgängerstreifen Verzweigung Rorschacherstrasse / Rehburgstrasse</text:p>
          </table:table-cell>
          <table:table-cell table:style-name="ce79" office:value-type="string" calcext:value-type="string">
            <text:p>Dieser Belag Schaden wird immer grösser. Bitte ausbessern.</text:p>
          </table:table-cell>
          <table:table-cell table:style-name="ce79" office:value-type="string" calcext:value-type="string">
            <text:p>a pavement damage</text:p>
          </table:table-cell>
          <table:table-cell table:style-name="ce88" table:formula="of:=[.F165]&amp;&quot; &quot;&amp;[.G165]" office:value-type="string" office:string-value="Belag Schaden beim Fussgängerstreifen Verzweigung Rorschacherstrasse / Rehburgstrasse Dieser Belag Schaden wird immer grösser. Bitte ausbessern." calcext:value-type="string">
            <text:p>Belag Schaden beim Fussgängerstreifen Verzweigung Rorschacherstrasse / Rehburgstrasse Dieser Belag Schaden wird immer grösser. Bitte ausbessern.</text:p>
          </table:table-cell>
          <table:table-cell office:value-type="string" calcext:value-type="string">
            <text:p>x</text:p>
          </table:table-cell>
          <table:table-cell table:number-columns-repeated="4"/>
          <table:table-cell table:style-name="ce96" office:value-type="float" office:value="177" calcext:value-type="float">
            <text:p>177</text:p>
          </table:table-cell>
          <table:table-cell office:value-type="string" calcext:value-type="string">
            <text:p>Strassenschäden</text:p>
          </table:table-cell>
          <table:table-cell table:style-name="ce99" office:value-type="float" office:value="0.625" calcext:value-type="float">
            <text:p>0.625</text:p>
          </table:table-cell>
          <table:table-cell/>
          <table:table-cell table:style-name="Default" table:number-columns-repeated="16366"/>
        </table:table-row>
        <table:table-row table:style-name="ro6">
          <table:table-cell office:value-type="float" office:value="165" calcext:value-type="float">
            <text:p>165</text:p>
          </table:table-cell>
          <table:table-cell office:value-type="string" calcext:value-type="string">
            <text:p>554f61d1-462f-4ca4-a6e2-319145d7b5d0</text:p>
          </table:table-cell>
          <table:table-cell office:value-type="string" calcext:value-type="string">
            <text:p>hole</text:p>
          </table:table-cell>
          <table:table-cell office:value-type="string" calcext:value-type="string">
            <text:p>hole,sidewalk,trench,pavement</text:p>
          </table:table-cell>
          <table:table-cell office:value-type="string" calcext:value-type="string">
            <text:p><text:s/>Loch im Trottoir, Telle ca. 5 cm tief.</text:p>
          </table:table-cell>
          <table:table-cell office:value-type="string" calcext:value-type="string">
            <text:p>loch im trottoir</text:p>
          </table:table-cell>
          <table:table-cell table:style-name="ce79" office:value-type="string" calcext:value-type="string">
            <text:p>delle ca 5cm tief</text:p>
          </table:table-cell>
          <table:table-cell table:style-name="ce79" office:value-type="string" calcext:value-type="string">
            <text:p>a sidewalk</text:p>
          </table:table-cell>
          <table:table-cell table:style-name="ce88" table:formula="of:=[.F166]&amp;&quot; &quot;&amp;[.G166]" office:value-type="string" office:string-value="loch im trottoir delle ca 5cm tief" calcext:value-type="string">
            <text:p>loch im trottoir delle ca 5cm tief</text:p>
          </table:table-cell>
          <table:table-cell office:value-type="string" calcext:value-type="string">
            <text:p>x</text:p>
          </table:table-cell>
          <table:table-cell table:number-columns-repeated="4"/>
          <table:table-cell table:style-name="ce96" office:value-type="float" office:value="139" calcext:value-type="float">
            <text:p>139</text:p>
          </table:table-cell>
          <table:table-cell office:value-type="string" calcext:value-type="string">
            <text:p>Strassenschäden</text:p>
          </table:table-cell>
          <table:table-cell table:style-name="ce99" office:value-type="float" office:value="1" calcext:value-type="float">
            <text:p>1.000</text:p>
          </table:table-cell>
          <table:table-cell/>
          <table:table-cell table:style-name="Default" table:number-columns-repeated="16366"/>
        </table:table-row>
        <table:table-row table:style-name="ro19">
          <table:table-cell office:value-type="float" office:value="166" calcext:value-type="float">
            <text:p>166</text:p>
          </table:table-cell>
          <table:table-cell office:value-type="string" calcext:value-type="string">
            <text:p>f2d709e5-c17c-4b1f-9f7b-deb1b45dbc81</text:p>
          </table:table-cell>
          <table:table-cell office:value-type="string" calcext:value-type="string">
            <text:p>hole</text:p>
          </table:table-cell>
          <table:table-cell office:value-type="string" calcext:value-type="string">
            <text:p>hole,road,street,road surface,pothole</text:p>
          </table:table-cell>
          <table:table-cell office:value-type="string" calcext:value-type="string">
            <text:p><text:s/>Ein grösseres Loch an der Talhofstraße hat es in der Strassenmitte ein grösseres Loch. Für Velofahrer könnte es nach Fahrweise gefährlich werden.</text:p>
          </table:table-cell>
          <table:table-cell office:value-type="string" calcext:value-type="string">
            <text:p>Grösseres Loch</text:p>
          </table:table-cell>
          <table:table-cell table:style-name="ce79" office:value-type="string" calcext:value-type="string">
            <text:p>An der Talhofstrasse hat es in der Strassenmitte ein grösseres Loch. Für Velofahrer könnte es nach Fahrweise gefährlich werden.</text:p>
          </table:table-cell>
          <table:table-cell table:style-name="ce79" office:value-type="string" calcext:value-type="string">
            <text:p>null</text:p>
          </table:table-cell>
          <table:table-cell table:style-name="ce88" table:formula="of:=[.F167]&amp;&quot; &quot;&amp;[.G167]" office:value-type="string" office:string-value="Grösseres Loch An der Talhofstrasse hat es in der Strassenmitte ein grösseres Loch. Für Velofahrer könnte es nach Fahrweise gefährlich werden." calcext:value-type="string">
            <text:p>Grösseres Loch An der Talhofstrasse hat es in der Strassenmitte ein grösseres Loch. Für Velofahrer könnte es nach Fahrweise gefährlich werden.</text:p>
          </table:table-cell>
          <table:table-cell table:number-columns-repeated="4"/>
          <table:table-cell office:value-type="string" calcext:value-type="string">
            <text:p>x</text:p>
          </table:table-cell>
          <table:table-cell table:style-name="ce96" office:value-type="float" office:value="94" calcext:value-type="float">
            <text:p>94</text:p>
          </table:table-cell>
          <table:table-cell office:value-type="string" calcext:value-type="string">
            <text:p>Strassenschäden</text:p>
          </table:table-cell>
          <table:table-cell table:style-name="ce99" office:value-type="float" office:value="0.19047619047619" calcext:value-type="float">
            <text:p>0.190</text:p>
          </table:table-cell>
          <table:table-cell/>
          <table:table-cell table:style-name="Default" table:number-columns-repeated="16366"/>
        </table:table-row>
        <table:table-row table:style-name="ro14">
          <table:table-cell office:value-type="float" office:value="167" calcext:value-type="float">
            <text:p>167</text:p>
          </table:table-cell>
          <table:table-cell office:value-type="string" calcext:value-type="string">
            <text:p>ec3fa5c4-18c0-4b30-80b9-9c2a7bc32913</text:p>
          </table:table-cell>
          <table:table-cell office:value-type="string" calcext:value-type="string">
            <text:p>Bollor</text:p>
          </table:table-cell>
          <table:table-cell office:value-type="string" calcext:value-type="string">
            <text:p>Bollor,monument,stone,monument,grass</text:p>
          </table:table-cell>
          <table:table-cell office:value-type="string" calcext:value-type="string">
            <text:p><text:s/>Bollor ausgerissen. Guten Tag, heute Morgen habe ich gesehen, dass an der St. Leonhardskirche ein Bollor ausgerissen wurde. Der Bollor selber liegt auf der Wiese.</text:p>
          </table:table-cell>
          <table:table-cell office:value-type="string" calcext:value-type="string">
            <text:p>Boller ausgerissen</text:p>
          </table:table-cell>
          <table:table-cell table:style-name="ce79" office:value-type="string" calcext:value-type="string">
            <text:p>Guten Tag, heute morgen habe ich gesehen, dass an der St. Leonhard Kirche ein Boller ausgerissen wurde. der Boller selber liegt in der Wiese.</text:p>
          </table:table-cell>
          <table:table-cell table:style-name="ce79" office:value-type="string" calcext:value-type="string">
            <text:p>a stone</text:p>
          </table:table-cell>
          <table:table-cell table:style-name="ce88" table:formula="of:=[.F168]&amp;&quot; &quot;&amp;[.G168]" office:value-type="string" office:string-value="Boller ausgerissen Guten Tag, heute morgen habe ich gesehen, dass an der St. Leonhard Kirche ein Boller ausgerissen wurde. der Boller selber liegt in der Wiese." calcext:value-type="string">
            <text:p>Boller ausgerissen Guten Tag, heute morgen habe ich gesehen, dass an der St. Leonhard Kirche ein Boller ausgerissen wurde. der Boller selber liegt in der Wiese.</text:p>
          </table:table-cell>
          <table:table-cell office:value-type="string" calcext:value-type="string">
            <text:p>x</text:p>
          </table:table-cell>
          <table:table-cell table:number-columns-repeated="4"/>
          <table:table-cell table:style-name="ce96" office:value-type="float" office:value="213" calcext:value-type="float">
            <text:p>213</text:p>
          </table:table-cell>
          <table:table-cell office:value-type="string" calcext:value-type="string">
            <text:p>Strassenschäden</text:p>
          </table:table-cell>
          <table:table-cell table:style-name="ce99" office:value-type="float" office:value="0.346153846153846" calcext:value-type="float">
            <text:p>0.346</text:p>
          </table:table-cell>
          <table:table-cell/>
          <table:table-cell table:style-name="Default" table:number-columns-repeated="16366"/>
        </table:table-row>
        <table:table-row table:style-name="ro9">
          <table:table-cell office:value-type="float" office:value="168" calcext:value-type="float">
            <text:p>168</text:p>
          </table:table-cell>
          <table:table-cell office:value-type="string" calcext:value-type="string">
            <text:p>81a70fe6-55b6-4e0f-80ca-ea3e8b2d700a</text:p>
          </table:table-cell>
          <table:table-cell office:value-type="string" calcext:value-type="string">
            <text:p>stumbling stones</text:p>
          </table:table-cell>
          <table:table-cell office:value-type="string" calcext:value-type="string">
            <text:p>stumbling stones,rows of vines,city side,hands,knees</text:p>
          </table:table-cell>
          <table:table-cell office:value-type="string" calcext:value-type="string">
            <text:p><text:s/>Stolpersteine bei den drei Weiern. Auf der Stadtseite beide Hände und Knie aufgeschürft.</text:p>
          </table:table-cell>
          <table:table-cell office:value-type="string" calcext:value-type="string">
            <text:p>stolpersteine bei den 3 weieren</text:p>
          </table:table-cell>
          <table:table-cell table:style-name="ce79" office:value-type="string" calcext:value-type="string">
            <text:p>auf der stadtseite beide hände und knie aufgeschürft </text:p>
          </table:table-cell>
          <table:table-cell table:style-name="ce79" office:value-type="string" calcext:value-type="string">
            <text:p>a stumbling stones</text:p>
          </table:table-cell>
          <table:table-cell table:style-name="ce88" table:formula="of:=[.F169]&amp;&quot; &quot;&amp;[.G169]" office:value-type="string" office:string-value="stolpersteine bei den 3 weieren auf der stadtseite beide hände und knie aufgeschürft " calcext:value-type="string">
            <text:p>stolpersteine bei den 3 weieren auf der stadtseite beide hände und knie aufgeschürft </text:p>
          </table:table-cell>
          <table:table-cell office:value-type="string" calcext:value-type="string">
            <text:p>x</text:p>
          </table:table-cell>
          <table:table-cell table:number-columns-repeated="4"/>
          <table:table-cell table:style-name="ce96" office:value-type="float" office:value="153" calcext:value-type="float">
            <text:p>153</text:p>
          </table:table-cell>
          <table:table-cell office:value-type="string" calcext:value-type="string">
            <text:p>Strassenschäden</text:p>
          </table:table-cell>
          <table:table-cell table:style-name="ce99" office:value-type="float" office:value="0.615384615384615" calcext:value-type="float">
            <text:p>0.615</text:p>
          </table:table-cell>
          <table:table-cell/>
          <table:table-cell table:style-name="Default" table:number-columns-repeated="16366"/>
        </table:table-row>
        <table:table-row table:style-name="ro3">
          <table:table-cell office:value-type="float" office:value="169" calcext:value-type="float">
            <text:p>169</text:p>
          </table:table-cell>
          <table:table-cell office:value-type="string" calcext:value-type="string">
            <text:p>d534526b-870f-48aa-b589-0cae7beee902</text:p>
          </table:table-cell>
          <table:table-cell office:value-type="string" calcext:value-type="string">
            <text:p>drainage defect</text:p>
          </table:table-cell>
          <table:table-cell office:value-type="string" calcext:value-type="string">
            <text:p>drainage defect,drainage ditch,gutter defect,drainage system</text:p>
          </table:table-cell>
          <table:table-cell office:value-type="string" calcext:value-type="string">
            <text:p><text:s/>Entwässerungsrinnendefekt. Im Hinterhof der Wadianschreise 59 sind die Entwässerungsrinnendefekt.</text:p>
          </table:table-cell>
          <table:table-cell office:value-type="string" calcext:value-type="string">
            <text:p>Entwässerungsrinne defekt</text:p>
          </table:table-cell>
          <table:table-cell table:style-name="ce79" office:value-type="string" calcext:value-type="string">
            <text:p>Im Hinterhof der Vadianstrasse 59 sind die Entwässerungsrinnen defekt.</text:p>
          </table:table-cell>
          <table:table-cell table:style-name="ce79" office:value-type="string" calcext:value-type="string">
            <text:p>a drainage defect</text:p>
          </table:table-cell>
          <table:table-cell table:style-name="ce88" table:formula="of:=[.F170]&amp;&quot; &quot;&amp;[.G170]" office:value-type="string" office:string-value="Entwässerungsrinne defekt Im Hinterhof der Vadianstrasse 59 sind die Entwässerungsrinnen defekt." calcext:value-type="string">
            <text:p>Entwässerungsrinne defekt Im Hinterhof der Vadianstrasse 59 sind die Entwässerungsrinnen defekt.</text:p>
          </table:table-cell>
          <table:table-cell office:value-type="string" calcext:value-type="string">
            <text:p>x</text:p>
          </table:table-cell>
          <table:table-cell table:number-columns-repeated="4"/>
          <table:table-cell table:style-name="ce96" office:value-type="float" office:value="166" calcext:value-type="float">
            <text:p>166</text:p>
          </table:table-cell>
          <table:table-cell office:value-type="string" calcext:value-type="string">
            <text:p>Strassenschäden</text:p>
          </table:table-cell>
          <table:table-cell table:style-name="ce99" office:value-type="float" office:value="0.454545454545455" calcext:value-type="float">
            <text:p>0.455</text:p>
          </table:table-cell>
          <table:table-cell/>
          <table:table-cell table:style-name="Default" table:number-columns-repeated="16366"/>
        </table:table-row>
        <table:table-row table:style-name="ro30">
          <table:table-cell office:value-type="float" office:value="170" calcext:value-type="float">
            <text:p>170</text:p>
          </table:table-cell>
          <table:table-cell office:value-type="string" calcext:value-type="string">
            <text:p>3d7e87c0-c769-4100-8ea7-bba50bc99d35</text:p>
          </table:table-cell>
          <table:table-cell office:value-type="string" calcext:value-type="string">
            <text:p>potholes</text:p>
          </table:table-cell>
          <table:table-cell office:value-type="string" calcext:value-type="string">
            <text:p>potholes,Burgweiherweg,road,road surface</text:p>
          </table:table-cell>
          <table:table-cell office:value-type="string" calcext:value-type="string">
            <text:p><text:s/>Schlaglöcher im Burgweiherweg. Im oberen Teil des Burgweiherweges hat es Schlaglöcher. Wird dies bald behoben.</text:p>
          </table:table-cell>
          <table:table-cell office:value-type="string" calcext:value-type="string">
            <text:p>Schlaglöcher im Burgweiherweg</text:p>
          </table:table-cell>
          <table:table-cell table:style-name="ce79" office:value-type="string" calcext:value-type="string">
            <text:p>Im oberen Teil des Burgweiherweges hat es Schlaglöcher. Wird das bald behoben?</text:p>
          </table:table-cell>
          <table:table-cell table:style-name="ce79" office:value-type="string" calcext:value-type="string">
            <text:p>a potholes</text:p>
          </table:table-cell>
          <table:table-cell table:style-name="ce88" table:formula="of:=[.F171]&amp;&quot; &quot;&amp;[.G171]" office:value-type="string" office:string-value="Schlaglöcher im Burgweiherweg Im oberen Teil des Burgweiherweges hat es Schlaglöcher. Wird das bald behoben?" calcext:value-type="string">
            <text:p>Schlaglöcher im Burgweiherweg Im oberen Teil des Burgweiherweges hat es Schlaglöcher. Wird das bald behoben?</text:p>
          </table:table-cell>
          <table:table-cell office:value-type="string" calcext:value-type="string">
            <text:p>x</text:p>
          </table:table-cell>
          <table:table-cell table:number-columns-repeated="4"/>
          <table:table-cell table:style-name="ce96" office:value-type="float" office:value="172" calcext:value-type="float">
            <text:p>172</text:p>
          </table:table-cell>
          <table:table-cell office:value-type="string" calcext:value-type="string">
            <text:p>Strassenschäden</text:p>
          </table:table-cell>
          <table:table-cell table:style-name="ce99" office:value-type="float" office:value="0.2" calcext:value-type="float">
            <text:p>0.200</text:p>
          </table:table-cell>
          <table:table-cell/>
          <table:table-cell table:style-name="Default" table:number-columns-repeated="16366"/>
        </table:table-row>
        <table:table-row table:style-name="ro26">
          <table:table-cell table:style-name="ce76" office:value-type="float" office:value="171" calcext:value-type="float">
            <text:p>171</text:p>
          </table:table-cell>
          <table:table-cell table:style-name="ce76" office:value-type="string" calcext:value-type="string">
            <text:p>64e3944f-b9ff-477a-a667-cfd0dac3c8d7</text:p>
          </table:table-cell>
          <table:table-cell table:style-name="ce76" office:value-type="string" calcext:value-type="string">
            <text:p>stair step</text:p>
          </table:table-cell>
          <table:table-cell table:style-name="ce76" office:value-type="string" calcext:value-type="string">
            <text:p>stair step,broken stair step,rotten wood,wooden step,trail</text:p>
          </table:table-cell>
          <table:table-cell table:style-name="ce85" office:value-type="string" calcext:value-type="string">
            <text:p><text:s/>Treppenstufe abgebrochen, morsches Holz ziemlich gefährlich beim Brunnenbergsteig.</text:p>
          </table:table-cell>
          <table:table-cell table:style-name="ce76" office:value-type="string" calcext:value-type="string">
            <text:p>Treppenstufe abgebrochen</text:p>
          </table:table-cell>
          <table:table-cell table:style-name="ce85" office:value-type="string" calcext:value-type="string">
            <text:p>Morsches Holz, ziemlich gefährlich. Beim Brunnenbergsteig.</text:p>
          </table:table-cell>
          <table:table-cell table:style-name="ce85" office:value-type="string" calcext:value-type="string">
            <text:p>a broken stair step</text:p>
          </table:table-cell>
          <table:table-cell table:style-name="ce94" table:formula="of:=[.F172]&amp;&quot; &quot;&amp;[.G172]" office:value-type="string" office:string-value="Treppenstufe abgebrochen Morsches Holz, ziemlich gefährlich. Beim Brunnenbergsteig." calcext:value-type="string">
            <text:p>Treppenstufe abgebrochen Morsches Holz, ziemlich gefährlich. Beim Brunnenbergsteig.</text:p>
          </table:table-cell>
          <table:table-cell table:style-name="ce76" office:value-type="string" calcext:value-type="string">
            <text:p>x</text:p>
          </table:table-cell>
          <table:table-cell table:style-name="ce76" table:number-columns-repeated="4"/>
          <table:table-cell table:style-name="ce98" office:value-type="float" office:value="209" calcext:value-type="float">
            <text:p>209</text:p>
          </table:table-cell>
          <table:table-cell table:style-name="ce76" office:value-type="string" calcext:value-type="string">
            <text:p>Strassenschäden</text:p>
          </table:table-cell>
          <table:table-cell table:style-name="ce105" office:value-type="float" office:value="0.625" calcext:value-type="float">
            <text:p>0.625</text:p>
          </table:table-cell>
          <table:table-cell/>
          <table:table-cell table:style-name="ce76" table:number-columns-repeated="16366"/>
        </table:table-row>
        <table:table-row table:style-name="ro6">
          <table:table-cell table:style-name="ce76" office:value-type="float" office:value="172" calcext:value-type="float">
            <text:p>172</text:p>
          </table:table-cell>
          <table:table-cell table:style-name="ce76" office:value-type="string" calcext:value-type="string">
            <text:p>246a74a1-b6bd-4803-9dee-5abdb6d0886b</text:p>
          </table:table-cell>
          <table:table-cell table:style-name="ce76" office:value-type="string" calcext:value-type="string">
            <text:p>wooden step</text:p>
          </table:table-cell>
          <table:table-cell table:style-name="ce76" office:value-type="string" calcext:value-type="string">
            <text:p>wooden step,staircase,step,stair</text:p>
          </table:table-cell>
          <table:table-cell table:style-name="ce85" office:value-type="string" calcext:value-type="string">
            <text:p><text:s/>Holzstufe aus Treppe ausgebrochen. Ein Tritt fehlt.</text:p>
          </table:table-cell>
          <table:table-cell table:style-name="ce76" office:value-type="string" calcext:value-type="string">
            <text:p>Holzstufe aus Treppe ausgebrochen</text:p>
          </table:table-cell>
          <table:table-cell table:style-name="ce85" office:value-type="string" calcext:value-type="string">
            <text:p>Ein Tritt fehlt</text:p>
          </table:table-cell>
          <table:table-cell table:style-name="ce85" office:value-type="string" calcext:value-type="string">
            <text:p>a wooden step</text:p>
          </table:table-cell>
          <table:table-cell table:style-name="ce94" table:formula="of:=[.F173]&amp;&quot; &quot;&amp;[.G173]" office:value-type="string" office:string-value="Holzstufe aus Treppe ausgebrochen Ein Tritt fehlt" calcext:value-type="string">
            <text:p>Holzstufe aus Treppe ausgebrochen Ein Tritt fehlt</text:p>
          </table:table-cell>
          <table:table-cell table:style-name="ce76" office:value-type="string" calcext:value-type="string">
            <text:p>x</text:p>
          </table:table-cell>
          <table:table-cell table:style-name="ce76" table:number-columns-repeated="4"/>
          <table:table-cell table:style-name="ce98" office:value-type="float" office:value="88" calcext:value-type="float">
            <text:p>88</text:p>
          </table:table-cell>
          <table:table-cell table:style-name="ce76" office:value-type="string" calcext:value-type="string">
            <text:p>Strassenschäden</text:p>
          </table:table-cell>
          <table:table-cell table:style-name="ce105" office:value-type="float" office:value="0.285714285714286" calcext:value-type="float">
            <text:p>0.286</text:p>
          </table:table-cell>
          <table:table-cell/>
          <table:table-cell table:style-name="ce76" table:number-columns-repeated="16366"/>
        </table:table-row>
        <table:table-row table:style-name="ro28">
          <table:table-cell office:value-type="float" office:value="173" calcext:value-type="float">
            <text:p>173</text:p>
          </table:table-cell>
          <table:table-cell office:value-type="string" calcext:value-type="string">
            <text:p>4eb1b93a-e0a9-424b-96f0-5b859f51d906</text:p>
          </table:table-cell>
          <table:table-cell office:value-type="string" calcext:value-type="string">
            <text:p>drainpipe</text:p>
          </table:table-cell>
          <table:table-cell office:value-type="string" calcext:value-type="string">
            <text:p>drainpipe,gutter,road,hillside path,pavement</text:p>
          </table:table-cell>
          <table:table-cell office:value-type="string" calcext:value-type="string">
            <text:p><text:s/>Abflussrinne verstopft. Die Abflussrinne zwischen dem Hügelweg und der Hartungsstraße ist stark verschmutzt, sodass bei Regen es zu einem Rückstau von Wasser kommt. Die Straße dient auch als Gehweg zu den Liegenschaften des Hügelweges.</text:p>
          </table:table-cell>
          <table:table-cell office:value-type="string" calcext:value-type="string">
            <text:p>Abflussrinne verstopft</text:p>
          </table:table-cell>
          <table:table-cell table:style-name="ce79" office:value-type="string" calcext:value-type="string">
            <text:p>Die Abflussrinne zwischen dem Hügelweg und der Hardungstrasse ist stark verschmutz,t so dass es bei Regen zu einem Rückstau des Wassers kommt. Die Strasse dient auch als Gehweg zu den Liegenschaften des Hügelweges.</text:p>
          </table:table-cell>
          <table:table-cell table:style-name="ce79" office:value-type="string" calcext:value-type="string">
            <text:p>a road</text:p>
          </table:table-cell>
          <table:table-cell table:style-name="ce88" table:formula="of:=[.F174]&amp;&quot; &quot;&amp;[.G174]" office:value-type="string" office:string-value="Abflussrinne verstopft Die Abflussrinne zwischen dem Hügelweg und der Hardungstrasse ist stark verschmutz,t so dass es bei Regen zu einem Rückstau des Wassers kommt. Die Strasse dient auch als Gehweg zu den Liegenschaften des Hügelweges." calcext:value-type="string">
            <text:p>Abflussrinne verstopft Die Abflussrinne zwischen dem Hügelweg und der Hardungstrasse ist stark verschmutz,t so dass es bei Regen zu einem Rückstau des Wassers kommt. Die Strasse dient auch als Gehweg zu den Liegenschaften des Hügelweges.</text:p>
          </table:table-cell>
          <table:table-cell office:value-type="string" calcext:value-type="string">
            <text:p>x</text:p>
          </table:table-cell>
          <table:table-cell table:number-columns-repeated="4"/>
          <table:table-cell table:style-name="ce96" office:value-type="float" office:value="450" calcext:value-type="float">
            <text:p>450</text:p>
          </table:table-cell>
          <table:table-cell office:value-type="string" calcext:value-type="string">
            <text:p>Strassenschäden</text:p>
          </table:table-cell>
          <table:table-cell table:style-name="ce99" office:value-type="float" office:value="0.285714285714286" calcext:value-type="float">
            <text:p>0.286</text:p>
          </table:table-cell>
          <table:table-cell/>
          <table:table-cell table:style-name="Default" table:number-columns-repeated="16366"/>
        </table:table-row>
        <table:table-row table:style-name="ro19">
          <table:table-cell office:value-type="float" office:value="174" calcext:value-type="float">
            <text:p>174</text:p>
          </table:table-cell>
          <table:table-cell office:value-type="string" calcext:value-type="string">
            <text:p>ef7128eb-cee5-4bf2-a8f4-9dfbd6d85a45</text:p>
          </table:table-cell>
          <table:table-cell office:value-type="string" calcext:value-type="string">
            <text:p>pothole</text:p>
          </table:table-cell>
          <table:table-cell office:value-type="string" calcext:value-type="string">
            <text:p>pothole,road,lane,Heresau</text:p>
          </table:table-cell>
          <table:table-cell office:value-type="string" calcext:value-type="string">
            <text:p><text:s/>Schlagloch auf linker Spur Richtung Heresau. Die Grösse des Schlaglochs ist ungefährlich für Autos, aber für Verkehrsmittel mit zwei Rädern zu vermeiden.</text:p>
          </table:table-cell>
          <table:table-cell office:value-type="string" calcext:value-type="string">
            <text:p>Schlagloch auf linker Spur Richtung Herisau</text:p>
          </table:table-cell>
          <table:table-cell table:style-name="ce79" office:value-type="string" calcext:value-type="string">
            <text:p>Die Grösse des Schlaglochs ist ungefährlich für Autos, aber für Verkehrsmittel mit zwei Rädern zu vermeiden.</text:p>
          </table:table-cell>
          <table:table-cell table:style-name="ce79" office:value-type="string" calcext:value-type="string">
            <text:p>a pothole</text:p>
          </table:table-cell>
          <table:table-cell table:style-name="ce88" table:formula="of:=[.F175]&amp;&quot; &quot;&amp;[.G175]" office:value-type="string" office:string-value="Schlagloch auf linker Spur Richtung Herisau Die Grösse des Schlaglochs ist ungefährlich für Autos, aber für Verkehrsmittel mit zwei Rädern zu vermeiden." calcext:value-type="string">
            <text:p>Schlagloch auf linker Spur Richtung Herisau Die Grösse des Schlaglochs ist ungefährlich für Autos, aber für Verkehrsmittel mit zwei Rädern zu vermeiden.</text:p>
          </table:table-cell>
          <table:table-cell office:value-type="string" calcext:value-type="string">
            <text:p>x</text:p>
          </table:table-cell>
          <table:table-cell table:number-columns-repeated="4"/>
          <table:table-cell table:style-name="ce96" office:value-type="float" office:value="308" calcext:value-type="float">
            <text:p>308</text:p>
          </table:table-cell>
          <table:table-cell office:value-type="string" calcext:value-type="string">
            <text:p>Strassenschäden</text:p>
          </table:table-cell>
          <table:table-cell table:style-name="ce99" office:value-type="float" office:value="0.0454545454545455" calcext:value-type="float">
            <text:p>0.045</text:p>
          </table:table-cell>
          <table:table-cell/>
          <table:table-cell table:style-name="Default" table:number-columns-repeated="16366"/>
        </table:table-row>
        <table:table-row table:style-name="ro6">
          <table:table-cell office:value-type="float" office:value="175" calcext:value-type="float">
            <text:p>175</text:p>
          </table:table-cell>
          <table:table-cell office:value-type="string" calcext:value-type="string">
            <text:p>38e71976-b16c-477d-9238-85bea76781c5</text:p>
          </table:table-cell>
          <table:table-cell office:value-type="string" calcext:value-type="string">
            <text:p>cap</text:p>
          </table:table-cell>
          <table:table-cell office:value-type="string" calcext:value-type="string">
            <text:p>cap,knob,fitting</text:p>
          </table:table-cell>
          <table:table-cell office:value-type="string" calcext:value-type="string">
            <text:p><text:s/>Schieberkappe verkehrt klemmt.</text:p>
          </table:table-cell>
          <table:table-cell office:value-type="string" calcext:value-type="string">
            <text:p>Schieberkappe</text:p>
          </table:table-cell>
          <table:table-cell table:style-name="ce79" office:value-type="string" calcext:value-type="string">
            <text:p>Schieberkappe verkehrt (klemmt)</text:p>
          </table:table-cell>
          <table:table-cell table:style-name="ce79" office:value-type="string" calcext:value-type="string">
            <text:p>null</text:p>
          </table:table-cell>
          <table:table-cell table:style-name="ce88" table:formula="of:=[.F176]&amp;&quot; &quot;&amp;[.G176]" office:value-type="string" office:string-value="Schieberkappe Schieberkappe verkehrt (klemmt)" calcext:value-type="string">
            <text:p>Schieberkappe Schieberkappe verkehrt (klemmt)</text:p>
          </table:table-cell>
          <table:table-cell table:number-columns-repeated="2"/>
          <table:table-cell office:value-type="string" calcext:value-type="string">
            <text:p>x</text:p>
          </table:table-cell>
          <table:table-cell table:number-columns-repeated="2"/>
          <table:table-cell table:style-name="ce96" office:value-type="float" office:value="87" calcext:value-type="float">
            <text:p>87</text:p>
          </table:table-cell>
          <table:table-cell office:value-type="string" calcext:value-type="string">
            <text:p>Strassenschäden</text:p>
          </table:table-cell>
          <table:table-cell table:style-name="ce99" office:value-type="float" office:value="0.5" calcext:value-type="float">
            <text:p>0.500</text:p>
          </table:table-cell>
          <table:table-cell/>
          <table:table-cell table:style-name="Default" table:number-columns-repeated="16366"/>
        </table:table-row>
        <table:table-row table:style-name="ro30">
          <table:table-cell office:value-type="float" office:value="176" calcext:value-type="float">
            <text:p>176</text:p>
          </table:table-cell>
          <table:table-cell office:value-type="string" calcext:value-type="string">
            <text:p>4cb312f1-7208-4937-ba83-37a3f454758a</text:p>
          </table:table-cell>
          <table:table-cell office:value-type="string" calcext:value-type="string">
            <text:p>planting</text:p>
          </table:table-cell>
          <table:table-cell office:value-type="string" calcext:value-type="string">
            <text:p>planting,spring planting,fountain,St. Leonhard-Percli</text:p>
          </table:table-cell>
          <table:table-cell office:value-type="string" calcext:value-type="string">
            <text:p><text:s/>Dank für die Bepflanzung. Vielen Dank für die schöne Frühlingsbepflanzung rund um den Brunnen im St. Leonhard-Percli.</text:p>
          </table:table-cell>
          <table:table-cell office:value-type="string" calcext:value-type="string">
            <text:p>Dank für Bepflanzung</text:p>
          </table:table-cell>
          <table:table-cell table:style-name="ce79" office:value-type="string" calcext:value-type="string">
            <text:p>Vielen Dank für die schöne Frühlingsbepflanzung rund um den Brunnen im St.Leonhard-Pärkli.</text:p>
          </table:table-cell>
          <table:table-cell table:style-name="ce79" office:value-type="string" calcext:value-type="string">
            <text:p>a fountain</text:p>
          </table:table-cell>
          <table:table-cell table:style-name="ce88" table:formula="of:=[.F177]&amp;&quot; &quot;&amp;[.G177]" office:value-type="string" office:string-value="Dank für Bepflanzung Vielen Dank für die schöne Frühlingsbepflanzung rund um den Brunnen im St.Leonhard-Pärkli." calcext:value-type="string">
            <text:p>Dank für Bepflanzung Vielen Dank für die schöne Frühlingsbepflanzung rund um den Brunnen im St.Leonhard-Pärkli.</text:p>
          </table:table-cell>
          <table:table-cell table:number-columns-repeated="2"/>
          <table:table-cell office:value-type="string" calcext:value-type="string">
            <text:p>x</text:p>
          </table:table-cell>
          <table:table-cell table:number-columns-repeated="2"/>
          <table:table-cell table:style-name="ce96" office:value-type="float" office:value="203" calcext:value-type="float">
            <text:p>203</text:p>
          </table:table-cell>
          <table:table-cell office:value-type="string" calcext:value-type="string">
            <text:p>Diverses</text:p>
          </table:table-cell>
          <table:table-cell table:style-name="ce99" office:value-type="float" office:value="0.266666666666667" calcext:value-type="float">
            <text:p>0.267</text:p>
          </table:table-cell>
          <table:table-cell/>
          <table:table-cell table:style-name="Default" table:number-columns-repeated="16366"/>
        </table:table-row>
        <table:table-row table:style-name="ro19">
          <table:table-cell office:value-type="float" office:value="177" calcext:value-type="float">
            <text:p>177</text:p>
          </table:table-cell>
          <table:table-cell office:value-type="string" calcext:value-type="string">
            <text:p>f3b2407a-f765-41af-b400-898176ec4b9c</text:p>
          </table:table-cell>
          <table:table-cell office:value-type="string" calcext:value-type="string">
            <text:p>handrail</text:p>
          </table:table-cell>
          <table:table-cell office:value-type="string" calcext:value-type="string">
            <text:p>handrail,staircase,metal screws,plastic,railing</text:p>
          </table:table-cell>
          <table:table-cell office:value-type="string" calcext:value-type="string">
            <text:p><text:s/>Geländerbierttreppe muss angeschraubt werden. Zuoberst am Treppengeländer fehlen zwei Metallschrauben. Zudem ist etwas Plastik weg, was aber nicht fest stört.</text:p>
          </table:table-cell>
          <table:table-cell office:value-type="string" calcext:value-type="string">
            <text:p>Geländer Birttreppe muss angeschraubt werden.</text:p>
          </table:table-cell>
          <table:table-cell table:style-name="ce79" office:value-type="string" calcext:value-type="string">
            <text:p>Zuoberst am Treppengeländer fehlen zwei Metallschrauben. Zudem ist etwas Plastik weg, was aber nicht fest stört.</text:p>
          </table:table-cell>
          <table:table-cell table:style-name="ce79" office:value-type="string" calcext:value-type="string">
            <text:p>null</text:p>
          </table:table-cell>
          <table:table-cell table:style-name="ce88" table:formula="of:=[.F178]&amp;&quot; &quot;&amp;[.G178]" office:value-type="string" office:string-value="Geländer Birttreppe muss angeschraubt werden. Zuoberst am Treppengeländer fehlen zwei Metallschrauben. Zudem ist etwas Plastik weg, was aber nicht fest stört." calcext:value-type="string">
            <text:p>Geländer Birttreppe muss angeschraubt werden. Zuoberst am Treppengeländer fehlen zwei Metallschrauben. Zudem ist etwas Plastik weg, was aber nicht fest stört.</text:p>
          </table:table-cell>
          <table:table-cell table:number-columns-repeated="4"/>
          <table:table-cell office:value-type="string" calcext:value-type="string">
            <text:p>x</text:p>
          </table:table-cell>
          <table:table-cell table:style-name="ce96" office:value-type="float" office:value="99" calcext:value-type="float">
            <text:p>99</text:p>
          </table:table-cell>
          <table:table-cell office:value-type="string" calcext:value-type="string">
            <text:p>Diverses</text:p>
          </table:table-cell>
          <table:table-cell table:style-name="ce99" office:value-type="float" office:value="0.0952380952380952" calcext:value-type="float">
            <text:p>0.095</text:p>
          </table:table-cell>
          <table:table-cell/>
          <table:table-cell table:style-name="Default" table:number-columns-repeated="16366"/>
        </table:table-row>
        <table:table-row table:style-name="ro28">
          <table:table-cell office:value-type="float" office:value="178" calcext:value-type="float">
            <text:p>178</text:p>
          </table:table-cell>
          <table:table-cell office:value-type="string" calcext:value-type="string">
            <text:p>78a5f229-d3f3-4354-84a3-dd36e1d0689f</text:p>
          </table:table-cell>
          <table:table-cell office:value-type="string" calcext:value-type="string">
            <text:p>bench</text:p>
          </table:table-cell>
          <table:table-cell office:value-type="string" calcext:value-type="string">
            <text:p>bench,property,Brauerstraße 107,winter,restoration</text:p>
          </table:table-cell>
          <table:table-cell office:value-type="string" calcext:value-type="string">
            <text:p><text:s/>Danke. Bei den mehrheitlich negativen Meldungen möchte ich einfach mal Danke sagen. Das Bänkli östlich der Liegenschaft Brauerstraße 107 kam top restauriert und gepflegt nach dem Winter wieder an seinen Platz. Merci vielmals. Danke.</text:p>
          </table:table-cell>
          <table:table-cell office:value-type="string" calcext:value-type="string">
            <text:p>Danke</text:p>
          </table:table-cell>
          <table:table-cell table:style-name="ce79" office:value-type="string" calcext:value-type="string">
            <text:p>Bei den mehrheitlich negativen Meldungen möchte ich einfach mal danke sagen: das Bänkli östlich der Liegenschaft Brauerstrasse 107 kam top restauriert und gepflegt nach dem Winter wieder zurück an seinen Platz - merci vielmals, danke!</text:p>
          </table:table-cell>
          <table:table-cell table:style-name="ce79" office:value-type="string" calcext:value-type="string">
            <text:p>a bench</text:p>
          </table:table-cell>
          <table:table-cell table:style-name="ce88" table:formula="of:=[.F179]&amp;&quot; &quot;&amp;[.G179]" office:value-type="string" office:string-value="Danke Bei den mehrheitlich negativen Meldungen möchte ich einfach mal danke sagen: das Bänkli östlich der Liegenschaft Brauerstrasse 107 kam top restauriert und gepflegt nach dem Winter wieder zurück an seinen Platz - merci vielmals, danke!" calcext:value-type="string">
            <text:p>Danke Bei den mehrheitlich negativen Meldungen möchte ich einfach mal danke sagen: das Bänkli östlich der Liegenschaft Brauerstrasse 107 kam top restauriert und gepflegt nach dem Winter wieder zurück an seinen Platz - merci vielmals, danke!</text:p>
          </table:table-cell>
          <table:table-cell office:value-type="string" calcext:value-type="string">
            <text:p>x</text:p>
          </table:table-cell>
          <table:table-cell table:number-columns-repeated="4"/>
          <table:table-cell table:style-name="ce96" office:value-type="float" office:value="193" calcext:value-type="float">
            <text:p>193</text:p>
          </table:table-cell>
          <table:table-cell office:value-type="string" calcext:value-type="string">
            <text:p>Diverses</text:p>
          </table:table-cell>
          <table:table-cell table:style-name="ce99" office:value-type="float" office:value="0.305555555555556" calcext:value-type="float">
            <text:p>0.306</text:p>
          </table:table-cell>
          <table:table-cell/>
          <table:table-cell table:style-name="Default" table:number-columns-repeated="16366"/>
        </table:table-row>
        <table:table-row table:style-name="ro12">
          <table:table-cell table:style-name="ce76" office:value-type="float" office:value="179" calcext:value-type="float">
            <text:p>179</text:p>
          </table:table-cell>
          <table:table-cell table:style-name="ce76" office:value-type="string" calcext:value-type="string">
            <text:p>137e8bd9-1ecd-4ff2-a95d-5e38cd46ff82</text:p>
          </table:table-cell>
          <table:table-cell table:style-name="ce76" office:value-type="string" calcext:value-type="string">
            <text:p>bicycle stand</text:p>
          </table:table-cell>
          <table:table-cell table:style-name="ce76" office:value-type="string" calcext:value-type="string">
            <text:p>bicycle stand,bicycle rack,WC,restroom,weather</text:p>
          </table:table-cell>
          <table:table-cell table:style-name="ce85" office:value-type="string" calcext:value-type="string">
            <text:p><text:s/>Velo-Ständer Mannenweiher. Wann werden die Velo-Ständer beim WC Hüsli am östlichen Ende des Mannenweihers wieder hingestellt? Das Wetter ist schön, das WC offen und es hat viele Leute dort, welche ihre Velos sonst irgendwo hinstellen. Vielen Dank.</text:p>
          </table:table-cell>
          <table:table-cell table:style-name="ce76" office:value-type="string" calcext:value-type="string">
            <text:p>Veloständer Mannenweiher</text:p>
          </table:table-cell>
          <table:table-cell table:style-name="ce85" office:value-type="string" calcext:value-type="string">
            <text:p>Wann werden die Veloständer beim WC-Hüsli am östlichen Ende des Mannenweihers wieder hingestellt? Das Wetter ist schön, das WC offen und es hat viele Leute dort, welche ihre Velos sonst irgendwo hinstellen. Vielen Dank</text:p>
          </table:table-cell>
          <table:table-cell table:style-name="ce85" office:value-type="string" calcext:value-type="string">
            <text:p>null</text:p>
          </table:table-cell>
          <table:table-cell table:style-name="ce94" table:formula="of:=[.F180]&amp;&quot; &quot;&amp;[.G180]" office:value-type="string" office:string-value="Veloständer Mannenweiher Wann werden die Veloständer beim WC-Hüsli am östlichen Ende des Mannenweihers wieder hingestellt? Das Wetter ist schön, das WC offen und es hat viele Leute dort, welche ihre Velos sonst irgendwo hinstellen. Vielen Dank" calcext:value-type="string">
            <text:p>Veloständer Mannenweiher Wann werden die Veloständer beim WC-Hüsli am östlichen Ende des Mannenweihers wieder hingestellt? Das Wetter ist schön, das WC offen und es hat viele Leute dort, welche ihre Velos sonst irgendwo hinstellen. Vielen Dank</text:p>
          </table:table-cell>
          <table:table-cell table:style-name="ce76" office:value-type="string" calcext:value-type="string">
            <text:p>x</text:p>
          </table:table-cell>
          <table:table-cell table:style-name="ce76" table:number-columns-repeated="4"/>
          <table:table-cell table:style-name="ce98" office:value-type="float" office:value="99" calcext:value-type="float">
            <text:p>99</text:p>
          </table:table-cell>
          <table:table-cell table:style-name="ce76" office:value-type="string" calcext:value-type="string">
            <text:p>Diverses</text:p>
          </table:table-cell>
          <table:table-cell table:style-name="ce105" office:value-type="float" office:value="0.166666666666667" calcext:value-type="float">
            <text:p>0.167</text:p>
          </table:table-cell>
          <table:table-cell/>
          <table:table-cell table:style-name="ce76" table:number-columns-repeated="16366"/>
        </table:table-row>
        <table:table-row table:style-name="ro26">
          <table:table-cell office:value-type="float" office:value="180" calcext:value-type="float">
            <text:p>180</text:p>
          </table:table-cell>
          <table:table-cell office:value-type="string" calcext:value-type="string">
            <text:p>85256b14-b50d-42c7-8eca-b521527bc5d6</text:p>
          </table:table-cell>
          <table:table-cell office:value-type="string" calcext:value-type="string">
            <text:p>condensation</text:p>
          </table:table-cell>
          <table:table-cell office:value-type="string" calcext:value-type="string">
            <text:p>condensation,water,place,area,tourist</text:p>
          </table:table-cell>
          <table:table-cell office:value-type="string" calcext:value-type="string">
            <text:p><text:s/>Unleserlich. Alles unleserlich und mit Kondenswasser voll. Nicht gerade touristenfreundlich.</text:p>
          </table:table-cell>
          <table:table-cell office:value-type="string" calcext:value-type="string">
            <text:p>Unleserlich</text:p>
          </table:table-cell>
          <table:table-cell table:style-name="ce79" office:value-type="string" calcext:value-type="string">
            <text:p>Alles unleserlich und mit Kondenswasser voll.Nicht gerade Touristen freundlich.</text:p>
          </table:table-cell>
          <table:table-cell table:style-name="ce79" office:value-type="string" calcext:value-type="string">
            <text:p>null</text:p>
          </table:table-cell>
          <table:table-cell table:style-name="ce88" table:formula="of:=[.F181]&amp;&quot; &quot;&amp;[.G181]" office:value-type="string" office:string-value="Unleserlich Alles unleserlich und mit Kondenswasser voll.Nicht gerade Touristen freundlich." calcext:value-type="string">
            <text:p>Unleserlich Alles unleserlich und mit Kondenswasser voll.Nicht gerade Touristen freundlich.</text:p>
          </table:table-cell>
          <table:table-cell table:number-columns-repeated="4"/>
          <table:table-cell office:value-type="string" calcext:value-type="string">
            <text:p>x</text:p>
          </table:table-cell>
          <table:table-cell table:style-name="ce96" office:value-type="float" office:value="87" calcext:value-type="float">
            <text:p>87</text:p>
          </table:table-cell>
          <table:table-cell office:value-type="string" calcext:value-type="string">
            <text:p>Diverses</text:p>
          </table:table-cell>
          <table:table-cell table:style-name="ce99" office:value-type="float" office:value="0.5" calcext:value-type="float">
            <text:p>0.500</text:p>
          </table:table-cell>
          <table:table-cell/>
          <table:table-cell table:style-name="Default" table:number-columns-repeated="16366"/>
        </table:table-row>
        <table:table-row table:style-name="ro29">
          <table:table-cell office:value-type="float" office:value="181" calcext:value-type="float">
            <text:p>181</text:p>
          </table:table-cell>
          <table:table-cell office:value-type="string" calcext:value-type="string">
            <text:p>e98f4dcf-7aec-4d42-a826-ad17de8c648e</text:p>
          </table:table-cell>
          <table:table-cell office:value-type="string" calcext:value-type="string">
            <text:p>dirty bench</text:p>
          </table:table-cell>
          <table:table-cell office:value-type="string" calcext:value-type="string">
            <text:p>dirty bench,bench,seating,public bench</text:p>
          </table:table-cell>
          <table:table-cell office:value-type="string" calcext:value-type="string">
            <text:p><text:s/>Verunreinigte Sitzbank bei der Haltestelle. Danke für die Reinigung des Sitzbanks.</text:p>
          </table:table-cell>
          <table:table-cell office:value-type="string" calcext:value-type="string">
            <text:p>Veruneinigte Sitzbank bei der Haltestelle</text:p>
          </table:table-cell>
          <table:table-cell table:style-name="ce79" office:value-type="string" calcext:value-type="string">
            <text:p>Danke für die Reinigung des Sitzbank</text:p>
          </table:table-cell>
          <table:table-cell table:style-name="ce79" office:value-type="string" calcext:value-type="string">
            <text:p>null</text:p>
          </table:table-cell>
          <table:table-cell table:style-name="ce88" table:formula="of:=[.F182]&amp;&quot; &quot;&amp;[.G182]" office:value-type="string" office:string-value="Veruneinigte Sitzbank bei der Haltestelle Danke für die Reinigung des Sitzbank" calcext:value-type="string">
            <text:p>Veruneinigte Sitzbank bei der Haltestelle Danke für die Reinigung des Sitzbank</text:p>
          </table:table-cell>
          <table:table-cell table:number-columns-repeated="4"/>
          <table:table-cell office:value-type="string" calcext:value-type="string">
            <text:p>x</text:p>
          </table:table-cell>
          <table:table-cell table:style-name="ce96" office:value-type="float" office:value="84" calcext:value-type="float">
            <text:p>84</text:p>
          </table:table-cell>
          <table:table-cell office:value-type="string" calcext:value-type="string">
            <text:p>Diverses</text:p>
          </table:table-cell>
          <table:table-cell table:style-name="ce99" office:value-type="float" office:value="0.272727272727273" calcext:value-type="float">
            <text:p>0.273</text:p>
          </table:table-cell>
          <table:table-cell/>
          <table:table-cell table:style-name="Default" table:number-columns-repeated="16366"/>
        </table:table-row>
        <table:table-row table:style-name="ro6">
          <table:table-cell office:value-type="float" office:value="182" calcext:value-type="float">
            <text:p>182</text:p>
          </table:table-cell>
          <table:table-cell office:value-type="string" calcext:value-type="string">
            <text:p>496498be-2a75-4a54-b760-b1f5c12f4bcb</text:p>
          </table:table-cell>
          <table:table-cell office:value-type="string" calcext:value-type="string">
            <text:p>roof</text:p>
          </table:table-cell>
          <table:table-cell office:value-type="string" calcext:value-type="string">
            <text:p>roof,bush hut,cow,seats</text:p>
          </table:table-cell>
          <table:table-cell office:value-type="string" calcext:value-type="string">
            <text:p><text:s/>Wasserablauf vom Bushüsli-Dach. Rind auf die Sitze.</text:p>
          </table:table-cell>
          <table:table-cell office:value-type="string" calcext:value-type="string">
            <text:p>Wasserablauf vom Bushüsli Dach</text:p>
          </table:table-cell>
          <table:table-cell table:style-name="ce79" office:value-type="string" calcext:value-type="string">
            <text:p>Rinnt auf die Sitze</text:p>
          </table:table-cell>
          <table:table-cell table:style-name="ce79" office:value-type="string" calcext:value-type="string">
            <text:p>null</text:p>
          </table:table-cell>
          <table:table-cell table:style-name="ce88" table:formula="of:=[.F183]&amp;&quot; &quot;&amp;[.G183]" office:value-type="string" office:string-value="Wasserablauf vom Bushüsli Dach Rinnt auf die Sitze" calcext:value-type="string">
            <text:p>Wasserablauf vom Bushüsli Dach Rinnt auf die Sitze</text:p>
          </table:table-cell>
          <table:table-cell/>
          <table:table-cell office:value-type="string" calcext:value-type="string">
            <text:p>x</text:p>
          </table:table-cell>
          <table:table-cell table:number-columns-repeated="3"/>
          <table:table-cell table:style-name="ce96" office:value-type="float" office:value="81" calcext:value-type="float">
            <text:p>81</text:p>
          </table:table-cell>
          <table:table-cell office:value-type="string" calcext:value-type="string">
            <text:p>Diverses</text:p>
          </table:table-cell>
          <table:table-cell table:style-name="ce99" office:value-type="float" office:value="0.5" calcext:value-type="float">
            <text:p>0.500</text:p>
          </table:table-cell>
          <table:table-cell/>
          <table:table-cell table:style-name="Default" table:number-columns-repeated="16366"/>
        </table:table-row>
        <table:table-row table:style-name="ro7">
          <table:table-cell office:value-type="float" office:value="183" calcext:value-type="float">
            <text:p>183</text:p>
          </table:table-cell>
          <table:table-cell office:value-type="string" calcext:value-type="string">
            <text:p>afb1ff9e-6d45-4e1a-a3b5-c1afe46f5ba1</text:p>
          </table:table-cell>
          <table:table-cell office:value-type="string" calcext:value-type="string">
            <text:p>fountain figure</text:p>
          </table:table-cell>
          <table:table-cell office:value-type="string" calcext:value-type="string">
            <text:p>fountain figure,duck,playground,Seeblickstraße</text:p>
          </table:table-cell>
          <table:table-cell office:value-type="string" calcext:value-type="string">
            <text:p><text:s/>Brunnen auf Spielplatz. Grüezi miteinander. Beim Spielplatz Seeblickstraße ist die Brunnenfigur Ente nicht mehr gut verankert. Es wäre schön, wenn die kleine Ente wieder gut einbetoniert wäre. Danke.</text:p>
          </table:table-cell>
          <table:table-cell office:value-type="string" calcext:value-type="string">
            <text:p>Brunnen auf Spielplatz</text:p>
          </table:table-cell>
          <table:table-cell table:style-name="ce79" office:value-type="string" calcext:value-type="string">
            <text:p>Grüezi mitenand Beim Spielplatz Seeblickstrasse ist die Brunnenfigur ( Ente ) nicht mehr gut verankert. Es wäre schön wenn die kleine Ente wieder gut einbetoniert wäre! Danke!</text:p>
            <text:p/>
          </table:table-cell>
          <table:table-cell table:style-name="ce79" office:value-type="string" calcext:value-type="string">
            <text:p>a duck</text:p>
          </table:table-cell>
          <table:table-cell table:style-name="ce88" table:formula="of:=[.F184]&amp;&quot; &quot;&amp;[.G184]" office:value-type="string" office:string-value="Brunnen auf Spielplatz Grüezi mitenand Beim Spielplatz Seeblickstrasse ist die Brunnenfigur ( Ente ) nicht mehr gut verankert. Es wäre schön wenn die kleine Ente wieder gut einbetoniert wäre! Danke!&#10;" calcext:value-type="string">
            <text:p>Brunnen auf Spielplatz Grüezi mitenand Beim Spielplatz Seeblickstrasse ist die Brunnenfigur ( Ente ) nicht mehr gut verankert. Es wäre schön wenn die kleine Ente wieder gut einbetoniert wäre! Danke!</text:p>
            <text:p/>
          </table:table-cell>
          <table:table-cell office:value-type="string" calcext:value-type="string">
            <text:p>x</text:p>
          </table:table-cell>
          <table:table-cell table:number-columns-repeated="4"/>
          <table:table-cell table:style-name="ce96" office:value-type="float" office:value="184" calcext:value-type="float">
            <text:p>184</text:p>
          </table:table-cell>
          <table:table-cell office:value-type="string" calcext:value-type="string">
            <text:p>Diverses</text:p>
          </table:table-cell>
          <table:table-cell table:style-name="ce99" office:value-type="float" office:value="0.266666666666667" calcext:value-type="float">
            <text:p>0.267</text:p>
          </table:table-cell>
          <table:table-cell/>
          <table:table-cell table:style-name="Default" table:number-columns-repeated="16366"/>
        </table:table-row>
        <table:table-row table:style-name="ro30">
          <table:table-cell table:style-name="ce76" office:value-type="float" office:value="184" calcext:value-type="float">
            <text:p>184</text:p>
          </table:table-cell>
          <table:table-cell table:style-name="ce76" office:value-type="string" calcext:value-type="string">
            <text:p>19a1d042-af35-481e-8a42-55b6f3133739</text:p>
          </table:table-cell>
          <table:table-cell table:style-name="ce76" office:value-type="string" calcext:value-type="string">
            <text:p>accident trap</text:p>
          </table:table-cell>
          <table:table-cell table:style-name="ce76" office:value-type="string" calcext:value-type="string">
            <text:p>accident trap,bridge,railing,construction error,guardrail</text:p>
          </table:table-cell>
          <table:table-cell table:style-name="ce85" office:value-type="string" calcext:value-type="string">
            <text:p><text:s/>Unfallfalle mit kindersehr gefährlich bauliche Fehlleistung auf beiden Seiten der Brücke falsch installierte Geländer.</text:p>
          </table:table-cell>
          <table:table-cell table:style-name="ce76" office:value-type="string" calcext:value-type="string">
            <text:p>Unfallfalle</text:p>
          </table:table-cell>
          <table:table-cell table:style-name="ce85" office:value-type="string" calcext:value-type="string">
            <text:p>Mit Kinder sehr gefährlich . Bauliche Fehlleistung. Auf beiden Seiten der Brücke falsch installierte Geländer.</text:p>
          </table:table-cell>
          <table:table-cell table:style-name="ce85" office:value-type="string" calcext:value-type="string">
            <text:p>a railing</text:p>
          </table:table-cell>
          <table:table-cell table:style-name="ce94" table:formula="of:=[.F185]&amp;&quot; &quot;&amp;[.G185]" office:value-type="string" office:string-value="Unfallfalle Mit Kinder sehr gefährlich . Bauliche Fehlleistung. Auf beiden Seiten der Brücke falsch installierte Geländer." calcext:value-type="string">
            <text:p>Unfallfalle Mit Kinder sehr gefährlich . Bauliche Fehlleistung. Auf beiden Seiten der Brücke falsch installierte Geländer.</text:p>
          </table:table-cell>
          <table:table-cell table:style-name="ce76" table:number-columns-repeated="4"/>
          <table:table-cell table:style-name="ce76" office:value-type="string" calcext:value-type="string">
            <text:p>x</text:p>
          </table:table-cell>
          <table:table-cell table:style-name="ce98" office:value-type="float" office:value="184" calcext:value-type="float">
            <text:p>184</text:p>
          </table:table-cell>
          <table:table-cell table:style-name="ce76" office:value-type="string" calcext:value-type="string">
            <text:p>Diverses</text:p>
          </table:table-cell>
          <table:table-cell table:style-name="ce105" office:value-type="float" office:value="0.4375" calcext:value-type="float">
            <text:p>0.438</text:p>
          </table:table-cell>
          <table:table-cell/>
          <table:table-cell table:style-name="ce76" table:number-columns-repeated="16366"/>
        </table:table-row>
        <table:table-row table:style-name="ro13">
          <table:table-cell office:value-type="float" office:value="185" calcext:value-type="float">
            <text:p>185</text:p>
          </table:table-cell>
          <table:table-cell office:value-type="string" calcext:value-type="string">
            <text:p>2d564cd1-38e8-4578-8e98-19fb95568e38</text:p>
          </table:table-cell>
          <table:table-cell office:value-type="string" calcext:value-type="string">
            <text:p>motorcycle parking lot</text:p>
          </table:table-cell>
          <table:table-cell office:value-type="string" calcext:value-type="string">
            <text:p>motorcycle parking lot,parking restriction,vehicles,bicycles,police</text:p>
          </table:table-cell>
          <table:table-cell office:value-type="string" calcext:value-type="string">
            <text:p><text:s/>Missachtung Parkverbot Beim Motorradparkplatz an der Lagerstrasse wird das Parkverbot für andere Fahrzeuge regelmässig, meist durch Velofahrer, missachtet. Dabei stehen die gleichen Velos manchmal wochenlang falsch. Es wäre sehr zu begrüssen, wenn die Stadtpolizei diesen Parkplatz in der gleichen Regelmässigkeit wie bei den Autoparkplätzen kontrollieren würde.</text:p>
          </table:table-cell>
          <table:table-cell office:value-type="string" calcext:value-type="string">
            <text:p>Missachtung Parkverbot</text:p>
          </table:table-cell>
          <table:table-cell table:style-name="ce79" office:value-type="string" calcext:value-type="string">
            <text:p>Beim Motorradparkplatz an der Lagerstrasse wird das Parkverbot für andere Fahrzeuge regelmässig (meist durch Velofahrer) missachtet. Dabei stehen die gleichen Velos manchmal wochenlang falsch. Es wäre sehr zu begrüssen, wenn die Stadtpolizei diesen Parkplatz in der gleichen Regelmässigkeit wie bei den Autoparkplätzen kontrollieren würde.</text:p>
          </table:table-cell>
          <table:table-cell table:style-name="ce79" office:value-type="string" calcext:value-type="string">
            <text:p>a parking restriction</text:p>
          </table:table-cell>
          <table:table-cell table:style-name="ce88" table:formula="of:=[.F186]&amp;&quot; &quot;&amp;[.G186]" office:value-type="string" office:string-value="Missachtung Parkverbot Beim Motorradparkplatz an der Lagerstrasse wird das Parkverbot für andere Fahrzeuge regelmässig (meist durch Velofahrer) missachtet. Dabei stehen die gleichen Velos manchmal wochenlang falsch. Es wäre sehr zu begrüssen, wenn die Stadtpolizei diesen Parkplatz in der gleichen Regelmässigkeit wie bei den Autoparkplätzen kontrollieren würde." calcext:value-type="string">
            <text:p>Missachtung Parkverbot Beim Motorradparkplatz an der Lagerstrasse wird das Parkverbot für andere Fahrzeuge regelmässig (meist durch Velofahrer) missachtet. Dabei stehen die gleichen Velos manchmal wochenlang falsch. Es wäre sehr zu begrüssen, wenn die Stadtpolizei diesen Parkplatz in der gleichen Regelmässigkeit wie bei den Autoparkplätzen kontrollieren würde.</text:p>
          </table:table-cell>
          <table:table-cell office:value-type="string" calcext:value-type="string">
            <text:p>x</text:p>
          </table:table-cell>
          <table:table-cell table:number-columns-repeated="4"/>
          <table:table-cell table:style-name="ce96" office:value-type="float" office:value="251" calcext:value-type="float">
            <text:p>251</text:p>
          </table:table-cell>
          <table:table-cell office:value-type="string" calcext:value-type="string">
            <text:p>Diverses</text:p>
          </table:table-cell>
          <table:table-cell table:style-name="ce99" office:value-type="float" office:value="0.0652173913043478" calcext:value-type="float">
            <text:p>0.065</text:p>
          </table:table-cell>
          <table:table-cell/>
          <table:table-cell table:style-name="Default" table:number-columns-repeated="16366"/>
        </table:table-row>
        <table:table-row table:style-name="ro6">
          <table:table-cell office:value-type="float" office:value="186" calcext:value-type="float">
            <text:p>186</text:p>
          </table:table-cell>
          <table:table-cell office:value-type="string" calcext:value-type="string">
            <text:p>69744570-58a0-4f99-9eef-490e15da6348</text:p>
          </table:table-cell>
          <table:table-cell office:value-type="string" calcext:value-type="string">
            <text:p>fence repair</text:p>
          </table:table-cell>
          <table:table-cell office:value-type="string" calcext:value-type="string">
            <text:p>fence repair,fence,repair</text:p>
          </table:table-cell>
          <table:table-cell office:value-type="string" calcext:value-type="string">
            <text:p><text:s/>Zaunreparatur. Bitte höflichst um eine Zaunreparatur.</text:p>
          </table:table-cell>
          <table:table-cell office:value-type="string" calcext:value-type="string">
            <text:p>Zaun Reperatur</text:p>
          </table:table-cell>
          <table:table-cell table:style-name="ce79" office:value-type="string" calcext:value-type="string">
            <text:p>Bitten höflichst um eine Zaunreperatur</text:p>
          </table:table-cell>
          <table:table-cell table:style-name="ce79" office:value-type="string" calcext:value-type="string">
            <text:p>a fence</text:p>
          </table:table-cell>
          <table:table-cell table:style-name="ce88" table:formula="of:=[.F187]&amp;&quot; &quot;&amp;[.G187]" office:value-type="string" office:string-value="Zaun Reperatur Bitten höflichst um eine Zaunreperatur" calcext:value-type="string">
            <text:p>Zaun Reperatur Bitten höflichst um eine Zaunreperatur</text:p>
          </table:table-cell>
          <table:table-cell office:value-type="string" calcext:value-type="string">
            <text:p>x</text:p>
          </table:table-cell>
          <table:table-cell table:number-columns-repeated="4"/>
          <table:table-cell table:style-name="ce96" office:value-type="float" office:value="153" calcext:value-type="float">
            <text:p>153</text:p>
          </table:table-cell>
          <table:table-cell office:value-type="string" calcext:value-type="string">
            <text:p>Diverses</text:p>
          </table:table-cell>
          <table:table-cell table:style-name="ce99" office:value-type="float" office:value="0.571428571428571" calcext:value-type="float">
            <text:p>0.571</text:p>
          </table:table-cell>
          <table:table-cell/>
          <table:table-cell table:style-name="Default" table:number-columns-repeated="16366"/>
        </table:table-row>
        <table:table-row table:style-name="ro6">
          <table:table-cell office:value-type="float" office:value="187" calcext:value-type="float">
            <text:p>187</text:p>
          </table:table-cell>
          <table:table-cell office:value-type="string" calcext:value-type="string">
            <text:p>cabf2071-1986-4507-a012-d41c1559547c</text:p>
          </table:table-cell>
          <table:table-cell office:value-type="string" calcext:value-type="string">
            <text:p>garden chair</text:p>
          </table:table-cell>
          <table:table-cell office:value-type="string" calcext:value-type="string">
            <text:p>garden chair,chair,garden chair,seat</text:p>
          </table:table-cell>
          <table:table-cell office:value-type="string" calcext:value-type="string">
            <text:p><text:s/>Gartenstuhl. Es liegt ein Gartenstuhl in der Steiner.</text:p>
          </table:table-cell>
          <table:table-cell office:value-type="string" calcext:value-type="string">
            <text:p>Gartenstuhl</text:p>
          </table:table-cell>
          <table:table-cell table:style-name="ce79" office:value-type="string" calcext:value-type="string">
            <text:p>Es liegt ein Gartenstuhl in der Steinach</text:p>
          </table:table-cell>
          <table:table-cell table:style-name="ce79" office:value-type="string" calcext:value-type="string">
            <text:p>null</text:p>
          </table:table-cell>
          <table:table-cell table:style-name="ce88" table:formula="of:=[.F188]&amp;&quot; &quot;&amp;[.G188]" office:value-type="string" office:string-value="Gartenstuhl Es liegt ein Gartenstuhl in der Steinach" calcext:value-type="string">
            <text:p>Gartenstuhl Es liegt ein Gartenstuhl in der Steinach</text:p>
          </table:table-cell>
          <table:table-cell table:number-columns-repeated="4"/>
          <table:table-cell office:value-type="string" calcext:value-type="string">
            <text:p>x</text:p>
          </table:table-cell>
          <table:table-cell table:style-name="ce96" office:value-type="float" office:value="86" calcext:value-type="float">
            <text:p>86</text:p>
          </table:table-cell>
          <table:table-cell office:value-type="string" calcext:value-type="string">
            <text:p>Diverses</text:p>
          </table:table-cell>
          <table:table-cell table:style-name="ce99" office:value-type="float" office:value="0.25" calcext:value-type="float">
            <text:p>0.250</text:p>
          </table:table-cell>
          <table:table-cell/>
          <table:table-cell table:style-name="Default" table:number-columns-repeated="16366"/>
        </table:table-row>
        <table:table-row table:style-name="ro14">
          <table:table-cell office:value-type="float" office:value="188" calcext:value-type="float">
            <text:p>188</text:p>
          </table:table-cell>
          <table:table-cell office:value-type="string" calcext:value-type="string">
            <text:p>de7b3c29-e022-4aff-bf82-93e1a535e23c</text:p>
          </table:table-cell>
          <table:table-cell office:value-type="string" calcext:value-type="string">
            <text:p>step</text:p>
          </table:table-cell>
          <table:table-cell office:value-type="string" calcext:value-type="string">
            <text:p>step,staircase,step,ladder,nail</text:p>
          </table:table-cell>
          <table:table-cell office:value-type="string" calcext:value-type="string">
            <text:p><text:s/>Treppenstufe Lose. Guten Tag, im obersten Abschnitt Schlösslittreppe 21. Stufe ab Dufvordstraße Lose Treppenschufe. Könnte einen Nagel brauchen. Danke.</text:p>
          </table:table-cell>
          <table:table-cell office:value-type="string" calcext:value-type="string">
            <text:p>Treppenstufe lose</text:p>
          </table:table-cell>
          <table:table-cell table:style-name="ce79" office:value-type="string" calcext:value-type="string">
            <text:p>Guten Tag. Im obersten Abschnitt Schlösslitreppe, 21.Stufe ab Dufourstrasse, lose Treppenstufe. Könnte einen Nagel brauchen. Danke.</text:p>
          </table:table-cell>
          <table:table-cell table:style-name="ce79" office:value-type="string" calcext:value-type="string">
            <text:p>null</text:p>
          </table:table-cell>
          <table:table-cell table:style-name="ce88" table:formula="of:=[.F189]&amp;&quot; &quot;&amp;[.G189]" office:value-type="string" office:string-value="Treppenstufe lose Guten Tag. Im obersten Abschnitt Schlösslitreppe, 21.Stufe ab Dufourstrasse, lose Treppenstufe. Könnte einen Nagel brauchen. Danke." calcext:value-type="string">
            <text:p>Treppenstufe lose Guten Tag. Im obersten Abschnitt Schlösslitreppe, 21.Stufe ab Dufourstrasse, lose Treppenstufe. Könnte einen Nagel brauchen. Danke.</text:p>
          </table:table-cell>
          <table:table-cell table:number-columns-repeated="4"/>
          <table:table-cell office:value-type="string" calcext:value-type="string">
            <text:p>x</text:p>
          </table:table-cell>
          <table:table-cell table:style-name="ce96" office:value-type="float" office:value="94" calcext:value-type="float">
            <text:p>94</text:p>
          </table:table-cell>
          <table:table-cell office:value-type="string" calcext:value-type="string">
            <text:p>Diverses</text:p>
          </table:table-cell>
          <table:table-cell table:style-name="ce99" office:value-type="float" office:value="0.5" calcext:value-type="float">
            <text:p>0.500</text:p>
          </table:table-cell>
          <table:table-cell/>
          <table:table-cell table:style-name="Default" table:number-columns-repeated="16366"/>
        </table:table-row>
        <table:table-row table:style-name="ro1">
          <table:table-cell office:value-type="float" office:value="189" calcext:value-type="float">
            <text:p>189</text:p>
          </table:table-cell>
          <table:table-cell office:value-type="string" calcext:value-type="string">
            <text:p>9f8bacd1-b2c7-43c8-b250-61555b0ba565</text:p>
          </table:table-cell>
          <table:table-cell office:value-type="string" calcext:value-type="string">
            <text:p>hallway</text:p>
          </table:table-cell>
          <table:table-cell office:value-type="string" calcext:value-type="string">
            <text:p>hallway,corridor,hallway</text:p>
          </table:table-cell>
          <table:table-cell office:value-type="string" calcext:value-type="string">
            <text:p><text:s/>Und der Flur behält er voll.</text:p>
          </table:table-cell>
          <table:table-cell office:value-type="string" calcext:value-type="string">
            <text:p>Unterflurbehälter voll</text:p>
          </table:table-cell>
          <table:table-cell table:style-name="ce79"/>
          <table:table-cell table:style-name="ce79" office:value-type="string" calcext:value-type="string">
            <text:p>null</text:p>
          </table:table-cell>
          <table:table-cell table:style-name="ce88" table:formula="of:=[.F190]&amp;&quot; &quot;&amp;[.G190]" office:value-type="string" office:string-value="Unterflurbehälter voll " calcext:value-type="string">
            <text:p>Unterflurbehälter voll </text:p>
          </table:table-cell>
          <table:table-cell table:number-columns-repeated="2"/>
          <table:table-cell office:value-type="string" calcext:value-type="string">
            <text:p>x</text:p>
          </table:table-cell>
          <table:table-cell table:number-columns-repeated="2"/>
          <table:table-cell table:style-name="ce96" office:value-type="float" office:value="83" calcext:value-type="float">
            <text:p>83</text:p>
          </table:table-cell>
          <table:table-cell office:value-type="string" calcext:value-type="string">
            <text:p>Diverses</text:p>
          </table:table-cell>
          <table:table-cell table:style-name="ce99" office:value-type="float" office:value="3" calcext:value-type="float">
            <text:p>3.000</text:p>
          </table:table-cell>
          <table:table-cell/>
          <table:table-cell table:style-name="Default" table:number-columns-repeated="16366"/>
        </table:table-row>
        <table:table-row table:style-name="ro29">
          <table:table-cell office:value-type="float" office:value="190" calcext:value-type="float">
            <text:p>190</text:p>
          </table:table-cell>
          <table:table-cell office:value-type="string" calcext:value-type="string">
            <text:p>e51c71ed-a185-4fec-afcb-ef8f9f4c79f8</text:p>
          </table:table-cell>
          <table:table-cell office:value-type="string" calcext:value-type="string">
            <text:p>distribution box</text:p>
          </table:table-cell>
          <table:table-cell office:value-type="string" calcext:value-type="string">
            <text:p>distribution box,box,electrical box,staircase,Rötliweg</text:p>
          </table:table-cell>
          <table:table-cell office:value-type="string" calcext:value-type="string">
            <text:p><text:s/>Defekter Verteilerkasten. Der Kasten befindet sich unten an der Treppe. Rötliweg.</text:p>
          </table:table-cell>
          <table:table-cell office:value-type="string" calcext:value-type="string">
            <text:p>Defekter Verteilerkasten</text:p>
          </table:table-cell>
          <table:table-cell table:style-name="ce79" office:value-type="string" calcext:value-type="string">
            <text:p>Der Kasten befindet sich unten an der Treppe, Röteliweg.</text:p>
          </table:table-cell>
          <table:table-cell table:style-name="ce79" office:value-type="string" calcext:value-type="string">
            <text:p>a electrical box</text:p>
          </table:table-cell>
          <table:table-cell table:style-name="ce88" table:formula="of:=[.F191]&amp;&quot; &quot;&amp;[.G191]" office:value-type="string" office:string-value="Defekter Verteilerkasten Der Kasten befindet sich unten an der Treppe, Röteliweg." calcext:value-type="string">
            <text:p>Defekter Verteilerkasten Der Kasten befindet sich unten an der Treppe, Röteliweg.</text:p>
          </table:table-cell>
          <table:table-cell office:value-type="string" calcext:value-type="string">
            <text:p>x</text:p>
          </table:table-cell>
          <table:table-cell table:number-columns-repeated="4"/>
          <table:table-cell table:style-name="ce96" office:value-type="float" office:value="163" calcext:value-type="float">
            <text:p>163</text:p>
          </table:table-cell>
          <table:table-cell office:value-type="string" calcext:value-type="string">
            <text:p>Diverses</text:p>
          </table:table-cell>
          <table:table-cell table:style-name="ce99" office:value-type="float" office:value="0.272727272727273" calcext:value-type="float">
            <text:p>0.273</text:p>
          </table:table-cell>
          <table:table-cell/>
          <table:table-cell table:style-name="Default" table:number-columns-repeated="16366"/>
        </table:table-row>
        <table:table-row table:style-name="ro19">
          <table:table-cell office:value-type="float" office:value="191" calcext:value-type="float">
            <text:p>191</text:p>
          </table:table-cell>
          <table:table-cell office:value-type="string" calcext:value-type="string">
            <text:p>0d07229c-4870-4f0b-a86d-aa3e4c3631a9</text:p>
          </table:table-cell>
          <table:table-cell office:value-type="string" calcext:value-type="string">
            <text:p>underpass</text:p>
          </table:table-cell>
          <table:table-cell office:value-type="string" calcext:value-type="string">
            <text:p>underpass,Langgasse,graffiti,urine</text:p>
          </table:table-cell>
          <table:table-cell office:value-type="string" calcext:value-type="string">
            <text:p><text:s/>Unterführung Langgasse Guten Tag, wird diese Unterführung von der Stadt nicht kontrolliert und gereinigt? Diverse Graffiti und es stinkt von Urin.</text:p>
          </table:table-cell>
          <table:table-cell office:value-type="string" calcext:value-type="string">
            <text:p>Unterführung Langgasse</text:p>
          </table:table-cell>
          <table:table-cell table:style-name="ce79" office:value-type="string" calcext:value-type="string">
            <text:p>Guten Tag Wird diese Unterführung von der Stadt nicht Kontrolliert und gereinigt?! Dieverse graffiti und es stinkt von Urin.</text:p>
          </table:table-cell>
          <table:table-cell table:style-name="ce79" office:value-type="string" calcext:value-type="string">
            <text:p>a graffiti</text:p>
          </table:table-cell>
          <table:table-cell table:style-name="ce88" table:formula="of:=[.F192]&amp;&quot; &quot;&amp;[.G192]" office:value-type="string" office:string-value="Unterführung Langgasse Guten Tag Wird diese Unterführung von der Stadt nicht Kontrolliert und gereinigt?! Dieverse graffiti und es stinkt von Urin." calcext:value-type="string">
            <text:p>Unterführung Langgasse Guten Tag Wird diese Unterführung von der Stadt nicht Kontrolliert und gereinigt?! Dieverse graffiti und es stinkt von Urin.</text:p>
          </table:table-cell>
          <table:table-cell office:value-type="string" calcext:value-type="string">
            <text:p>x</text:p>
          </table:table-cell>
          <table:table-cell table:number-columns-repeated="4"/>
          <table:table-cell table:style-name="ce96" office:value-type="float" office:value="91" calcext:value-type="float">
            <text:p>91</text:p>
          </table:table-cell>
          <table:table-cell office:value-type="string" calcext:value-type="string">
            <text:p>Diverses</text:p>
          </table:table-cell>
          <table:table-cell table:style-name="ce99" office:value-type="float" office:value="0.285714285714286" calcext:value-type="float">
            <text:p>0.286</text:p>
          </table:table-cell>
          <table:table-cell/>
          <table:table-cell table:style-name="Default" table:number-columns-repeated="16366"/>
        </table:table-row>
        <table:table-row table:style-name="ro1">
          <table:table-cell office:value-type="float" office:value="192" calcext:value-type="float">
            <text:p>192</text:p>
          </table:table-cell>
          <table:table-cell office:value-type="string" calcext:value-type="string">
            <text:p>e1442d53-05c6-424f-a77d-f4ade136140b</text:p>
          </table:table-cell>
          <table:table-cell office:value-type="string" calcext:value-type="string">
            <text:p>light</text:p>
          </table:table-cell>
          <table:table-cell office:value-type="string" calcext:value-type="string">
            <text:p>light,light</text:p>
          </table:table-cell>
          <table:table-cell office:value-type="string" calcext:value-type="string">
            <text:p><text:s/>Licht geht nicht.</text:p>
          </table:table-cell>
          <table:table-cell office:value-type="string" calcext:value-type="string">
            <text:p>Licht geht nicht</text:p>
          </table:table-cell>
          <table:table-cell table:style-name="ce79"/>
          <table:table-cell table:style-name="ce79" office:value-type="string" calcext:value-type="string">
            <text:p>a light</text:p>
          </table:table-cell>
          <table:table-cell table:style-name="ce88" table:formula="of:=[.F193]&amp;&quot; &quot;&amp;[.G193]" office:value-type="string" office:string-value="Licht geht nicht " calcext:value-type="string">
            <text:p>Licht geht nicht </text:p>
          </table:table-cell>
          <table:table-cell office:value-type="string" calcext:value-type="string">
            <text:p>x</text:p>
          </table:table-cell>
          <table:table-cell table:number-columns-repeated="4"/>
          <table:table-cell table:style-name="ce96" office:value-type="float" office:value="99" calcext:value-type="float">
            <text:p>99</text:p>
          </table:table-cell>
          <table:table-cell office:value-type="string" calcext:value-type="string">
            <text:p>Diverses</text:p>
          </table:table-cell>
          <table:table-cell table:style-name="ce99" office:value-type="float" office:value="0.333333333333333" calcext:value-type="float">
            <text:p>0.333</text:p>
          </table:table-cell>
          <table:table-cell/>
          <table:table-cell table:style-name="Default" table:number-columns-repeated="16366"/>
        </table:table-row>
        <table:table-row table:style-name="ro6">
          <table:table-cell office:value-type="float" office:value="193" calcext:value-type="float">
            <text:p>193</text:p>
          </table:table-cell>
          <table:table-cell office:value-type="string" calcext:value-type="string">
            <text:p>d8a53d61-260f-444b-9872-05739162019d</text:p>
          </table:table-cell>
          <table:table-cell office:value-type="string" calcext:value-type="string">
            <text:p>hydrant</text:p>
          </table:table-cell>
          <table:table-cell office:value-type="string" calcext:value-type="string">
            <text:p>hydrant,water source,pipe,water</text:p>
          </table:table-cell>
          <table:table-cell office:value-type="string" calcext:value-type="string">
            <text:p><text:s/>Hydrant rinnt. Der Hydrant verliert Wasser.</text:p>
          </table:table-cell>
          <table:table-cell office:value-type="string" calcext:value-type="string">
            <text:p>Hydrant rinnt</text:p>
          </table:table-cell>
          <table:table-cell table:style-name="ce79" office:value-type="string" calcext:value-type="string">
            <text:p>Der Hydrant verliert Wasser</text:p>
          </table:table-cell>
          <table:table-cell table:style-name="ce79" office:value-type="string" calcext:value-type="string">
            <text:p>a hydrant</text:p>
          </table:table-cell>
          <table:table-cell table:style-name="ce88" table:formula="of:=[.F194]&amp;&quot; &quot;&amp;[.G194]" office:value-type="string" office:string-value="Hydrant rinnt Der Hydrant verliert Wasser" calcext:value-type="string">
            <text:p>Hydrant rinnt Der Hydrant verliert Wasser</text:p>
          </table:table-cell>
          <table:table-cell office:value-type="string" calcext:value-type="string">
            <text:p>x</text:p>
          </table:table-cell>
          <table:table-cell table:number-columns-repeated="4"/>
          <table:table-cell table:style-name="ce96" office:value-type="float" office:value="121" calcext:value-type="float">
            <text:p>121</text:p>
          </table:table-cell>
          <table:table-cell office:value-type="string" calcext:value-type="string">
            <text:p>Diverses</text:p>
          </table:table-cell>
          <table:table-cell table:style-name="ce99" office:value-type="float" office:value="0.333333333333333" calcext:value-type="float">
            <text:p>0.333</text:p>
          </table:table-cell>
          <table:table-cell/>
          <table:table-cell table:style-name="Default" table:number-columns-repeated="16366"/>
        </table:table-row>
        <table:table-row table:style-name="ro33">
          <table:table-cell office:value-type="float" office:value="194" calcext:value-type="float">
            <text:p>194</text:p>
          </table:table-cell>
          <table:table-cell office:value-type="string" calcext:value-type="string">
            <text:p>eb7ae46e-a76b-4631-82ee-77902265519e</text:p>
          </table:table-cell>
          <table:table-cell office:value-type="string" calcext:value-type="string">
            <text:p>parking lot</text:p>
          </table:table-cell>
          <table:table-cell office:value-type="string" calcext:value-type="string">
            <text:p>parking lot,state power,people</text:p>
          </table:table-cell>
          <table:table-cell office:value-type="string" calcext:value-type="string">
            <text:p><text:s/>Parkplatz hinterlauben. Jeden Tag wird hier parkiert und die Staatsgewalt ignoriert dies gefließentlich. Obwohl sie sehr wohl vorbeigehen oder fahren. Es scheint, dass gewisse Leute halt doch gleicher sind als andere.</text:p>
          </table:table-cell>
          <table:table-cell office:value-type="string" calcext:value-type="string">
            <text:p>Parkplatz Hinterlauben</text:p>
          </table:table-cell>
          <table:table-cell table:style-name="ce79" office:value-type="string" calcext:value-type="string">
            <text:p>Jeden (!) Tag wird hier parkiert - und die Staatsgewalt ignoriert dies geflissentlich. Obwohl sie sehr wohl vorbeigehen oder -fahren. Es scheint, dass gewisse Leute halt doch gleicher sind als andere.</text:p>
          </table:table-cell>
          <table:table-cell table:style-name="ce79" office:value-type="string" calcext:value-type="string">
            <text:p>a parking lot</text:p>
          </table:table-cell>
          <table:table-cell table:style-name="ce88" table:formula="of:=[.F195]&amp;&quot; &quot;&amp;[.G195]" office:value-type="string" office:string-value="Parkplatz Hinterlauben Jeden (!) Tag wird hier parkiert - und die Staatsgewalt ignoriert dies geflissentlich. Obwohl sie sehr wohl vorbeigehen oder -fahren. Es scheint, dass gewisse Leute halt doch gleicher sind als andere." calcext:value-type="string">
            <text:p>Parkplatz Hinterlauben Jeden (!) Tag wird hier parkiert - und die Staatsgewalt ignoriert dies geflissentlich. Obwohl sie sehr wohl vorbeigehen oder -fahren. Es scheint, dass gewisse Leute halt doch gleicher sind als andere.</text:p>
          </table:table-cell>
          <table:table-cell office:value-type="string" calcext:value-type="string">
            <text:p>x</text:p>
          </table:table-cell>
          <table:table-cell table:number-columns-repeated="4"/>
          <table:table-cell table:style-name="ce96" office:value-type="float" office:value="178" calcext:value-type="float">
            <text:p>178</text:p>
          </table:table-cell>
          <table:table-cell office:value-type="string" calcext:value-type="string">
            <text:p>Diverses</text:p>
          </table:table-cell>
          <table:table-cell table:style-name="ce99" office:value-type="float" office:value="0.151515151515152" calcext:value-type="float">
            <text:p>0.152</text:p>
          </table:table-cell>
          <table:table-cell/>
          <table:table-cell table:style-name="Default" table:number-columns-repeated="16366"/>
        </table:table-row>
        <table:table-row table:style-name="ro34">
          <table:table-cell office:value-type="float" office:value="195" calcext:value-type="float">
            <text:p>195</text:p>
          </table:table-cell>
          <table:table-cell office:value-type="string" calcext:value-type="string">
            <text:p>450c8406-2aa0-49b3-b85b-3efd4d1db96b</text:p>
          </table:table-cell>
          <table:table-cell office:value-type="string" calcext:value-type="string">
            <text:p>vandalism</text:p>
          </table:table-cell>
          <table:table-cell office:value-type="string" calcext:value-type="string">
            <text:p>vandalism,vandals,bench,sidewalk,paving slabs</text:p>
          </table:table-cell>
          <table:table-cell office:value-type="string" calcext:value-type="string">
            <text:p><text:s/>Wandalenakt. Wandale haben an einer Bank der Höchsterstraße die Fussplatten entfernt und in die Wiese geworfen. Wir bitten um Instandsetzung. Vielen Dank.</text:p>
          </table:table-cell>
          <table:table-cell office:value-type="string" calcext:value-type="string">
            <text:p>Vandalenakt</text:p>
          </table:table-cell>
          <table:table-cell table:style-name="ce79" office:value-type="string" calcext:value-type="string">
            <text:p>Vandalen haben an einer Bank der Höchster Strasse die Fussplatten entfernt und in die Wiese geworfen. Wir bitten um Instandsetzung, vielen Dank.</text:p>
          </table:table-cell>
          <table:table-cell table:style-name="ce79" office:value-type="string" calcext:value-type="string">
            <text:p>a bench</text:p>
          </table:table-cell>
          <table:table-cell table:style-name="ce88" table:formula="of:=[.F196]&amp;&quot; &quot;&amp;[.G196]" office:value-type="string" office:string-value="Vandalenakt Vandalen haben an einer Bank der Höchster Strasse die Fussplatten entfernt und in die Wiese geworfen. Wir bitten um Instandsetzung, vielen Dank." calcext:value-type="string">
            <text:p>Vandalenakt Vandalen haben an einer Bank der Höchster Strasse die Fussplatten entfernt und in die Wiese geworfen. Wir bitten um Instandsetzung, vielen Dank.</text:p>
          </table:table-cell>
          <table:table-cell table:number-columns-repeated="3"/>
          <table:table-cell office:value-type="string" calcext:value-type="string">
            <text:p>x</text:p>
          </table:table-cell>
          <table:table-cell/>
          <table:table-cell table:style-name="ce96" office:value-type="float" office:value="309" calcext:value-type="float">
            <text:p>309</text:p>
          </table:table-cell>
          <table:table-cell office:value-type="string" calcext:value-type="string">
            <text:p>Diverses</text:p>
          </table:table-cell>
          <table:table-cell table:style-name="ce99" office:value-type="float" office:value="0.260869565217391" calcext:value-type="float">
            <text:p>0.261</text:p>
          </table:table-cell>
          <table:table-cell/>
          <table:table-cell table:style-name="Default" table:number-columns-repeated="16366"/>
        </table:table-row>
        <table:table-row table:style-name="ro29">
          <table:table-cell office:value-type="float" office:value="196" calcext:value-type="float">
            <text:p>196</text:p>
          </table:table-cell>
          <table:table-cell office:value-type="string" calcext:value-type="string">
            <text:p>80891920-cdc3-4fd2-a558-b16836121468</text:p>
          </table:table-cell>
          <table:table-cell office:value-type="string" calcext:value-type="string">
            <text:p>light effect</text:p>
          </table:table-cell>
          <table:table-cell office:value-type="string" calcext:value-type="string">
            <text:p>light effect,public facility,left door,WC facility</text:p>
          </table:table-cell>
          <table:table-cell office:value-type="string" calcext:value-type="string">
            <text:p><text:s/>WC-Anlage Lichteffekt bei der öffentlichen Anlage bild linke Türe.</text:p>
          </table:table-cell>
          <table:table-cell office:value-type="string" calcext:value-type="string">
            <text:p>WC Anlage Licht defekt</text:p>
          </table:table-cell>
          <table:table-cell table:style-name="ce79" office:value-type="string" calcext:value-type="string">
            <text:p>...bei der öffentlichen Anlage, Bild linke Türe</text:p>
          </table:table-cell>
          <table:table-cell table:style-name="ce79" office:value-type="string" calcext:value-type="string">
            <text:p>a left door</text:p>
          </table:table-cell>
          <table:table-cell table:style-name="ce88" table:formula="of:=[.F197]&amp;&quot; &quot;&amp;[.G197]" office:value-type="string" office:string-value="WC Anlage Licht defekt ...bei der öffentlichen Anlage, Bild linke Türe" calcext:value-type="string">
            <text:p>WC Anlage Licht defekt ...bei der öffentlichen Anlage, Bild linke Türe</text:p>
          </table:table-cell>
          <table:table-cell office:value-type="string" calcext:value-type="string">
            <text:p>x</text:p>
          </table:table-cell>
          <table:table-cell table:number-columns-repeated="4"/>
          <table:table-cell table:style-name="ce96" office:value-type="float" office:value="152" calcext:value-type="float">
            <text:p>152</text:p>
          </table:table-cell>
          <table:table-cell office:value-type="string" calcext:value-type="string">
            <text:p>Diverses</text:p>
          </table:table-cell>
          <table:table-cell table:style-name="ce99" office:value-type="float" office:value="0.727272727272727" calcext:value-type="float">
            <text:p>0.727</text:p>
          </table:table-cell>
          <table:table-cell/>
          <table:table-cell table:style-name="Default" table:number-columns-repeated="16366"/>
        </table:table-row>
        <table:table-row table:style-name="ro20">
          <table:table-cell table:style-name="ce71" office:value-type="float" office:value="197" calcext:value-type="float">
            <text:p>197</text:p>
          </table:table-cell>
          <table:table-cell table:style-name="ce71" office:value-type="string" calcext:value-type="string">
            <text:p>53dab15f-eb47-4a97-bdfb-412035ca833a</text:p>
          </table:table-cell>
          <table:table-cell table:style-name="ce71" office:value-type="string" calcext:value-type="string">
            <text:p>underpass</text:p>
          </table:table-cell>
          <table:table-cell table:style-name="ce71" office:value-type="string" calcext:value-type="string">
            <text:p>underpass,street,person underpass,plank</text:p>
          </table:table-cell>
          <table:table-cell table:style-name="ce80" office:value-type="string" calcext:value-type="string">
            <text:p><text:s/>Unterführung Rorschacher Strasse. Bei der Personenunterführung im Neudorf hat sich ein Brett gelöst.</text:p>
          </table:table-cell>
          <table:table-cell table:style-name="ce71" office:value-type="string" calcext:value-type="string">
            <text:p>Unterführung Rorschacher Strasse</text:p>
          </table:table-cell>
          <table:table-cell table:style-name="ce80" office:value-type="string" calcext:value-type="string">
            <text:p>Bei der Personenunterführung im Neudorf hat sich ein Brett gelöst.</text:p>
          </table:table-cell>
          <table:table-cell table:style-name="ce80" office:value-type="string" calcext:value-type="string">
            <text:p>a plank</text:p>
          </table:table-cell>
          <table:table-cell table:style-name="ce89" table:formula="of:=[.F198]&amp;&quot; &quot;&amp;[.G198]" office:value-type="string" office:string-value="Unterführung Rorschacher Strasse Bei der Personenunterführung im Neudorf hat sich ein Brett gelöst." calcext:value-type="string">
            <text:p>Unterführung Rorschacher Strasse Bei der Personenunterführung im Neudorf hat sich ein Brett gelöst.</text:p>
          </table:table-cell>
          <table:table-cell table:style-name="ce71" office:value-type="string" calcext:value-type="string">
            <text:p>x</text:p>
          </table:table-cell>
          <table:table-cell table:style-name="ce71" table:number-columns-repeated="4"/>
          <table:table-cell table:style-name="ce97" office:value-type="float" office:value="94" calcext:value-type="float">
            <text:p>94</text:p>
          </table:table-cell>
          <table:table-cell office:value-type="string" calcext:value-type="string">
            <text:p>Diverses</text:p>
          </table:table-cell>
          <table:table-cell table:style-name="ce30" office:value-type="float" office:value="0.0769230769230769" calcext:value-type="float">
            <text:p>0.077</text:p>
          </table:table-cell>
          <table:table-cell table:style-name="ce71" table:number-columns-repeated="16367"/>
        </table:table-row>
        <table:table-row table:style-name="ro35">
          <table:table-cell office:value-type="float" office:value="198" calcext:value-type="float">
            <text:p>198</text:p>
          </table:table-cell>
          <table:table-cell office:value-type="string" calcext:value-type="string">
            <text:p>f9b1f765-c396-4f3b-a223-b83beb8bac7d</text:p>
          </table:table-cell>
          <table:table-cell office:value-type="string" calcext:value-type="string">
            <text:p>ice</text:p>
          </table:table-cell>
          <table:table-cell office:value-type="string" calcext:value-type="string">
            <text:p>ice,snow,ice,intersection,crosswalk</text:p>
          </table:table-cell>
          <table:table-cell office:value-type="string" calcext:value-type="string">
            <text:p><text:s/>Vereiste Verkehrsfläche. Dieser Schneeberg sorgt regelmässig morgens und abends für Glatteis auf der Kreuzung. Sehr kritisch für Velos und Fussgänger, die dort kein Trottoir vorfinden.</text:p>
          </table:table-cell>
          <table:table-cell office:value-type="string" calcext:value-type="string">
            <text:p>Vereiste Verkehrsfläche</text:p>
          </table:table-cell>
          <table:table-cell table:style-name="ce79" office:value-type="string" calcext:value-type="string">
            <text:p>Dieser Schneeberg sorgt regelmässig morgens und abends für Glatteis auf der Kreuzung. Sehr kritisch für Velos und Fussgänger, die dort kein Trottoir vorfinden!</text:p>
          </table:table-cell>
          <table:table-cell table:style-name="ce79" office:value-type="string" calcext:value-type="string">
            <text:p>a ice</text:p>
          </table:table-cell>
          <table:table-cell table:style-name="ce88" table:formula="of:=[.F199]&amp;&quot; &quot;&amp;[.G199]" office:value-type="string" office:string-value="Vereiste Verkehrsfläche Dieser Schneeberg sorgt regelmässig morgens und abends für Glatteis auf der Kreuzung. Sehr kritisch für Velos und Fussgänger, die dort kein Trottoir vorfinden!" calcext:value-type="string">
            <text:p>Vereiste Verkehrsfläche Dieser Schneeberg sorgt regelmässig morgens und abends für Glatteis auf der Kreuzung. Sehr kritisch für Velos und Fussgänger, die dort kein Trottoir vorfinden!</text:p>
          </table:table-cell>
          <table:table-cell office:value-type="string" calcext:value-type="string">
            <text:p>x</text:p>
          </table:table-cell>
          <table:table-cell table:number-columns-repeated="4"/>
          <table:table-cell table:style-name="ce96" office:value-type="float" office:value="96" calcext:value-type="float">
            <text:p>96</text:p>
          </table:table-cell>
          <table:table-cell office:value-type="string" calcext:value-type="string">
            <text:p>Diverses</text:p>
          </table:table-cell>
          <table:table-cell table:style-name="ce99" office:value-type="float" office:value="0.08" calcext:value-type="float">
            <text:p>0.080</text:p>
          </table:table-cell>
          <table:table-cell/>
          <table:table-cell table:style-name="Default" table:number-columns-repeated="16366"/>
        </table:table-row>
        <table:table-row table:style-name="ro35">
          <table:table-cell office:value-type="float" office:value="199" calcext:value-type="float">
            <text:p>199</text:p>
          </table:table-cell>
          <table:table-cell office:value-type="string" calcext:value-type="string">
            <text:p>86082400-9146-43ea-a9ee-3e2e3d86157f</text:p>
          </table:table-cell>
          <table:table-cell office:value-type="string" calcext:value-type="string">
            <text:p>hydrant</text:p>
          </table:table-cell>
          <table:table-cell office:value-type="string" calcext:value-type="string">
            <text:p>hydrant,water outlet,water,drip,ice</text:p>
          </table:table-cell>
          <table:table-cell office:value-type="string" calcext:value-type="string">
            <text:p><text:s/>Leck an Hydranten. Am Hydranten tritt einer der seitlichen Ausschlüsse Wasser aus. Das ständige Tröpfchen führt zur Bildung von Glatteis im unmittelbaren Umfeld. Bitte zeitnah überprüfen und beheben.</text:p>
          </table:table-cell>
          <table:table-cell office:value-type="string" calcext:value-type="string">
            <text:p>Leck an Hydranten</text:p>
          </table:table-cell>
          <table:table-cell table:style-name="ce79" office:value-type="string" calcext:value-type="string">
            <text:p>Am Hydranten tritt an einem der seitlichen Anschlüsse Wasser aus. Das ständige Tröpfeln führt zur Bildung von Glatteis im unmittelbaren Umfeld. Bitte zeitnah prüfen und beheben.</text:p>
          </table:table-cell>
          <table:table-cell table:style-name="ce79" office:value-type="string" calcext:value-type="string">
            <text:p>a hydrant</text:p>
          </table:table-cell>
          <table:table-cell table:style-name="ce88" table:formula="of:=[.F200]&amp;&quot; &quot;&amp;[.G200]" office:value-type="string" office:string-value="Leck an Hydranten Am Hydranten tritt an einem der seitlichen Anschlüsse Wasser aus. Das ständige Tröpfeln führt zur Bildung von Glatteis im unmittelbaren Umfeld. Bitte zeitnah prüfen und beheben." calcext:value-type="string">
            <text:p>Leck an Hydranten Am Hydranten tritt an einem der seitlichen Anschlüsse Wasser aus. Das ständige Tröpfeln führt zur Bildung von Glatteis im unmittelbaren Umfeld. Bitte zeitnah prüfen und beheben.</text:p>
          </table:table-cell>
          <table:table-cell office:value-type="string" calcext:value-type="string">
            <text:p>x</text:p>
          </table:table-cell>
          <table:table-cell table:number-columns-repeated="4"/>
          <table:table-cell table:style-name="ce96" office:value-type="float" office:value="253" calcext:value-type="float">
            <text:p>253</text:p>
          </table:table-cell>
          <table:table-cell office:value-type="string" calcext:value-type="string">
            <text:p>Diverses</text:p>
          </table:table-cell>
          <table:table-cell table:style-name="ce99" office:value-type="float" office:value="0.206896551724138" calcext:value-type="float">
            <text:p>0.207</text:p>
          </table:table-cell>
          <table:table-cell/>
          <table:table-cell table:style-name="Default" table:number-columns-repeated="16366"/>
        </table:table-row>
        <table:table-row table:style-name="ro36">
          <table:table-cell office:value-type="float" office:value="200" calcext:value-type="float">
            <text:p>200</text:p>
          </table:table-cell>
          <table:table-cell office:value-type="string" calcext:value-type="string">
            <text:p>8ece054b-697b-494b-a1c6-497231e068b4</text:p>
          </table:table-cell>
          <table:table-cell office:value-type="string" calcext:value-type="string">
            <text:p>snow</text:p>
          </table:table-cell>
          <table:table-cell office:value-type="string" calcext:value-type="string">
            <text:p>snow,sidewalk,street,vehicle,plow</text:p>
          </table:table-cell>
          <table:table-cell office:value-type="string" calcext:value-type="string">
            <text:p><text:s/>Schnee versperrt Gehweg. Guten Tag, bei jedem Schneefall wird dieser Gehweg nicht richtig geräumt. Die Kinder laufen teilweise ständig auf der Strasse, was zu gefährlichen Situationen führt. Gestern Donnerstag drehte ein Fahrzeug mit Pflug diverse Runden ohne diesen gefährliche Situation zu beseitigen. Freundliche Grüße.</text:p>
          </table:table-cell>
          <table:table-cell office:value-type="string" calcext:value-type="string">
            <text:p>Schnee versperrt Gewehg</text:p>
          </table:table-cell>
          <table:table-cell table:style-name="ce79" office:value-type="string" calcext:value-type="string">
            <text:p>Guten Tag. Bei jedem Schneefall wird dieser Gewehg nicht richtig geräumt. Die Kinder laufen teilweise ständig auf der Straße,was zu gefährlichen Situationen führt. Gestern Donnerstag drehte ein Fahrzeug mit Pflug dieverse Runden ohne diese gefährlich Situationen zu beseitigen. Freundliche Grüße </text:p>
          </table:table-cell>
          <table:table-cell table:style-name="ce79" office:value-type="string" calcext:value-type="string">
            <text:p>a snow</text:p>
          </table:table-cell>
          <table:table-cell table:style-name="ce88" table:formula="of:=[.F201]&amp;&quot; &quot;&amp;[.G201]" office:value-type="string" office:string-value="Schnee versperrt Gewehg Guten Tag. Bei jedem Schneefall wird dieser Gewehg nicht richtig geräumt. Die Kinder laufen teilweise ständig auf der Straße,was zu gefährlichen Situationen führt. Gestern Donnerstag drehte ein Fahrzeug mit Pflug dieverse Runden ohne diese gefährlich Situationen zu beseitigen. Freundliche Grüße " calcext:value-type="string">
            <text:p>Schnee versperrt Gewehg Guten Tag. Bei jedem Schneefall wird dieser Gewehg nicht richtig geräumt. Die Kinder laufen teilweise ständig auf der Straße,was zu gefährlichen Situationen führt. Gestern Donnerstag drehte ein Fahrzeug mit Pflug dieverse Runden ohne diese gefährlich Situationen zu beseitigen. Freundliche Grüße </text:p>
          </table:table-cell>
          <table:table-cell office:value-type="string" calcext:value-type="string">
            <text:p>x</text:p>
          </table:table-cell>
          <table:table-cell table:number-columns-repeated="4"/>
          <table:table-cell table:style-name="ce96" office:value-type="float" office:value="215" calcext:value-type="float">
            <text:p>215</text:p>
          </table:table-cell>
          <table:table-cell office:value-type="string" calcext:value-type="string">
            <text:p>Diverses</text:p>
          </table:table-cell>
          <table:table-cell table:style-name="ce99" office:value-type="float" office:value="0.255813953488372" calcext:value-type="float">
            <text:p>0.256</text:p>
          </table:table-cell>
          <table:table-cell/>
          <table:table-cell table:style-name="Default" table:number-columns-repeated="16366"/>
        </table:table-row>
        <table:table-row table:style-name="ro1" table:number-rows-repeated="1048374">
          <table:table-cell table:number-columns-repeated="18"/>
          <table:table-cell table:style-name="Default" table:number-columns-repeated="16366"/>
        </table:table-row>
        <table:table-row table:style-name="ro1">
          <table:table-cell table:number-columns-repeated="18"/>
          <table:table-cell table:style-name="Default" table:number-columns-repeated="16366"/>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de" fo:country="CH"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12pt" fo:language="de" fo:country="CH"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Linienspitz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number-style style:name="N114">
      <number:number number:decimal-places="11" number:min-decimal-places="11" number:min-integer-digits="1"/>
    </number:number-style>
    <number:number-style style:name="N115">
      <number:number number:decimal-places="10" number:min-decimal-places="10" number:min-integer-digits="1"/>
    </number:number-style>
    <number:number-style style:name="N116">
      <number:number number:decimal-places="9" number:min-decimal-places="9" number:min-integer-digits="1"/>
    </number:number-style>
    <number:number-style style:name="N117">
      <number:number number:decimal-places="8" number:min-decimal-places="8" number:min-integer-digits="1"/>
    </number:number-style>
    <number:number-style style:name="N118">
      <number:number number:decimal-places="7" number:min-decimal-places="7" number:min-integer-digits="1"/>
    </number:number-style>
    <number:number-style style:name="N119">
      <number:number number:decimal-places="6" number:min-decimal-places="6" number:min-integer-digits="1"/>
    </number:number-style>
    <number:number-style style:name="N120">
      <number:number number:decimal-places="5" number:min-decimal-places="5" number:min-integer-digits="1"/>
    </number:number-style>
    <number:number-style style:name="N121">
      <number:number number:decimal-places="4" number:min-decimal-places="4" number:min-integer-digits="1"/>
    </number:number-style>
    <number:number-style style:name="N122">
      <number:number number:decimal-places="3" number:min-decimal-places="3" number:min-integer-digits="1"/>
    </number:number-style>
    <number:number-style style:name="N123">
      <number:number number:decimal-places="1" number:min-decimal-places="1"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Linienspitzen_20_1" draw:display-name="Linienspitzen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5-10">00.00.0000</text:date>, <text:time style:data-style-name="N2" text:time-value="15:30:49.068517000">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5-05T14:10:02.097943700</meta:creation-date>
    <dc:date>2026-05-10T21:58:23.241951300</dc:date>
    <meta:editing-duration>P1DT9H2M22S</meta:editing-duration>
    <meta:editing-cycles>207</meta:editing-cycles>
    <meta:generator>LibreOffice/26.2.1.2$Windows_X86_64 LibreOffice_project/620$Build-2</meta:generator>
    <meta:document-statistic meta:table-count="1" meta:cell-count="2604" meta:object-count="0"/>
  </office:meta>
</office:document-meta>
</file>